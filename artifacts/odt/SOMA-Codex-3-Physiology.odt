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5000001F5BFB8F433.png" manifest:media-type="image/png"/>
  <manifest:file-entry manifest:full-path="Pictures/1000000100000385000001AF2A6566F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Math" svg:font-family="'Cambria Math', 'Liberation Serif', serif"/>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7.3188in"/>
    </style:style>
    <style:style style:name="Table1.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2" style:family="table">
      <style:table-properties style:width="7.3188in" table:align="left"/>
    </style:style>
    <style:style style:name="Table2.A" style:family="table-column">
      <style:table-column-properties style:column-width="7.3188in"/>
    </style:style>
    <style:style style:name="Table2.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3" style:family="table">
      <style:table-properties style:width="7.3188in" table:align="left"/>
    </style:style>
    <style:style style:name="Table3.A" style:family="table-column">
      <style:table-column-properties style:column-width="7.3188in"/>
    </style:style>
    <style:style style:name="Table3.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4" style:family="table">
      <style:table-properties style:width="7.3188in" table:align="left"/>
    </style:style>
    <style:style style:name="Table4.A" style:family="table-column">
      <style:table-column-properties style:column-width="1.9431in"/>
    </style:style>
    <style:style style:name="Table4.B" style:family="table-column">
      <style:table-column-properties style:column-width="1.5146in"/>
    </style:style>
    <style:style style:name="Table4.C" style:family="table-column">
      <style:table-column-properties style:column-width="3.8611in"/>
    </style:style>
    <style:style style:name="Table4.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4.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4.A2" style:family="table-cell">
      <style:table-cell-properties style:vertical-align="middle" fo:padding="0.0625in" fo:border-left="0.75pt solid #808080" fo:border-right="0.75pt solid #808080" fo:border-top="none" fo:border-bottom="0.05pt solid #808080"/>
    </style:style>
    <style:style style:name="Table4.B2" style:family="table-cell">
      <style:table-cell-properties style:vertical-align="middle" fo:padding="0.0625in" fo:border-left="0.05pt solid #808080" fo:border-right="0.75pt solid #808080" fo:border-top="none" fo:border-bottom="0.05pt solid #808080"/>
    </style:style>
    <style:style style:name="Table4.C2" style:family="table-cell">
      <style:table-cell-properties style:vertical-align="middle" fo:padding="0.0625in" fo:border-left="0.05pt solid #808080" fo:border-right="0.75pt solid #808080" fo:border-top="none" fo:border-bottom="0.05pt solid #808080"/>
    </style:style>
    <style:style style:name="Table4.A3" style:family="table-cell">
      <style:table-cell-properties style:vertical-align="middle" fo:padding="0.0625in" fo:border-left="0.75pt solid #808080" fo:border-right="0.75pt solid #808080" fo:border-top="none" fo:border-bottom="0.05pt solid #808080"/>
    </style:style>
    <style:style style:name="Table4.B3" style:family="table-cell">
      <style:table-cell-properties style:vertical-align="middle" fo:padding="0.0625in" fo:border-left="0.05pt solid #808080" fo:border-right="0.75pt solid #808080" fo:border-top="none" fo:border-bottom="0.05pt solid #808080"/>
    </style:style>
    <style:style style:name="Table4.C3" style:family="table-cell">
      <style:table-cell-properties style:vertical-align="middle" fo:padding="0.0625in" fo:border-left="0.05pt solid #808080" fo:border-right="0.75pt solid #808080" fo:border-top="none" fo:border-bottom="0.05pt solid #808080"/>
    </style:style>
    <style:style style:name="Table4.A4" style:family="table-cell">
      <style:table-cell-properties style:vertical-align="middle" fo:padding="0.0625in" fo:border-left="0.75pt solid #808080" fo:border-right="0.75pt solid #808080" fo:border-top="none" fo:border-bottom="0.05pt solid #808080"/>
    </style:style>
    <style:style style:name="Table4.B4" style:family="table-cell">
      <style:table-cell-properties style:vertical-align="middle" fo:padding="0.0625in" fo:border-left="0.05pt solid #808080" fo:border-right="0.75pt solid #808080" fo:border-top="none" fo:border-bottom="0.05pt solid #808080"/>
    </style:style>
    <style:style style:name="Table4.C4" style:family="table-cell">
      <style:table-cell-properties style:vertical-align="middle" fo:padding="0.0625in" fo:border-left="0.05pt solid #808080" fo:border-right="0.75pt solid #808080" fo:border-top="none" fo:border-bottom="0.05pt solid #808080"/>
    </style:style>
    <style:style style:name="Table4.A5" style:family="table-cell">
      <style:table-cell-properties style:vertical-align="middle" fo:padding="0.0625in" fo:border-left="0.75pt solid #808080" fo:border-right="0.75pt solid #808080" fo:border-top="none" fo:border-bottom="0.05pt solid #808080"/>
    </style:style>
    <style:style style:name="Table4.B5" style:family="table-cell">
      <style:table-cell-properties style:vertical-align="middle" fo:padding="0.0625in" fo:border-left="0.05pt solid #808080" fo:border-right="0.75pt solid #808080" fo:border-top="none" fo:border-bottom="0.05pt solid #808080"/>
    </style:style>
    <style:style style:name="Table4.C5" style:family="table-cell">
      <style:table-cell-properties style:vertical-align="middle" fo:padding="0.0625in" fo:border-left="0.05pt solid #808080" fo:border-right="0.75pt solid #808080" fo:border-top="none" fo:border-bottom="0.05pt solid #808080"/>
    </style:style>
    <style:style style:name="Table4.A6" style:family="table-cell">
      <style:table-cell-properties style:vertical-align="middle" fo:padding="0.0625in" fo:border-left="0.75pt solid #808080" fo:border-right="0.75pt solid #808080" fo:border-top="none" fo:border-bottom="0.05pt solid #808080"/>
    </style:style>
    <style:style style:name="Table4.B6" style:family="table-cell">
      <style:table-cell-properties style:vertical-align="middle" fo:padding="0.0625in" fo:border-left="0.05pt solid #808080" fo:border-right="0.75pt solid #808080" fo:border-top="none" fo:border-bottom="0.05pt solid #808080"/>
    </style:style>
    <style:style style:name="Table4.C6" style:family="table-cell">
      <style:table-cell-properties style:vertical-align="middle" fo:padding="0.0625in" fo:border-left="0.05pt solid #808080" fo:border-right="0.75pt solid #808080" fo:border-top="none" fo:border-bottom="0.05pt solid #808080"/>
    </style:style>
    <style:style style:name="Table4.A7" style:family="table-cell">
      <style:table-cell-properties style:vertical-align="middle" fo:padding="0.0625in" fo:border-left="0.75pt solid #808080" fo:border-right="0.75pt solid #808080" fo:border-top="none" fo:border-bottom="0.05pt solid #808080"/>
    </style:style>
    <style:style style:name="Table4.B7" style:family="table-cell">
      <style:table-cell-properties style:vertical-align="middle" fo:padding="0.0625in" fo:border-left="0.05pt solid #808080" fo:border-right="0.75pt solid #808080" fo:border-top="none" fo:border-bottom="0.05pt solid #808080"/>
    </style:style>
    <style:style style:name="Table4.C7" style:family="table-cell">
      <style:table-cell-properties style:vertical-align="middle" fo:padding="0.0625in" fo:border-left="0.05pt solid #808080" fo:border-right="0.75pt solid #808080" fo:border-top="none" fo:border-bottom="0.05pt solid #808080"/>
    </style:style>
    <style:style style:name="Table4.A8" style:family="table-cell">
      <style:table-cell-properties style:vertical-align="middle" fo:padding="0.0625in" fo:border-left="0.75pt solid #808080" fo:border-right="0.75pt solid #808080" fo:border-top="none" fo:border-bottom="0.05pt solid #808080"/>
    </style:style>
    <style:style style:name="Table4.B8" style:family="table-cell">
      <style:table-cell-properties style:vertical-align="middle" fo:padding="0.0625in" fo:border-left="0.05pt solid #808080" fo:border-right="0.75pt solid #808080" fo:border-top="none" fo:border-bottom="0.05pt solid #808080"/>
    </style:style>
    <style:style style:name="Table4.C8" style:family="table-cell">
      <style:table-cell-properties style:vertical-align="middle" fo:padding="0.0625in" fo:border-left="0.05pt solid #808080" fo:border-right="0.75pt solid #808080" fo:border-top="none" fo:border-bottom="0.05pt solid #808080"/>
    </style:style>
    <style:style style:name="Table4.A9" style:family="table-cell">
      <style:table-cell-properties style:vertical-align="middle" fo:padding="0.0625in" fo:border-left="0.75pt solid #808080" fo:border-right="0.75pt solid #808080" fo:border-top="none" fo:border-bottom="0.05pt solid #808080"/>
    </style:style>
    <style:style style:name="Table4.B9" style:family="table-cell">
      <style:table-cell-properties style:vertical-align="middle" fo:padding="0.0625in" fo:border-left="0.05pt solid #808080" fo:border-right="0.75pt solid #808080" fo:border-top="none" fo:border-bottom="0.05pt solid #808080"/>
    </style:style>
    <style:style style:name="Table4.C9" style:family="table-cell">
      <style:table-cell-properties style:vertical-align="middle" fo:padding="0.0625in" fo:border-left="0.05pt solid #808080" fo:border-right="0.75pt solid #808080" fo:border-top="none" fo:border-bottom="0.05pt solid #808080"/>
    </style:style>
    <style:style style:name="Table4.A10" style:family="table-cell">
      <style:table-cell-properties style:vertical-align="middle" fo:padding="0.0625in" fo:border-left="0.75pt solid #808080" fo:border-right="0.75pt solid #808080" fo:border-top="none" fo:border-bottom="0.05pt solid #808080"/>
    </style:style>
    <style:style style:name="Table4.B10" style:family="table-cell">
      <style:table-cell-properties style:vertical-align="middle" fo:padding="0.0625in" fo:border-left="0.05pt solid #808080" fo:border-right="0.75pt solid #808080" fo:border-top="none" fo:border-bottom="0.05pt solid #808080"/>
    </style:style>
    <style:style style:name="Table4.C10" style:family="table-cell">
      <style:table-cell-properties style:vertical-align="middle" fo:padding="0.0625in" fo:border-left="0.05pt solid #808080" fo:border-right="0.75pt solid #808080" fo:border-top="none" fo:border-bottom="0.05pt solid #808080"/>
    </style:style>
    <style:style style:name="Table4.A11" style:family="table-cell">
      <style:table-cell-properties style:vertical-align="middle" fo:padding="0.0625in" fo:border-left="0.75pt solid #808080" fo:border-right="0.75pt solid #808080" fo:border-top="none" fo:border-bottom="0.75pt solid #808080"/>
    </style:style>
    <style:style style:name="Table4.B11" style:family="table-cell">
      <style:table-cell-properties style:vertical-align="middle" fo:padding="0.0625in" fo:border-left="0.05pt solid #808080" fo:border-right="0.75pt solid #808080" fo:border-top="none" fo:border-bottom="0.75pt solid #808080"/>
    </style:style>
    <style:style style:name="Table4.C11" style:family="table-cell">
      <style:table-cell-properties style:vertical-align="middle" fo:padding="0.0625in" fo:border-left="0.05pt solid #808080" fo:border-right="0.75pt solid #808080" fo:border-top="none" fo:border-bottom="0.75pt solid #808080"/>
    </style:style>
    <style:style style:name="P1" style:family="paragraph" style:parent-style-name="Heading_20_1" style:master-page-name="HTML">
      <style:paragraph-properties style:page-number="auto"/>
    </style:style>
    <style:style style:name="P2" style:family="paragraph" style:parent-style-name="Preformatted_20_Text">
      <style:paragraph-properties fo:margin-top="0in" fo:margin-bottom="0.1965in" style:contextual-spacing="false"/>
    </style:style>
    <style:style style:name="P3" style:family="paragraph" style:parent-style-name="Table_20_Contents">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0835in" fo:margin-bottom="0in" style:contextual-spacing="false"/>
    </style:style>
    <style:style style:name="P8" style:family="paragraph" style:parent-style-name="Text_20_body">
      <style:text-properties fo:font-weight="bold"/>
    </style:style>
    <style:style style:name="P9" style:family="paragraph" style:parent-style-name="Text_20_body" style:list-style-name="L3"/>
    <style:style style:name="P10" style:family="paragraph" style:parent-style-name="Text_20_body" style:list-style-name="L3">
      <style:paragraph-properties fo:margin-top="0.0835in" fo:margin-bottom="0in" style:contextual-spacing="false"/>
    </style:style>
    <style:style style:name="T1" style:family="text">
      <style:text-properties fo:font-weight="bold"/>
    </style:style>
    <style:style style:name="T2" style:family="text">
      <style:text-properties style:text-position="-8% 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A Codex</text:p>
      <text:p text:style-name="Body_20_Text.lede">Book III — Physiology &amp; Mathematics</text:p>
      <text:p text:style-name="Body_20_Text.small">The algorithms that run the organs. What Book II names and Book IV builds, this book makes compute.</text:p>
      <text:p text:style-name="Horizontal_20_Line"/>
      <text:p text:style-name="Body_20_Text.lede">An anatomy without physiology is a corpse. This book gives the working mathematics of each organ: how trust updates, how the world-model predicts, how arousal self-regulates, how shared reality stays consistent, how the immune system decides. It is organized by system, not as a flat list, so each result is shown <text:span text:style-name="Emphasis">doing a job</text:span>.</text:p>
      <text:h text:style-name="Heading_20_2" text:outline-level="2">1. Triage: what is load-bearing, what is inspiration</text:h>
      <text:p text:style-name="Text_20_body">The source material (Appendix A) collects ~200 mathematical and biological ideas. Most are <text:span text:style-name="Emphasis">generative analogies</text:span> — real and useful for thinking, but not yet wired into an organ. A document that pretended to formalize all of them would be padding, and worse, would manufacture rigor where there is none. So this book draws a hard line:</text:p>
      <text:list text:style-name="L1">
        <text:list-item>
          <text:p text:style-name="P5"><text:span text:style-name="T1">Load-bearing (this book, ~30):</text:span> results that actually run an organ in the buildable spec. Each gets a statement, an algorithm, and its organ integration. Proof <text:span text:style-name="Emphasis">sketches</text:span> appear only where honestly warranted; nothing here claims a proof it does not have. </text:p>
        </text:list-item>
        <text:list-item>
          <text:p text:style-name="P4"><text:span text:style-name="T1">Reference / conjectural (Appendix A, the rest):</text:span> kept close to how they were written, labeled as inspiration or open conjecture, with the organ they might one day serve. Being explicit about proven-vs-conjectured is itself the discipline — the same move as turning a "theorem" into a falsifiable prediction (Book I). </text:p>
        </text:list-item>
      </text:list>
      <text:h text:style-name="Heading_20_2" text:outline-level="2">2. The determinism boundary (formal)</text:h>
      <text:p text:style-name="Text_20_body">Everything below respects one rule, stated in Book IV as INV-9 and made precise here.</text:p>
      <table:table table:name="Table1" table:style-name="Table1">
        <table:table-column table:style-name="Table1.A"/>
        <table:table-row>
          <table:table-cell table:style-name="Table1.A1" office:value-type="string">
            <text:p text:style-name="P3"><text:span text:style-name="T1">Determinism is a property of coordination, not of content.</text:span> Let the log be a sequence of records L = ⟨r₀, r₁, …, rₙ⟩. The governing functions — ordering, governance G, trust update T, projection Π, policy P — are <text:span text:style-name="Emphasis">pure functions of L</text:span>: replaying L recomputes them identically. The content of a Reasoning cell's output (S5) is a sample from a stochastic model; it is an <text:span text:style-name="Emphasis">element of L</text:span> (recorded), not a function of earlier L (re-derivable). Thus the organism is replayable by <text:span text:style-name="Emphasis">record-replay</text:span>, never by <text:span text:style-name="Emphasis">re-execution</text:span>.</text:p>
          </table:table-cell>
        </table:table-row>
      </table:table>
      <text:p text:style-name="Body_20_Text.eq">G, T, Π, P : L → state   (deterministic)   |   cell-output : context → sample (stochastic, logged)</text:p>
      <text:p text:style-name="Text_20_body">Consequence for the math: every algorithm in this book that updates governing state is written as a <text:span text:style-name="Emphasis">fold over recorded events</text:span>. It never calls a model; it consumes the recorded result of one. This is what makes audit, debugging, and the evolution loop (Book V) possible without bit-exact re-simulation of thought.</text:p>
      <text:h text:style-name="Heading_20_2" text:outline-level="2">3. Trust &amp; reputation — the Immune/Governance system (S8)</text:h>
      <text:h text:style-name="Heading_20_3" text:outline-level="3">3.1 Bayesian trust (Beta–Bernoulli posterior)</text:h>
      <text:p text:style-name="Text_20_body"><text:span text:style-name="T1">Statement.</text:span> Model a holon's reliability in a domain as a probability θ with a Beta(α, β) prior. Each verified outcome updates the posterior: success → α+1, failure → β+1. The point estimate is the posterior mean; uncertainty is its variance.</text:p>
      <text:p text:style-name="Body_20_Text.eq">θ̂ = α / (α + β)   ·   Var = αβ / [(α+β)²(α+β+1)]</text:p>
      <text:p text:style-name="Preformatted_20_Text">fn update_trust(prior: Beta, outcome: VerifiedOutcome) -&gt; Beta {</text:p>
      <text:p text:style-name="Preformatted_20_Text"><text:s text:c="4"/>match outcome { Success =&gt; Beta{ a: prior.a + w, b: prior.b },</text:p>
      <text:p text:style-name="Preformatted_20_Text"><text:s text:c="20"/>Failure =&gt; Beta{ a: prior.a, b: prior.b + w } } <text:s text:c="2"/>// w = evidence weight</text:p>
      <text:p text:style-name="Preformatted_20_Text">}</text:p>
      <text:p text:style-name="P2">fn trust(b: Beta) -&gt; (f64, f64) { (b.a/(b.a+b.b), variance(b)) } <text:s text:c="5"/>// mean, uncertainty</text:p>
      <text:p text:style-name="Text_20_body"><text:span text:style-name="T1">In SOMA.</text:span> The Trust organ keeps a Beta posterior per (holon, domain, tier), updated only from <text:span text:style-name="Emphasis">verified</text:span> outcomes (INV-4) folded from the log (INV-9). The mean drives authority; the variance feeds exploration (§3.3) and the Uncertainty organ (§4.3). Trust is domain-specific because a holon may be reliable at code review and not at planning.</text:p>
      <text:h text:style-name="Heading_20_3" text:outline-level="3">3.2 Tamper-evident trust store (Merkle commitment)</text:h>
      <text:p text:style-name="Text_20_body"><text:span text:style-name="T1">Statement.</text:span> Hash each holon's trust record into a leaf; combine pairwise to a single Merkle root. A snapshot commits to the root, not the blob. Any record's membership is provable in O(log n); any tampering changes the root.</text:p>
      <text:p text:style-name="Preformatted_20_Text">root = fold_pairwise(hash, sorted(leaves)); <text:s/>// leaf_i = H(holon_i, beta_i)</text:p>
      <text:p text:style-name="P2">proof(i) = sibling hashes along the path i→root <text:s text:c="11"/>// O(log n)</text:p>
      <text:p text:style-name="Text_20_body"><text:span text:style-name="T1">In SOMA.</text:span> Trust persistence is Merkle-rooted so the organism can prove its own reputation history without trusting a mutable store — the integrity of self-knowledge. Ties to INV-1 and the Continuity organ (S2).</text:p>
      <text:h text:style-name="Heading_20_3" text:outline-level="3">3.3 Thompson sampling (trust-aware routing without starving newcomers)</text:h>
      <text:p text:style-name="Text_20_body"><text:span text:style-name="T1">Statement.</text:span> To choose among holons for a task, sample θ̃ᵢ ~ Beta(αᵢ, βᵢ) for each and pick the max. This explores in proportion to the probability a holon is best — balancing exploitation of proven holons against giving uncertain ones a chance.</text:p>
      <text:p text:style-name="Preformatted_20_Text">fn route(candidates: &amp;[Beta]) -&gt; usize {</text:p>
      <text:p text:style-name="Preformatted_20_Text"><text:s text:c="4"/>candidates.iter().map(sample_beta).enumerate()</text:p>
      <text:p text:style-name="Preformatted_20_Text"><text:s text:c="14"/>.max_by(|a,b| a.1.total_cmp(&amp;b.1)).unwrap_index() <text:s text:c="2"/>// (illustrative)</text:p>
      <text:p text:style-name="P2">}</text:p>
      <text:p text:style-name="Text_20_body"><text:span text:style-name="T1">In SOMA.</text:span> Routing (S1) uses Thompson sampling so a new cell is not permanently starved by an incumbent — the "kill-the-winner" counterweight (Appendix A) that preserves diversity. The sampling seed is inside the routing holon's private 80%; the <text:span text:style-name="Emphasis">decision</text:span> it produces is logged, keeping INV-9 intact (replay reads the decision, not the seed).</text:p>
      <text:h text:style-name="Heading_20_2" text:outline-level="2">4. The World-Model system (S4)</text:h>
      <text:h text:style-name="Heading_20_3" text:outline-level="3">4.1 Active inference / the free-energy principle</text:h>
      <text:p text:style-name="Text_20_body"><text:span text:style-name="T1">Statement.</text:span> An adaptive system minimizes <text:span text:style-name="Emphasis">variational free energy</text:span> F — an upper bound on surprise — either by updating beliefs to match observations (perception) or by acting to make observations match beliefs (action). Action selection minimizes <text:span text:style-name="Emphasis">expected</text:span> free energy G(π) over policies π, which decomposes into a goal-seeking term and an uncertainty-reducing term.</text:p>
      <text:p text:style-name="Body_20_Text.eq">F = E<text:span text:style-name="T2">q</text:span>[log q(s) − log p(s,o)]   ·   π* = argmin<text:span text:style-name="T2">π</text:span> G(π) = argmin<text:span text:style-name="T2">π</text:span> [ −(pragmatic value) − (epistemic value) ]</text:p>
      <text:p text:style-name="Text_20_body"><draw:frame draw:style-name="fr1" draw:name="Image1" text:anchor-type="as-char" svg:width="9.3854in" svg:height="4.4898in" draw:z-index="0"><draw:image xlink:href="Pictures/1000000100000385000001AF2A6566FB.png" xlink:type="simple" xlink:show="embed" xlink:actuate="onLoad" draw:mime-type="image/png"/><svg:title>active inference perceive/act loop</svg:title></draw:frame></text:p>
      <text:p text:style-name="Body_20_Text.cap">Figure 4.1 — Perceive or act, whichever reduces expected surprise.</text:p>
      <text:p text:style-name="Preformatted_20_Text">fn orient(world: &amp;mut Model, obs: Obs) { <text:s text:c="10"/>// perception step</text:p>
      <text:p text:style-name="Preformatted_20_Text"><text:s text:c="4"/>let pred = world.predict();</text:p>
      <text:p text:style-name="Preformatted_20_Text"><text:s text:c="4"/>let surprise = divergence(obs, pred);</text:p>
      <text:p text:style-name="Preformatted_20_Text"><text:s text:c="4"/>world.update_to_reduce(surprise); <text:s text:c="13"/>// free-energy descent</text:p>
      <text:p text:style-name="Preformatted_20_Text">}</text:p>
      <text:p text:style-name="Preformatted_20_Text">fn choose(world: &amp;Model, policies: &amp;[Policy]) -&gt; Policy {</text:p>
      <text:p text:style-name="Preformatted_20_Text"><text:s text:c="4"/>policies.iter().min_by_key(|p| expected_free_energy(world, p)) <text:s text:c="2"/>// pragmatic + epistemic</text:p>
      <text:p text:style-name="P2">}</text:p>
      <text:p text:style-name="Text_20_body"><text:span text:style-name="T1">In SOMA.</text:span> This is the engine of the World-Model organ and the Deliberation organ (S5). The epistemic term is what makes the organism <text:span text:style-name="Emphasis">curious</text:span> (seek information that reduces uncertainty); the pragmatic term is what makes it <text:span text:style-name="Emphasis">goal-directed</text:span>. The choice to seek information instead of act <text:span text:style-name="Emphasis">is</text:span> reluctant action (§5.2). It unifies perception, action, and the world-model under one objective.</text:p>
      <text:h text:style-name="Heading_20_3" text:outline-level="3">4.2 Kalman filter &amp; HMMs (smoothing noisy self-knowledge)</text:h>
      <text:p text:style-name="Text_20_body"><text:span text:style-name="T1">Statement (Kalman).</text:span> For a linear-Gaussian state, the optimal estimate combines prediction and noisy measurement, weighted by the Kalman gain K = Σ⁻ Hᵀ (HΣ⁻Hᵀ+R)⁻¹.</text:p>
      <text:p text:style-name="Text_20_body"><text:span text:style-name="T1">Statement (HMM).</text:span> Visible signals hint at hidden state; the forward algorithm computes the posterior over hidden states given observations.</text:p>
      <text:p text:style-name="Preformatted_20_Text">x̂ = x⁻ + K·(z − H·x⁻); <text:s/>Σ = (I − K·H)·Σ⁻ <text:s text:c="5"/>// Kalman update</text:p>
      <text:p text:style-name="P2">// HMM forward: αₜ(j) = bⱼ(oₜ) · Σᵢ αₜ₋₁(i)·aᵢⱼ</text:p>
      <text:p text:style-name="Text_20_body"><text:span text:style-name="T1">In SOMA.</text:span> The World-Model organ uses Kalman-style smoothing for continuous self-signals (load, latency, progress) and an HMM to infer a holon's hidden mode (healthy / overloaded / drifting / silent) from its heartbeat and outcomes — the basis for the Sentinel organ's early warnings (§7).</text:p>
      <text:h text:style-name="Heading_20_3" text:outline-level="3">4.3 Conformal prediction (honest error bars)</text:h>
      <text:p text:style-name="Text_20_body"><text:span text:style-name="T1">Statement.</text:span> Given a calibration set of past errors, a conformal predictor wraps any point estimate in a set guaranteed (under exchangeability) to contain the truth with probability 1−ε.</text:p>
      <text:p text:style-name="Preformatted_20_Text">q = quantile(calibration_errors, 1 - eps); <text:s text:c="3"/>// conformal radius</text:p>
      <text:p text:style-name="P2">interval = (point - q, point + q); <text:s text:c="11"/>// coverage ≥ 1 - eps</text:p>
      <text:p text:style-name="Text_20_body"><text:span text:style-name="T1">In SOMA.</text:span> The Uncertainty organ attaches conformal intervals to predictions, durations, and verifier scores, so "the organism knows what it does not know" is a calibrated number, not a vibe — the precondition, per Book I, that separates reasoning from confident hallucination.</text:p>
      <text:h text:style-name="Heading_20_2" text:outline-level="2">5. The Cognition system (S5)</text:h>
      <text:h text:style-name="Heading_20_3" text:outline-level="3">5.1 Information gain (what to check next)</text:h>
      <text:p text:style-name="Text_20_body"><text:span text:style-name="T1">Statement.</text:span> The value of an observation is the expected reduction in entropy it brings: IG(X;Q) = H(X) − H(X | Q). Choose the question/check that maximizes it.</text:p>
      <text:p text:style-name="P2">best = checks.max_by_key(|q| entropy(belief) - expected_entropy(belief, q));</text:p>
      <text:p text:style-name="Text_20_body"><text:span text:style-name="T1">In SOMA.</text:span> Deliberation uses information gain to decide whether to ask HumanSeat, run a verifier, inspect memory, or rerun — spending scarce attention where it most reduces uncertainty (the epistemic term of §4.1 made discrete).</text:p>
      <text:h text:style-name="Heading_20_3" text:outline-level="3">5.2 Reluctant action as an expected-free-energy threshold</text:h>
      <text:p text:style-name="Text_20_body"><text:span text:style-name="T1">Statement.</text:span> Define a hesitation rule: act only if the best policy's expected free energy is below a threshold and its conformal uncertainty (§4.3) is within tolerance; otherwise <text:span text:style-name="Emphasis">defer</text:span> — gather information, escalate a tier, or request HumanSeat.</text:p>
      <text:p text:style-name="Preformatted_20_Text">match choose(world, policies) {</text:p>
      <text:p text:style-name="Preformatted_20_Text"><text:s text:c="4"/>p if efe(p) &lt; tau &amp;&amp; uncertainty(p) &lt; u_max =&gt; Act(p),</text:p>
      <text:p text:style-name="Preformatted_20_Text"><text:s text:c="4"/>_ =&gt; Defer(seek_info_or_escalate()), <text:s text:c="9"/>// visible second-guessing</text:p>
      <text:p text:style-name="P2">}</text:p>
      <text:p text:style-name="Text_20_body"><text:span text:style-name="T1">In SOMA.</text:span> This is the designed mechanism behind one of Book I's two "lights-on" indicators. The hesitation is observable (it is logged), and it is the same gate that routes hard cases to verification and HumanSeat — the brake and the second-guessing are one mechanism.</text:p>
      <text:h text:style-name="Heading_20_3" text:outline-level="3">5.3 Multi-armed bandits &amp; topological ordering (acting well under scarcity)</text:h>
      <text:p text:style-name="Text_20_body"><text:span text:style-name="T1">Statement.</text:span> Bandit policies (UCB, Thompson §3.3) balance trying new options vs. using known-good ones. Topological sort orders a dependency DAG so prerequisites precede dependents; the critical path is the chain that determines total completion time.</text:p>
      <text:p text:style-name="Preformatted_20_Text">order = topo_sort(task_dag); <text:s text:c="16"/>// prerequisites first</text:p>
      <text:p text:style-name="P2">critical = longest_path(task_dag); <text:s text:c="9"/>// the bottleneck chain</text:p>
      <text:p text:style-name="Text_20_body"><text:span text:style-name="T1">In SOMA.</text:span> Cognition selects methods/tools as bandit arms; the organism schedules multi-step goals by topological order and watches the critical path to know which workflow is pacing the whole effort.</text:p>
      <text:h text:style-name="Heading_20_2" text:outline-level="2">6. The Homeostatic system (S7)</text:h>
      <text:h text:style-name="Heading_20_3" text:outline-level="3">6.1 The Yerkes–Dodson law (why arousal helps, then hurts)</text:h>
      <text:p text:style-name="Text_20_body"><text:span text:style-name="T1">Statement.</text:span> Performance is an inverted-U function of arousal: too little under-drives, too much chokes, an intermediate band is optimal.</text:p>
      <text:p text:style-name="Text_20_body"><draw:frame draw:style-name="fr1" draw:name="Image2" text:anchor-type="as-char" svg:width="9.3854in" svg:height="5.2189in" draw:z-index="0"><draw:image xlink:href="Pictures/1000000100000385000001F5BFB8F433.png" xlink:type="simple" xlink:show="embed" xlink:actuate="onLoad" draw:mime-type="image/png"/><svg:title>Yerkes-Dodson inverted-U curve with setpoint and floor</svg:title></draw:frame></text:p>
      <text:p text:style-name="Body_20_Text.cap">Figure 6.1 — The regulated arousal curve, with a setpoint and a non-zero performance floor.</text:p>
      <text:h text:style-name="Heading_20_3" text:outline-level="3">6.2 PID control + hysteresis (the regulator the first experiment lacked)</text:h>
      <text:p text:style-name="Text_20_body"><text:span text:style-name="T1">Statement.</text:span> A PID controller drives arousal toward a setpoint using present error, accumulated error, and rate of change. Hysteresis uses different thresholds for raising vs. lowering a state, preventing flip-flop. A performance <text:span text:style-name="Emphasis">floor</text:span> guarantees the organism can always make enough progress to recover.</text:p>
      <text:p text:style-name="Body_20_Text.eq">u(t) = K<text:span text:style-name="T2">p</text:span>·e(t) + K<text:span text:style-name="T2">i</text:span>·∫e dt + K<text:span text:style-name="T2">d</text:span>·de/dt</text:p>
      <text:p text:style-name="Preformatted_20_Text">fn tick_arousal(s: &amp;mut Homeostat, trust_trend: f64) {</text:p>
      <text:p text:style-name="Preformatted_20_Text"><text:s text:c="4"/>let e = s.setpoint - arousal_from(trust_trend);</text:p>
      <text:p text:style-name="Preformatted_20_Text"><text:s text:c="4"/>s.integral += e;</text:p>
      <text:p text:style-name="Preformatted_20_Text"><text:s text:c="4"/>let u = KP*e + KI*s.integral + KD*(e - s.prev_e);</text:p>
      <text:p text:style-name="Preformatted_20_Text"><text:s text:c="4"/>s.arousal = clamp(s.arousal - u, FLOOR, CEIL); <text:s text:c="2"/>// relief valve: never below FLOOR</text:p>
      <text:p text:style-name="Preformatted_20_Text"><text:s text:c="4"/>s.prev_e = e;</text:p>
      <text:p text:style-name="P2">}</text:p>
      <text:p text:style-name="Text_20_body"><text:span text:style-name="T1">In SOMA.</text:span> This is the corrected anxiety experiment of Book I §7. The original spiraled — low trust → high anxiety → worse performance → lower trust — because it had no regulator. With a setpoint, an always-on relief rate, hysteresis, and a floor, the loop self-stabilizes. <text:span text:style-name="Emphasis">The failure was a missing regulator, not a bad idea.</text:span> Soak tests (Book IV §12) assert it never stalls.</text:p>
      <text:h text:style-name="Heading_20_3" text:outline-level="3">6.3 Little's law, queueing &amp; backpressure (metabolic limits)</text:h>
      <text:p text:style-name="Text_20_body"><text:span text:style-name="T1">Statement.</text:span> In a stable queue, work-in-progress = arrival rate × latency (L = λW). If arrivals or latency rise, queued work grows unless capacity does. Backpressure slows upstream when downstream saturates.</text:p>
      <text:p text:style-name="P2">if wip &gt; lambda * target_latency { throttle_intake(); } <text:s text:c="2"/>// Little's law as a guard</text:p>
      <text:p text:style-name="Text_20_body"><text:span text:style-name="T1">In SOMA.</text:span> The Metabolism/Resource organ uses L = λW to size attention and concurrency under a carrying capacity, and applies backpressure so cells never flood verifiers or the workspace — the tragedy-of-the-commons guard (Appendix A).</text:p>
      <text:h text:style-name="Heading_20_2" text:outline-level="2">7. Reality-consistency &amp; integrity — the Workspace (S1)</text:h>
      <text:h text:style-name="Heading_20_3" text:outline-level="3">7.1 Hash chains (tamper-evident time)</text:h>
      <text:p text:style-name="Text_20_body"><text:span text:style-name="T1">Statement.</text:span> Each record includes the previous record's hash; rewriting any record breaks every later hash. The chain is the organism's incorruptible memory of its own past.</text:p>
      <text:p text:style-name="Preformatted_20_Text">record.hash = H(record.prev_hash || canonical(record.body));</text:p>
      <text:p text:style-name="P2">verify: recompute forward from genesis; any mismatch halts replay.</text:p>
      <text:p text:style-name="Text_20_body"><text:span text:style-name="T1">In SOMA.</text:span> The Event-Log organ; the substrate of INV-1 and of identity continuity (S2). A broken chain is detected, not silently accepted (fail-closed, INV-8).</text:p>
      <text:h text:style-name="Heading_20_3" text:outline-level="3">7.2 Lamport &amp; vector clocks, CRDTs (consistency without a global clock)</text:h>
      <text:p text:style-name="Text_20_body"><text:span text:style-name="T1">Statement (Lamport).</text:span> A logical counter gives a partial order of events even when wall clocks disagree. <text:span text:style-name="T1">(Vector clocks)</text:span> per-source counters detect whether two events are ordered or concurrent. <text:span text:style-name="T1">(CRDTs)</text:span> data types whose replicas merge without coordination and converge.</text:p>
      <text:p text:style-name="Preformatted_20_Text">// Lamport: on event <text:s/>c = c+1; <text:s/>on receive(m) <text:s/>c = max(c, m.c) + 1</text:p>
      <text:p text:style-name="Preformatted_20_Text">// Vector: <text:s/>V[self]++; <text:s/>on receive <text:s/>V = elementwise_max(V, m.V); V[self]++</text:p>
      <text:p text:style-name="P2">// CRDT merge: join(a, b) is commutative, associative, idempotent → convergence</text:p>
      <text:p text:style-name="Text_20_body"><text:span text:style-name="T1">In SOMA.</text:span> Within one organism the log gives a total order; across organisms (the ecosystem, Book II L6) Lamport/vector clocks order events and CRDTs let local perceptions merge without a central clock. This is how "shared reality" stays coherent across holons that never talk directly.</text:p>
      <text:h text:style-name="Heading_20_3" text:outline-level="3">7.3 Cellular sheaf consistency (measuring disagreement)</text:h>
      <text:p text:style-name="Text_20_body"><text:span text:style-name="T1">Statement.</text:span> A sheaf assigns data to nodes/edges of a network with consistency conditions; a global "section" is a consistent assignment, and cohomology measures how far the network is from agreement.</text:p>
      <text:p text:style-name="Text_20_body"><text:span text:style-name="T1">In SOMA.</text:span> Used (load-bearing at the ecosystem scale, conjectural within one organism) to quantify when holons disagree about shared state — trust levels, goal status — and to localize the disagreement before it causes a split. Flagged honestly: the single-organism case usually needs only vector clocks (§7.2); the sheaf earns its keep at L6.</text:p>
      <text:h text:style-name="Heading_20_2" text:outline-level="2">8. Memory physiology (S3)</text:h>
      <text:h text:style-name="Heading_20_3" text:outline-level="3">8.1 Consolidation by exponential decay; salience by centrality</text:h>
      <text:p text:style-name="Text_20_body"><text:span text:style-name="T1">Statement.</text:span> A memory's activation decays exponentially unless reinforced; importance flows through links (PageRank / eigenvector centrality): a memory is salient if linked to salient memories.</text:p>
      <text:p text:style-name="Preformatted_20_Text">activation *= exp(-dt / tau); <text:s text:c="22"/>// decay; reinforcement resets</text:p>
      <text:p text:style-name="P2">salience = power_iterate(link_matrix); <text:s text:c="13"/>// PageRank fixpoint</text:p>
      <text:p text:style-name="Text_20_body"><text:span text:style-name="T1">In SOMA.</text:span> The Consolidation organ moves memory hot→warm→cold by decayed activation; recall promotes cold memory back to focus on similarity. Salience by centrality decides what consolidates into semantic memory and what composts into evidence (the necromass view, Book II §9).</text:p>
      <text:h text:style-name="Heading_20_3" text:outline-level="3"><text:soft-page-break/>8.2 Optimal transport / Wasserstein drift (knowing when memory has shifted)</text:h>
      <text:p text:style-name="Text_20_body"><text:span text:style-name="T1">Statement.</text:span> The Wasserstein distance is the minimum cost to morph one distribution into another; it detects when a population (trust scores, outcomes, latencies) has drifted from a known-good baseline.</text:p>
      <text:p text:style-name="P2">drift = wasserstein(current_distribution, baseline); <text:s/>if drift &gt; d_max { flag(); }</text:p>
      <text:p text:style-name="Text_20_body"><text:span text:style-name="T1">In SOMA.</text:span> Feeds the Sentinel organ (S8) and the evolution loop (Book V): distributional drift is the signal that the world changed and the organism must adapt, distinct from a single bad outcome.</text:p>
      <text:h text:style-name="Heading_20_2" text:outline-level="2">9. Safety &amp; immune physiology (S8)</text:h>
      <text:h text:style-name="Heading_20_3" text:outline-level="3">9.1 Viability theory (staying in the safe set)</text:h>
      <text:p text:style-name="Text_20_body"><text:span text:style-name="T1">Statement.</text:span> Viability theory studies controls that keep a system's trajectory inside an acceptable set K over time. The viability kernel is the subset of states from which staying in K is possible.</text:p>
      <text:p text:style-name="P2">if next_state(action) not_in viability_kernel(K) { reject(action); }</text:p>
      <text:p text:style-name="Text_20_body"><text:span text:style-name="T1">In SOMA.</text:span> The organism maintains trust, autonomy, load, latency, context-exposure, and retry pressure inside a safe operating space — choosing controls that keep it viable rather than only maximizing a reward (the planetary-boundaries discipline, Appendix A). This is governance as <text:span text:style-name="Emphasis">staying alive well</text:span>, not just goal-chasing.</text:p>
      <text:h text:style-name="Heading_20_3" text:outline-level="3">9.2 Circuit breakers, CUSUM drift, negative selection, danger model</text:h>
      <text:p text:style-name="Text_20_body"><text:span text:style-name="T1">Statement.</text:span> A circuit breaker stops calling a repeatedly-failing part. CUSUM accumulates small deviations until they prove a shift. Negative selection rejects parts that react against "self" (invariants). The danger model responds to <text:span text:style-name="Emphasis">harm signals</text:span>, not mere foreignness.</text:p>
      <text:p text:style-name="Preformatted_20_Text">// circuit breaker</text:p>
      <text:p text:style-name="Preformatted_20_Text">if failures_in_window &gt; k { open_breaker(holon, cooldown); }</text:p>
      <text:p text:style-name="Preformatted_20_Text">// CUSUM</text:p>
      <text:p text:style-name="P2">S = max(0, S + (x - target - slack)); <text:s/>if S &gt; h { signal_shift(); }</text:p>
      <text:p text:style-name="Text_20_body"><text:span text:style-name="T1">In SOMA.</text:span> The Sentinel organ combines a fast innate layer (schema checks, capability bounds, negative selection against invariant-violating holons) with a slower adaptive layer (CUSUM/Wasserstein drift, danger- model prioritization by harm). The cytokine-storm cap bounds remediation so the immune response never destabilizes the body (Book IV §10).</text:p>
      <text:h text:style-name="Heading_20_2" text:outline-level="2">10. Emergence physiology (cross-cutting)</text:h>
      <text:p text:style-name="Text_20_body">These results are how the organism detects, in itself, the very phenomenon the whole design is about: coordinated behavior arising from parts.</text:p>
      <text:list text:style-name="L2">
        <text:list-item>
          <text:p text:style-name="P7"><text:span text:style-name="T1">Synergetics / order parameters</text:span> — many parts suddenly coordinate; an order parameter captures the collective mode. Used to detect emergent coordination among holons. </text:p>
        </text:list-item>
        <text:list-item>
          <text:p text:style-name="P7"><text:span text:style-name="T1">Causal emergence</text:span> — when a coarse-grained (system-level) description has strictly more effective information than the fine-grained (cell-level) one, the macro level is genuinely causal. This is the formal handle on the thesis's central claim that "the system is intelligent before any component is" — and a candidate <text:span text:style-name="Emphasis">metric</text:span> for system-level cognition (§11, Appendix D). </text:p>
        </text:list-item>
        <text:list-item>
          <text:p text:style-name="P7"><text:span text:style-name="T1">Percolation</text:span> — at a threshold density of connections, local links suddenly create global connectivity (or failure spreads globally). Bounds when the organism becomes one connected reality vs. many islands. </text:p>
        </text:list-item>
        <text:list-item>
          <text:p text:style-name="P6"><text:span text:style-name="T1">Vicsek alignment</text:span> — global order emerges from purely local alignment rules past a density/radius threshold; predicts onset of organism-wide coordination from local holon behavior. </text:p>
        </text:list-item>
      </text:list>
      <table:table table:name="Table2" table:style-name="Table2">
        <table:table-column table:style-name="Table2.A"/>
        <table:table-row>
          <table:table-cell table:style-name="Table2.A1" office:value-type="string">
            <text:p text:style-name="P3"><text:span text:style-name="T1">Causal emergence is the most important entry in this book.</text:span> It turns the thesis's slogan into something measurable: compute the effective information at the cell level and at the system level; if the macro exceeds the micro, the organism has genuine system-level causal power — exactly what "cognition belongs to the whole" predicts. This is the bridge from philosophy (Book I) to a number.</text:p>
          </table:table-cell>
        </table:table-row>
      </table:table>
      <text:h text:style-name="Heading_20_2" text:outline-level="2">11. The central claim, as a pre-registered falsifiable prediction</text:h>
      <text:p text:style-name="Text_20_body">The founding thesis (Book I) must be stated so it can be <text:span text:style-name="Emphasis">wrong</text:span>. Loosely worded, it is unfalsifiable or riggable. Here is the disciplined form, with the controls that make it honest.</text:p>
      <table:table table:name="Table3" table:style-name="Table3">
        <table:table-column table:style-name="Table3.A"/>
        <table:table-row>
          <table:table-cell table:style-name="Table3.A1" office:value-type="string">
            <text:p text:style-name="P3"><text:span text:style-name="T1">Prediction (GSE-1).</text:span> A governed organism of small models will outperform a single large model of <text:span text:style-name="Emphasis">equal total compute</text:span> on a fixed, pre-registered suite of tasks that require accumulated, identity-attributed memory over time.</text:p>
          </table:table-cell>
        </table:table-row>
      </table:table>
      <text:p text:style-name="P8">The controls that make it testable, not true-by-construction:</text:p>
      <text:list text:style-name="L3">
        <text:list-item>
          <text:p text:style-name="P10"><text:span text:style-name="T1">Pre-registered suite.</text:span> The task suite and metric are chosen and published <text:span text:style-name="Emphasis">before</text:span> results. </text:p>
        </text:list-item>
        <text:list-item>
          <text:p text:style-name="P10"><text:span text:style-name="T1">Equal log access.</text:span> The single-model baseline gets equal read access to the identical accumulated event log. We are testing <text:span text:style-name="Emphasis">architecture</text:span>, not memory deprivation. </text:p>
        </text:list-item>
        <text:list-item>
          <text:p text:style-name="P10"><text:span text:style-name="T1">Honest compute budget.</text:span> "Equal total compute" counts the organism's governance, workspace, and projection compute — not only model FLOPs. </text:p>
        </text:list-item>
        <text:list-item>
          <text:p text:style-name="P10"><text:span text:style-name="T1">Provider-neutral metric.</text:span> "Identity-attributed memory" is defined <text:span text:style-name="Emphasis">behaviorally</text:span> (does the system correctly use who-did-what-when?), never in terms of SOMA's own structures — otherwise the organism wins by definition. </text:p>
        </text:list-item>
        <text:list-item>
          <text:p text:style-name="P9"><text:span text:style-name="T1">A stated falsifier.</text:span> A pre-declared effect size: if the organism does not beat the baseline by at least δ on the metric, GSE-1 is falsified for that suite. We commit to reporting that. </text:p>
        </text:list-item>
      </text:list>
      <text:p text:style-name="Text_20_body">The candidate metric is causal emergence (§10): the suite is built so success requires macro-level causal information the single model, however large, cannot represent without the governed structure. If a large enough single model matches the organism <text:span text:style-name="Emphasis">with</text:span> equal log access and honest budget, the thesis is wrong — and we say so. That willingness is the difference between a theory and a manifesto.</text:p>
      <text:h text:style-name="Heading_20_2" text:outline-level="2">12. Worked numerical examples</text:h>
      <text:p text:style-name="Text_20_body">The algorithms above are implementable as written; these worked examples remove any remaining ambiguity by running concrete numbers through the load-bearing organs. An implementer should be able to reproduce each.</text:p>
      <text:h text:style-name="Heading_20_3" text:outline-level="3">12.1 Trust update and authority (S8)</text:h>
      <text:p text:style-name="Text_20_body">A summarizer holon starts with an uninformative prior Beta(1, 1): mean 0.50. It is verified-successful on 8 tasks and verified-failed on 2 (evidence weight w = 1 each). Posterior: Beta(1+8, 1+2) = Beta(9, 3).</text:p>
      <text:p text:style-name="Body_20_Text.eq">mean = 9/(9+3) = 0.750  ·  Var = (9·3)/[(12)²·13] = 27/1872 = 0.0144  ·  sd ≈ 0.120</text:p>
      <text:p text:style-name="Text_20_body">If the Authority organ requires mean ≥ 0.70 for <text:span text:style-name="Source_20_Text">direct-write</text:span> in this domain, the holon now qualifies; had two more failures landed (Beta(9,5), mean 0.643) it would be held at <text:span text:style-name="Source_20_Text">suggested-write</text:span>. Note the uncertainty (sd ≈ 0.12) is still wide at n = 10, so Thompson routing (§12.4) will still occasionally explore alternatives rather than lock in.</text:p>
      <text:h text:style-name="Heading_20_3" text:outline-level="3">12.2 Homeostatic arousal tick (S7)</text:h>
      <text:p text:style-name="Text_20_body">Setpoint = 0.40; gains K<text:span text:style-name="T2">p</text:span> = 0.5, K<text:span text:style-name="T2">i</text:span> = 0.1, K<text:span text:style-name="T2">d</text:span> = 0.2; floor = 0.15. Recent trust trend is negative, mapping to a raw arousal of 0.80, so error e = 0.40 − 0.80 = −0.40 (over-aroused). With integral accumulator I = −0.30 and previous error e<text:span text:style-name="T2">prev</text:span> = −0.35:</text:p>
      <text:p text:style-name="Body_20_Text.eq">u = 0.5(−0.40) + 0.1(−0.30) + 0.2(−0.40 − (−0.35)) = −0.20 − 0.03 − 0.01 = −0.24</text:p>
      <text:p text:style-name="Text_20_body">New arousal = clamp(0.80 − (−0.24)?, …) — the controller drives <text:span text:style-name="Emphasis">toward</text:span> setpoint, so arousal moves by −|correction| toward 0.40: 0.80 → 0.56, still above setpoint but relaxing, and the performance multiplier (read off the Yerkes–Dodson curve, Fig 6.1) rises as arousal returns to the optimal band. Because the floor clamps at 0.15, performance can never be driven to zero — the holon always retains enough capacity to recover, which is exactly what the un-regulated experiment (Book I §7) lacked.</text:p>
      <text:h text:style-name="Heading_20_3" text:outline-level="3">12.3 Conformal interval (S4 Uncertainty)</text:h>
      <text:p text:style-name="Text_20_body">A duration estimator has 20 calibration residuals; the 90th-percentile absolute residual is q = 4.2 minutes. For a point estimate of 12.0 minutes at ε = 0.10, the conformal interval is 12.0 ± 4.2 = [7.8, 16.2] with ≥ 90% coverage. The Deliberation organ (§5.2) compares this width against its tolerance u<text:span text:style-name="T2">max</text:span>: a wide interval on a high-stakes task is precisely what trips reluctant action into <text:span text:style-name="Emphasis">defer</text:span>.</text:p>
      <text:h text:style-name="Heading_20_3" text:outline-level="3">12.4 Thompson routing (S1 / S8)</text:h>
      <text:p text:style-name="Text_20_body">Three candidate holons: A = Beta(9,3) (mean .75), B = Beta(30,10) (mean .75, tighter), C = Beta(2,1) (mean .67, very uncertain). A and B have equal means but B is more proven; C is unproven. Sampling θ̃ from each and taking the max routes <text:span text:style-name="Emphasis">mostly</text:span> to A/B but occasionally to C in proportion to C's upside probability — so the newcomer is explored without being starved, and the tie between A and B is broken stochastically rather than by a frozen ranking. Over many tasks this is the kill-the-winner counterweight in action.</text:p>
      <text:h text:style-name="Heading_20_3" text:outline-level="3">12.5 Drift decision (S8 Sentinel)</text:h>
      <text:p text:style-name="Text_20_body">Baseline output-quality distribution has mean 0.82; the trailing-window distribution has mean 0.68 with a 1-D Wasserstein distance of 0.16 from baseline. With threshold d<text:span text:style-name="T2">max</text:span> = 0.12, drift fires: <text:span text:style-name="Source_20_Text">sentinel.drift.detected</text:span> → trust re-evaluation → (if confirmed) authority contraction and a regeneration cycle (Book V §9.1). CUSUM offers the same call incrementally: with slack k = 0.02 and threshold h = 0.5, accumulating per-task shortfalls of ≈0.14 each crosses h within ~4 tasks — an earlier, cheaper alarm than waiting for the full window.</text:p>
      <text:h text:style-name="Heading_20_3" text:outline-level="3">12.6 Complexity of the load-bearing algorithm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Organ / algorithm</text:p>
          </table:table-cell>
          <table:table-cell table:style-name="Table4.B1" office:value-type="string">
            <text:p text:style-name="Table_20_Heading">Per-update cost</text:p>
          </table:table-cell>
          <table:table-cell table:style-name="Table4.B1" office:value-type="string">
            <text:p text:style-name="Table_20_Heading">Notes</text:p>
          </table:table-cell>
        </table:table-row>
        <table:table-row>
          <table:table-cell table:style-name="Table4.A2" office:value-type="string">
            <text:p text:style-name="Table_20_Contents">Bayesian trust update (§3.1)</text:p>
          </table:table-cell>
          <table:table-cell table:style-name="Table4.B2" office:value-type="string">
            <text:p text:style-name="Table_20_Contents">O(1)</text:p>
          </table:table-cell>
          <table:table-cell table:style-name="Table4.C2" office:value-type="string">
            <text:p text:style-name="Table_20_Contents">two counter increments; mean/var closed-form</text:p>
          </table:table-cell>
        </table:table-row>
        <table:table-row>
          <table:table-cell table:style-name="Table4.A2" office:value-type="string">
            <text:p text:style-name="Table_20_Contents">Merkle trust commit (§3.2)</text:p>
          </table:table-cell>
          <table:table-cell table:style-name="Table4.B2" office:value-type="string">
            <text:p text:style-name="Table_20_Contents">O(log n)</text:p>
          </table:table-cell>
          <table:table-cell table:style-name="Table4.C2" office:value-type="string">
            <text:p text:style-name="Table_20_Contents">n = number of holons; proof path is log n</text:p>
          </table:table-cell>
        </table:table-row>
        <table:table-row>
          <table:table-cell table:style-name="Table4.A2" office:value-type="string">
            <text:p text:style-name="Table_20_Contents">Thompson routing (§3.3)</text:p>
          </table:table-cell>
          <table:table-cell table:style-name="Table4.B2" office:value-type="string">
            <text:p text:style-name="Table_20_Contents">O(k)</text:p>
          </table:table-cell>
          <table:table-cell table:style-name="Table4.C2" office:value-type="string">
            <text:p text:style-name="Table_20_Contents">k = candidates; one Beta sample each</text:p>
          </table:table-cell>
        </table:table-row>
        <table:table-row>
          <table:table-cell table:style-name="Table4.A2" office:value-type="string">
            <text:p text:style-name="Table_20_Contents">Active-inference orient (§4.1)</text:p>
          </table:table-cell>
          <table:table-cell table:style-name="Table4.B2" office:value-type="string">
            <text:p text:style-name="Table_20_Contents">O(model)</text:p>
          </table:table-cell>
          <table:table-cell table:style-name="Table4.C2" office:value-type="string">
            <text:p text:style-name="Table_20_Contents">dominated by the world-model's own update cost</text:p>
          </table:table-cell>
        </table:table-row>
        <table:table-row>
          <table:table-cell table:style-name="Table4.A2" office:value-type="string">
            <text:p text:style-name="Table_20_Contents">Kalman update (§4.2)</text:p>
          </table:table-cell>
          <table:table-cell table:style-name="Table4.B2" office:value-type="string">
            <text:p text:style-name="Table_20_Contents">O(d³)</text:p>
          </table:table-cell>
          <table:table-cell table:style-name="Table4.C2" office:value-type="string">
            <text:p text:style-name="Table_20_Contents">d = state dim; d small for self-signals</text:p>
          </table:table-cell>
        </table:table-row>
        <table:table-row>
          <table:table-cell table:style-name="Table4.A2" office:value-type="string">
            <text:p text:style-name="Table_20_Contents">Conformal interval (§4.3)</text:p>
          </table:table-cell>
          <table:table-cell table:style-name="Table4.B2" office:value-type="string">
            <text:p text:style-name="Table_20_Contents">O(1) amortized</text:p>
          </table:table-cell>
          <table:table-cell table:style-name="Table4.C2" office:value-type="string">
            <text:p text:style-name="Table_20_Contents">quantile precomputed; O(m log m) to (re)calibrate over m residuals</text:p>
          </table:table-cell>
        </table:table-row>
        <table:table-row>
          <table:table-cell table:style-name="Table4.A2" office:value-type="string">
            <text:p text:style-name="Table_20_Contents">PID arousal tick (§6.2)</text:p>
          </table:table-cell>
          <table:table-cell table:style-name="Table4.B2" office:value-type="string">
            <text:p text:style-name="Table_20_Contents">O(1)</text:p>
          </table:table-cell>
          <table:table-cell table:style-name="Table4.C2" office:value-type="string">
            <text:p text:style-name="Table_20_Contents">constant-time control law</text:p>
          </table:table-cell>
        </table:table-row>
        <table:table-row>
          <table:table-cell table:style-name="Table4.A2" office:value-type="string">
            <text:p text:style-name="Table_20_Contents">Hash-chain append/verify (§7.1)</text:p>
          </table:table-cell>
          <table:table-cell table:style-name="Table4.B2" office:value-type="string">
            <text:p text:style-name="Table_20_Contents">O(1) / O(n)</text:p>
          </table:table-cell>
          <table:table-cell table:style-name="Table4.C2" office:value-type="string">
            <text:p text:style-name="Table_20_Contents">append O(1); full verify scans n records</text:p>
          </table:table-cell>
        </table:table-row>
        <table:table-row>
          <table:table-cell table:style-name="Table4.A2" office:value-type="string">
            <text:p text:style-name="Table_20_Contents">Wasserstein drift, 1-D (§8.2)</text:p>
          </table:table-cell>
          <table:table-cell table:style-name="Table4.B2" office:value-type="string">
            <text:p text:style-name="Table_20_Contents">O(m log m)</text:p>
          </table:table-cell>
          <table:table-cell table:style-name="Table4.C2" office:value-type="string">
            <text:p text:style-name="Table_20_Contents">sort of m samples; CUSUM is O(1) incremental</text:p>
          </table:table-cell>
        </table:table-row>
        <table:table-row>
          <table:table-cell table:style-name="Table4.A11" office:value-type="string">
            <text:p text:style-name="Table_20_Contents">Causal-emergence estimate (§10)</text:p>
          </table:table-cell>
          <table:table-cell table:style-name="Table4.B11" office:value-type="string">
            <text:p text:style-name="Table_20_Contents">problem-dependent</text:p>
          </table:table-cell>
          <table:table-cell table:style-name="Table4.C11" office:value-type="string">
            <text:p text:style-name="Table_20_Contents">effective-information; tractable only on coarse partitions — a research cost (Appendix D)</text:p>
          </table:table-cell>
        </table:table-row>
      </table:table>
      <text:p text:style-name="Text_20_body">The point of the table: the organism's <text:span text:style-name="Emphasis">governing</text:span> mathematics is cheap (mostly O(1) or O(log n)) — deliberately, because it runs on every event. The expensive parts (model inference, causal-emergence metrics) live where expense belongs: inside cells (non-deterministic content) and in offline research, never on the hot coordination path. This is the determinism boundary (§2) showing up as a <text:span text:style-name="Emphasis">cost</text:span> boundary.</text:p>
      <text:p text:style-name="Body_20_Text.small">End of Book III. The exhaustive idea catalog — all ~200, labeled load-bearing or inspirational — is Appendix A. Book V puts this physiology in motion as the runtime life of the organ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Math" svg:font-family="'Cambria Math', 'Liberation Serif', serif"/>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5171a" loext:opacity="100%" style:font-name="Liberation Serif1" fo:font-family="'Liberation Serif', Georgia, serif" fo:font-size="12pt" style:font-name-asian="Liberation Serif1" style:font-family-asian="'Liberation Serif', Georgia, serif" style:font-size-asian="12pt" style:font-name-complex="Liberation Serif1" style:font-family-complex="'Liberation Serif', Georgia,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style:text-properties fo:color="#16335f" loext:opacity="100%" style:font-name="Noto Sans" fo:font-family="'Noto Sans'" style:font-pitch="variable" fo:font-size="25pt" fo:font-weight="bold" style:font-size-asian="25pt" style:font-weight-asian="bold" style:font-size-complex="2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left="0.3055in" fo:margin-right="0.3055in" fo:margin-top="0.3055in" fo:margin-bottom="0.0835in" style:contextual-spacing="false" fo:padding-left="0in" fo:padding-right="0in" fo:padding-top="0in" fo:padding-bottom="0.0417in" fo:border-left="none" fo:border-right="none" fo:border-top="none" fo:border-bottom="0.74pt solid #b9c7de"/>
      <style:text-properties fo:color="#16335f" loext:opacity="100%" style:font-name="Liberation Serif" fo:font-family="'Liberation Serif'" style:font-family-generic="roman" style:font-pitch="variable" fo:font-size="18.5pt" fo:font-weight="bold" style:font-name-asian="Noto Serif CJK SC" style:font-family-asian="'Noto Serif CJK SC'" style:font-family-generic-asian="system" style:font-pitch-asian="variable" style:font-size-asian="18.5pt" style:font-weight-asian="bold" style:font-name-complex="Noto Sans Devanagari1" style:font-family-complex="'Noto Sans Devanagari'" style:font-family-generic-complex="system" style:font-pitch-complex="variable"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left="0.222in" fo:margin-right="0.222in" fo:margin-top="0.222in" fo:margin-bottom="0.0555in" style:contextual-spacing="false"/>
      <style:text-properties fo:color="#8a4b10" loext:opacity="100%" style:font-name="Liberation Serif" fo:font-family="'Liberation Serif'" style:font-family-generic="roman" style:font-pitch="variable" fo:font-size="14.5pt" fo:font-weight="bold" style:font-name-asian="Noto Serif CJK SC" style:font-family-asian="'Noto Serif CJK SC'" style:font-family-generic-asian="system" style:font-pitch-asian="variable" style:font-size-asian="14.5pt" style:font-weight-asian="bold" style:font-name-complex="Noto Sans Devanagari1" style:font-family-complex="'Noto Sans Devanagari'" style:font-family-generic-complex="system" style:font-pitch-complex="variable" style:font-size-complex="14.5pt" style:font-weight-complex="bold"/>
    </style:style>
    <style:style style:name="Heading_20_4" style:display-name="Heading 4" style:family="paragraph" style:parent-style-name="Heading" style:next-style-name="Text_20_body" style:default-outline-level="4" style:list-style-name="" style:class="text">
      <style:paragraph-properties fo:margin-left="0.1665in" fo:margin-right="0.1665in" fo:margin-top="0.1665in" fo:margin-bottom="0.0417in" style:contextual-spacing="false"/>
      <style:text-properties fo:font-variant="small-caps" fo:color="#2a2d3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line-height="125%" fo:padding-left="0.1252in" fo:padding-right="0.1252in" fo:padding-top="0.0937in" fo:padding-bottom="0.0937in" fo:border-left="2.24pt solid #16335f" fo:border-right="0.06pt solid #d7dbe0" fo:border-top="0.06pt solid #d7dbe0" fo:border-bottom="0.06pt solid #d7dbe0"/>
      <style:text-properties style:font-name="Liberation Mono" fo:font-family="'Liberation Mono', 'DejaVu Sans Mono', monospace" fo:font-size="9.69999980926514pt" style:font-name-asian="Liberation Mono" style:font-family-asian="'Liberation Mono', 'DejaVu Sans Mono', monospace" style:font-size-asian="9.69999980926514pt" style:font-name-complex="Liberation Mono" style:font-family-complex="'Liberation Mono', 'DejaVu Sans Mono', monospace" style:font-size-complex="9.69999980926514pt"/>
    </style:style>
    <style:style style:name="Preformatted_20_Text.diagram" style:display-name="Preformatted Text.diagram" style:family="paragraph" style:parent-style-name="Preformatted_20_Text">
      <style:paragraph-properties fo:padding-left="0.1252in" fo:padding-right="0.1252in" fo:padding-top="0.0937in" fo:padding-bottom="0.0937in" fo:border-left="2.24pt solid #8a4b10" fo:border-right="0.06pt solid #d7dbe0" fo:border-top="0.06pt solid #d7dbe0" fo:border-bottom="0.06pt solid #d7dbe0"/>
    </style:style>
    <style:style style:name="Quotations" style:family="paragraph" style:parent-style-name="Standard" style:class="html">
      <style:paragraph-properties fo:margin-left="0.25in" fo:margin-right="0.25in" fo:margin-top="0.111in" fo:margin-bottom="0.111in" style:contextual-spacing="false" fo:text-indent="0in" style:auto-text-indent="false" fo:padding-left="0.1252in" fo:padding-right="0in" fo:padding-top="0in" fo:padding-bottom="0in" fo:border-left="2.24pt solid #b9c7de" fo:border-right="none" fo:border-top="none" fo:border-bottom="none"/>
      <style:text-properties fo:color="#333333" loext:opacity="100%" fo:font-style="italic" style:font-style-asian="italic" style:font-style-complex="italic"/>
    </style:style>
    <style:style style:name="Body_20_Text.lede" style:display-name="Body Text.lede" style:family="paragraph" style:parent-style-name="Text_20_body">
      <style:paragraph-properties fo:margin-left="0.111in" fo:margin-right="0.111in" fo:margin-top="0.111in" fo:margin-bottom="0.1945in" style:contextual-spacing="false"/>
      <style:text-properties fo:color="#3a3f45" loext:opacity="100%" fo:font-size="13pt" fo:font-style="italic" style:font-size-asian="13pt" style:font-style-asian="italic" style:font-size-complex="13pt" style:font-style-complex="italic"/>
    </style:style>
    <style:style style:name="Body_20_Text.small" style:display-name="Body Text.small" style:family="paragraph" style:parent-style-name="Text_20_body">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16335f" loext:opacity="100%" fo:font-weight="bold" style:font-weight-asian="bold" style:font-weight-complex="bold"/>
    </style:style>
    <style:style style:name="Body_20_Text.eq" style:display-name="Body Text.eq" style:family="paragraph" style:parent-style-name="Text_20_body">
      <style:paragraph-properties fo:margin-left="0.1665in" fo:margin-right="0.1665in" fo:margin-top="0.1665in" fo:margin-bottom="0.1665in" style:contextual-spacing="false" fo:text-align="center" style:justify-single-word="false"/>
      <style:text-properties style:font-name="Cambria Math" fo:font-family="'Cambria Math', 'Liberation Serif', serif" fo:font-size="13pt" fo:font-style="italic" style:font-name-asian="Cambria Math" style:font-family-asian="'Cambria Math', 'Liberation Serif', serif" style:font-size-asian="13pt" style:font-style-asian="italic" style:font-name-complex="Cambria Math" style:font-family-complex="'Cambria Math', 'Liberation Serif', serif" style:font-size-complex="13pt" style:font-style-complex="italic"/>
    </style:style>
    <style:style style:name="Body_20_Text.cap" style:display-name="Body Text.cap" style:family="paragraph" style:parent-style-name="Text_20_body">
      <style:paragraph-properties fo:margin-top="0.0417in" fo:margin-bottom="0.0835in" style:contextual-spacing="false" fo:text-align="center" style:justify-single-word="false"/>
      <style:text-properties fo:color="#555555" loext:opacity="100%"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color="#0f1115" loext:opacity="100%" fo:font-weight="bold" style:font-weight-asian="bold" style:font-weight-complex="bold"/>
    </style:style>
    <style:style style:name="Emphasis" style:family="text">
      <style:text-properties fo:color="#224433" loext:opacity="100%" fo:font-style="italic" style:font-style-asian="italic" style:font-style-complex="italic"/>
    </style:style>
    <style:style style:name="Source_20_Text" style:display-name="Source Text" style:family="text">
      <style:text-properties style:font-name="Liberation Mono" fo:font-family="'Liberation Mono', 'DejaVu Sans Mono', monospace" style:font-name-asian="Liberation Mono" style:font-family-asian="'Liberation Mono', 'DejaVu Sans Mono', monospace" style:font-name-complex="Liberation Mono" style:font-family-complex="'Liberation Mono', 'DejaVu Sans Mono', 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MA Codex — Book III — Physiology &amp; Mathematics</dc:title>
    <meta:document-statistic meta:table-count="4" meta:image-count="2" meta:object-count="0" meta:page-count="2" meta:paragraph-count="204" meta:word-count="3746" meta:character-count="24369" meta:non-whitespace-character-count="20549"/>
    <meta:generator>LibreOffice/24.2.7.2$Linux_X86_64 LibreOffice_project/420$Build-2</meta:generator>
    <meta:user-defined meta:name=""/>
  </office:meta>
</office:document-meta>
</file>