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9000001A59486E8C7.png" manifest:media-type="image/png"/>
  <manifest:file-entry manifest:full-path="Pictures/10000001000003E9000001AFF5E334F1.png" manifest:media-type="image/png"/>
  <manifest:file-entry manifest:full-path="Pictures/10000001000003E9000002313C09F3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3188in" table:align="left"/>
    </style:style>
    <style:style style:name="Table1.A" style:family="table-column">
      <style:table-column-properties style:column-width="7.3188in"/>
    </style:style>
    <style:style style:name="Table1.A1" style:family="table-cell">
      <style:table-cell-properties style:vertical-align="middle" fo:background-color="#fff7ec" fo:padding-left="0.1354in" fo:padding-right="0.1354in" fo:padding-top="0.0938in" fo:padding-bottom="0.0938in" fo:border="0.75pt solid #c8851a">
        <style:background-image/>
      </style:table-cell-properties>
    </style:style>
    <style:style style:name="Table2" style:family="table">
      <style:table-properties style:width="7.3188in" table:align="left"/>
    </style:style>
    <style:style style:name="Table2.A" style:family="table-column">
      <style:table-column-properties style:column-width="7.3188in"/>
    </style:style>
    <style:style style:name="Table2.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3" style:family="table">
      <style:table-properties style:width="7.3188in" table:align="left"/>
    </style:style>
    <style:style style:name="Table3.A" style:family="table-column">
      <style:table-column-properties style:column-width="7.3188in"/>
    </style:style>
    <style:style style:name="Table3.A1" style:family="table-cell">
      <style:table-cell-properties style:vertical-align="middle" fo:background-color="#fff7ec" fo:padding-left="0.1354in" fo:padding-right="0.1354in" fo:padding-top="0.0938in" fo:padding-bottom="0.0938in" fo:border="0.75pt solid #c8851a">
        <style:background-image/>
      </style:table-cell-properties>
    </style:style>
    <style:style style:name="Table4" style:family="table">
      <style:table-properties style:width="7.3188in" table:align="left"/>
    </style:style>
    <style:style style:name="Table4.A" style:family="table-column">
      <style:table-column-properties style:column-width="3.7111in"/>
    </style:style>
    <style:style style:name="Table4.B" style:family="table-column">
      <style:table-column-properties style:column-width="3.6076in"/>
    </style:style>
    <style:style style:name="Table4.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4.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4.A2" style:family="table-cell">
      <style:table-cell-properties style:vertical-align="middle" fo:padding="0.0625in" fo:border-left="0.75pt solid #808080" fo:border-right="0.75pt solid #808080" fo:border-top="none" fo:border-bottom="0.05pt solid #808080"/>
    </style:style>
    <style:style style:name="Table4.B2" style:family="table-cell">
      <style:table-cell-properties style:vertical-align="middle" fo:padding="0.0625in" fo:border-left="0.05pt solid #808080" fo:border-right="0.75pt solid #808080" fo:border-top="none" fo:border-bottom="0.05pt solid #808080"/>
    </style:style>
    <style:style style:name="Table4.A3" style:family="table-cell">
      <style:table-cell-properties style:vertical-align="middle" fo:padding="0.0625in" fo:border-left="0.75pt solid #808080" fo:border-right="0.75pt solid #808080" fo:border-top="none" fo:border-bottom="0.05pt solid #808080"/>
    </style:style>
    <style:style style:name="Table4.B3" style:family="table-cell">
      <style:table-cell-properties style:vertical-align="middle" fo:padding="0.0625in" fo:border-left="0.05pt solid #808080" fo:border-right="0.75pt solid #808080" fo:border-top="none" fo:border-bottom="0.05pt solid #808080"/>
    </style:style>
    <style:style style:name="Table4.A4" style:family="table-cell">
      <style:table-cell-properties style:vertical-align="middle" fo:padding="0.0625in" fo:border-left="0.75pt solid #808080" fo:border-right="0.75pt solid #808080" fo:border-top="none" fo:border-bottom="0.05pt solid #808080"/>
    </style:style>
    <style:style style:name="Table4.B4" style:family="table-cell">
      <style:table-cell-properties style:vertical-align="middle" fo:padding="0.0625in" fo:border-left="0.05pt solid #808080" fo:border-right="0.75pt solid #808080" fo:border-top="none" fo:border-bottom="0.05pt solid #808080"/>
    </style:style>
    <style:style style:name="Table4.A5" style:family="table-cell">
      <style:table-cell-properties style:vertical-align="middle" fo:padding="0.0625in" fo:border-left="0.75pt solid #808080" fo:border-right="0.75pt solid #808080" fo:border-top="none" fo:border-bottom="0.05pt solid #808080"/>
    </style:style>
    <style:style style:name="Table4.B5" style:family="table-cell">
      <style:table-cell-properties style:vertical-align="middle" fo:padding="0.0625in" fo:border-left="0.05pt solid #808080" fo:border-right="0.75pt solid #808080" fo:border-top="none" fo:border-bottom="0.05pt solid #808080"/>
    </style:style>
    <style:style style:name="Table4.A6" style:family="table-cell">
      <style:table-cell-properties style:vertical-align="middle" fo:padding="0.0625in" fo:border-left="0.75pt solid #808080" fo:border-right="0.75pt solid #808080" fo:border-top="none" fo:border-bottom="0.05pt solid #808080"/>
    </style:style>
    <style:style style:name="Table4.B6" style:family="table-cell">
      <style:table-cell-properties style:vertical-align="middle" fo:padding="0.0625in" fo:border-left="0.05pt solid #808080" fo:border-right="0.75pt solid #808080" fo:border-top="none" fo:border-bottom="0.05pt solid #808080"/>
    </style:style>
    <style:style style:name="Table4.A7" style:family="table-cell">
      <style:table-cell-properties style:vertical-align="middle" fo:padding="0.0625in" fo:border-left="0.75pt solid #808080" fo:border-right="0.75pt solid #808080" fo:border-top="none" fo:border-bottom="0.05pt solid #808080"/>
    </style:style>
    <style:style style:name="Table4.B7" style:family="table-cell">
      <style:table-cell-properties style:vertical-align="middle" fo:padding="0.0625in" fo:border-left="0.05pt solid #808080" fo:border-right="0.75pt solid #808080" fo:border-top="none" fo:border-bottom="0.05pt solid #808080"/>
    </style:style>
    <style:style style:name="Table4.A8" style:family="table-cell">
      <style:table-cell-properties style:vertical-align="middle" fo:padding="0.0625in" fo:border-left="0.75pt solid #808080" fo:border-right="0.75pt solid #808080" fo:border-top="none" fo:border-bottom="0.05pt solid #808080"/>
    </style:style>
    <style:style style:name="Table4.B8" style:family="table-cell">
      <style:table-cell-properties style:vertical-align="middle" fo:padding="0.0625in" fo:border-left="0.05pt solid #808080" fo:border-right="0.75pt solid #808080" fo:border-top="none" fo:border-bottom="0.05pt solid #808080"/>
    </style:style>
    <style:style style:name="Table4.A9" style:family="table-cell">
      <style:table-cell-properties style:vertical-align="middle" fo:padding="0.0625in" fo:border-left="0.75pt solid #808080" fo:border-right="0.75pt solid #808080" fo:border-top="none" fo:border-bottom="0.05pt solid #808080"/>
    </style:style>
    <style:style style:name="Table4.B9" style:family="table-cell">
      <style:table-cell-properties style:vertical-align="middle" fo:padding="0.0625in" fo:border-left="0.05pt solid #808080" fo:border-right="0.75pt solid #808080" fo:border-top="none" fo:border-bottom="0.05pt solid #808080"/>
    </style:style>
    <style:style style:name="Table4.A10" style:family="table-cell">
      <style:table-cell-properties style:vertical-align="middle" fo:padding="0.0625in" fo:border-left="0.75pt solid #808080" fo:border-right="0.75pt solid #808080" fo:border-top="none" fo:border-bottom="0.75pt solid #808080"/>
    </style:style>
    <style:style style:name="Table4.B10" style:family="table-cell">
      <style:table-cell-properties style:vertical-align="middle" fo:padding="0.0625in" fo:border-left="0.05pt solid #808080" fo:border-right="0.75pt solid #808080" fo:border-top="none" fo:border-bottom="0.75pt solid #808080"/>
    </style:style>
    <style:style style:name="Table5" style:family="table">
      <style:table-properties style:width="7.3188in" table:align="left"/>
    </style:style>
    <style:style style:name="Table5.A" style:family="table-column">
      <style:table-column-properties style:column-width="7.3188in"/>
    </style:style>
    <style:style style:name="Table5.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Table6" style:family="table">
      <style:table-properties style:width="7.3188in" table:align="left"/>
    </style:style>
    <style:style style:name="Table6.A" style:family="table-column">
      <style:table-column-properties style:column-width="7.3188in"/>
    </style:style>
    <style:style style:name="Table6.A1" style:family="table-cell">
      <style:table-cell-properties style:vertical-align="middle" fo:background-color="#fff7ec" fo:padding-left="0.1354in" fo:padding-right="0.1354in" fo:padding-top="0.0938in" fo:padding-bottom="0.0938in" fo:border="0.75pt solid #c8851a">
        <style:background-image/>
      </style:table-cell-properties>
    </style:style>
    <style:style style:name="Table7" style:family="table">
      <style:table-properties style:width="7.3188in" table:align="left"/>
    </style:style>
    <style:style style:name="Table7.A" style:family="table-column">
      <style:table-column-properties style:column-width="7.3188in"/>
    </style:style>
    <style:style style:name="Table7.A1" style:family="table-cell">
      <style:table-cell-properties style:vertical-align="middle" fo:background-color="#fff7ec" fo:padding-left="0.1354in" fo:padding-right="0.1354in" fo:padding-top="0.0938in" fo:padding-bottom="0.0938in" fo:border="0.75pt solid #c8851a">
        <style:background-image/>
      </style:table-cell-properties>
    </style:style>
    <style:style style:name="Table8" style:family="table">
      <style:table-properties style:width="7.3188in" table:align="left"/>
    </style:style>
    <style:style style:name="Table8.A" style:family="table-column">
      <style:table-column-properties style:column-width="7.3188in"/>
    </style:style>
    <style:style style:name="Table8.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9" style:family="table">
      <style:table-properties style:width="7.3188in" table:align="left"/>
    </style:style>
    <style:style style:name="Table9.A" style:family="table-column">
      <style:table-column-properties style:column-width="7.3188in"/>
    </style:style>
    <style:style style:name="Table9.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Table10" style:family="table">
      <style:table-properties style:width="7.3188in" table:align="left"/>
    </style:style>
    <style:style style:name="Table10.A" style:family="table-column">
      <style:table-column-properties style:column-width="7.3188in"/>
    </style:style>
    <style:style style:name="Table10.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1" style:family="table">
      <style:table-properties style:width="7.3188in" table:align="left"/>
    </style:style>
    <style:style style:name="Table11.A" style:family="table-column">
      <style:table-column-properties style:column-width="1.3486in"/>
    </style:style>
    <style:style style:name="Table11.B" style:family="table-column">
      <style:table-column-properties style:column-width="1.8451in"/>
    </style:style>
    <style:style style:name="Table11.C" style:family="table-column">
      <style:table-column-properties style:column-width="2.1438in"/>
    </style:style>
    <style:style style:name="Table11.D" style:family="table-column">
      <style:table-column-properties style:column-width="1.9813in"/>
    </style:style>
    <style:style style:name="Table11.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11.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11.A2" style:family="table-cell">
      <style:table-cell-properties style:vertical-align="middle" fo:padding="0.0625in" fo:border-left="0.75pt solid #808080" fo:border-right="0.75pt solid #808080" fo:border-top="none" fo:border-bottom="0.05pt solid #808080"/>
    </style:style>
    <style:style style:name="Table11.B2" style:family="table-cell">
      <style:table-cell-properties style:vertical-align="middle" fo:padding="0.0625in" fo:border-left="0.05pt solid #808080" fo:border-right="0.75pt solid #808080" fo:border-top="none" fo:border-bottom="0.05pt solid #808080"/>
    </style:style>
    <style:style style:name="Table11.C2" style:family="table-cell">
      <style:table-cell-properties style:vertical-align="middle" fo:padding="0.0625in" fo:border-left="0.05pt solid #808080" fo:border-right="0.75pt solid #808080" fo:border-top="none" fo:border-bottom="0.05pt solid #808080"/>
    </style:style>
    <style:style style:name="Table11.D2" style:family="table-cell">
      <style:table-cell-properties style:vertical-align="middle" fo:padding="0.0625in" fo:border-left="0.05pt solid #808080" fo:border-right="0.75pt solid #808080" fo:border-top="none" fo:border-bottom="0.05pt solid #808080"/>
    </style:style>
    <style:style style:name="Table11.A3" style:family="table-cell">
      <style:table-cell-properties style:vertical-align="middle" fo:padding="0.0625in" fo:border-left="0.75pt solid #808080" fo:border-right="0.75pt solid #808080" fo:border-top="none" fo:border-bottom="0.05pt solid #808080"/>
    </style:style>
    <style:style style:name="Table11.B3" style:family="table-cell">
      <style:table-cell-properties style:vertical-align="middle" fo:padding="0.0625in" fo:border-left="0.05pt solid #808080" fo:border-right="0.75pt solid #808080" fo:border-top="none" fo:border-bottom="0.05pt solid #808080"/>
    </style:style>
    <style:style style:name="Table11.C3" style:family="table-cell">
      <style:table-cell-properties style:vertical-align="middle" fo:padding="0.0625in" fo:border-left="0.05pt solid #808080" fo:border-right="0.75pt solid #808080" fo:border-top="none" fo:border-bottom="0.05pt solid #808080"/>
    </style:style>
    <style:style style:name="Table11.D3" style:family="table-cell">
      <style:table-cell-properties style:vertical-align="middle" fo:padding="0.0625in" fo:border-left="0.05pt solid #808080" fo:border-right="0.75pt solid #808080" fo:border-top="none" fo:border-bottom="0.05pt solid #808080"/>
    </style:style>
    <style:style style:name="Table11.A4" style:family="table-cell">
      <style:table-cell-properties style:vertical-align="middle" fo:padding="0.0625in" fo:border-left="0.75pt solid #808080" fo:border-right="0.75pt solid #808080" fo:border-top="none" fo:border-bottom="0.05pt solid #808080"/>
    </style:style>
    <style:style style:name="Table11.B4" style:family="table-cell">
      <style:table-cell-properties style:vertical-align="middle" fo:padding="0.0625in" fo:border-left="0.05pt solid #808080" fo:border-right="0.75pt solid #808080" fo:border-top="none" fo:border-bottom="0.05pt solid #808080"/>
    </style:style>
    <style:style style:name="Table11.C4" style:family="table-cell">
      <style:table-cell-properties style:vertical-align="middle" fo:padding="0.0625in" fo:border-left="0.05pt solid #808080" fo:border-right="0.75pt solid #808080" fo:border-top="none" fo:border-bottom="0.05pt solid #808080"/>
    </style:style>
    <style:style style:name="Table11.D4" style:family="table-cell">
      <style:table-cell-properties style:vertical-align="middle" fo:padding="0.0625in" fo:border-left="0.05pt solid #808080" fo:border-right="0.75pt solid #808080" fo:border-top="none" fo:border-bottom="0.05pt solid #808080"/>
    </style:style>
    <style:style style:name="Table11.A5" style:family="table-cell">
      <style:table-cell-properties style:vertical-align="middle" fo:padding="0.0625in" fo:border-left="0.75pt solid #808080" fo:border-right="0.75pt solid #808080" fo:border-top="none" fo:border-bottom="0.05pt solid #808080"/>
    </style:style>
    <style:style style:name="Table11.B5" style:family="table-cell">
      <style:table-cell-properties style:vertical-align="middle" fo:padding="0.0625in" fo:border-left="0.05pt solid #808080" fo:border-right="0.75pt solid #808080" fo:border-top="none" fo:border-bottom="0.05pt solid #808080"/>
    </style:style>
    <style:style style:name="Table11.C5" style:family="table-cell">
      <style:table-cell-properties style:vertical-align="middle" fo:padding="0.0625in" fo:border-left="0.05pt solid #808080" fo:border-right="0.75pt solid #808080" fo:border-top="none" fo:border-bottom="0.05pt solid #808080"/>
    </style:style>
    <style:style style:name="Table11.D5" style:family="table-cell">
      <style:table-cell-properties style:vertical-align="middle" fo:padding="0.0625in" fo:border-left="0.05pt solid #808080" fo:border-right="0.75pt solid #808080" fo:border-top="none" fo:border-bottom="0.05pt solid #808080"/>
    </style:style>
    <style:style style:name="Table11.A6" style:family="table-cell">
      <style:table-cell-properties style:vertical-align="middle" fo:padding="0.0625in" fo:border-left="0.75pt solid #808080" fo:border-right="0.75pt solid #808080" fo:border-top="none" fo:border-bottom="0.05pt solid #808080"/>
    </style:style>
    <style:style style:name="Table11.B6" style:family="table-cell">
      <style:table-cell-properties style:vertical-align="middle" fo:padding="0.0625in" fo:border-left="0.05pt solid #808080" fo:border-right="0.75pt solid #808080" fo:border-top="none" fo:border-bottom="0.05pt solid #808080"/>
    </style:style>
    <style:style style:name="Table11.C6" style:family="table-cell">
      <style:table-cell-properties style:vertical-align="middle" fo:padding="0.0625in" fo:border-left="0.05pt solid #808080" fo:border-right="0.75pt solid #808080" fo:border-top="none" fo:border-bottom="0.05pt solid #808080"/>
    </style:style>
    <style:style style:name="Table11.D6" style:family="table-cell">
      <style:table-cell-properties style:vertical-align="middle" fo:padding="0.0625in" fo:border-left="0.05pt solid #808080" fo:border-right="0.75pt solid #808080" fo:border-top="none" fo:border-bottom="0.05pt solid #808080"/>
    </style:style>
    <style:style style:name="Table11.A7" style:family="table-cell">
      <style:table-cell-properties style:vertical-align="middle" fo:padding="0.0625in" fo:border-left="0.75pt solid #808080" fo:border-right="0.75pt solid #808080" fo:border-top="none" fo:border-bottom="0.05pt solid #808080"/>
    </style:style>
    <style:style style:name="Table11.B7" style:family="table-cell">
      <style:table-cell-properties style:vertical-align="middle" fo:padding="0.0625in" fo:border-left="0.05pt solid #808080" fo:border-right="0.75pt solid #808080" fo:border-top="none" fo:border-bottom="0.05pt solid #808080"/>
    </style:style>
    <style:style style:name="Table11.C7" style:family="table-cell">
      <style:table-cell-properties style:vertical-align="middle" fo:padding="0.0625in" fo:border-left="0.05pt solid #808080" fo:border-right="0.75pt solid #808080" fo:border-top="none" fo:border-bottom="0.05pt solid #808080"/>
    </style:style>
    <style:style style:name="Table11.D7" style:family="table-cell">
      <style:table-cell-properties style:vertical-align="middle" fo:padding="0.0625in" fo:border-left="0.05pt solid #808080" fo:border-right="0.75pt solid #808080" fo:border-top="none" fo:border-bottom="0.05pt solid #808080"/>
    </style:style>
    <style:style style:name="Table11.A8" style:family="table-cell">
      <style:table-cell-properties style:vertical-align="middle" fo:padding="0.0625in" fo:border-left="0.75pt solid #808080" fo:border-right="0.75pt solid #808080" fo:border-top="none" fo:border-bottom="0.05pt solid #808080"/>
    </style:style>
    <style:style style:name="Table11.B8" style:family="table-cell">
      <style:table-cell-properties style:vertical-align="middle" fo:padding="0.0625in" fo:border-left="0.05pt solid #808080" fo:border-right="0.75pt solid #808080" fo:border-top="none" fo:border-bottom="0.05pt solid #808080"/>
    </style:style>
    <style:style style:name="Table11.C8" style:family="table-cell">
      <style:table-cell-properties style:vertical-align="middle" fo:padding="0.0625in" fo:border-left="0.05pt solid #808080" fo:border-right="0.75pt solid #808080" fo:border-top="none" fo:border-bottom="0.05pt solid #808080"/>
    </style:style>
    <style:style style:name="Table11.D8" style:family="table-cell">
      <style:table-cell-properties style:vertical-align="middle" fo:padding="0.0625in" fo:border-left="0.05pt solid #808080" fo:border-right="0.75pt solid #808080" fo:border-top="none" fo:border-bottom="0.05pt solid #808080"/>
    </style:style>
    <style:style style:name="Table11.A9" style:family="table-cell">
      <style:table-cell-properties style:vertical-align="middle" fo:padding="0.0625in" fo:border-left="0.75pt solid #808080" fo:border-right="0.75pt solid #808080" fo:border-top="none" fo:border-bottom="0.75pt solid #808080"/>
    </style:style>
    <style:style style:name="Table11.B9" style:family="table-cell">
      <style:table-cell-properties style:vertical-align="middle" fo:padding="0.0625in" fo:border-left="0.05pt solid #808080" fo:border-right="0.75pt solid #808080" fo:border-top="none" fo:border-bottom="0.75pt solid #808080"/>
    </style:style>
    <style:style style:name="Table11.C9" style:family="table-cell">
      <style:table-cell-properties style:vertical-align="middle" fo:padding="0.0625in" fo:border-left="0.05pt solid #808080" fo:border-right="0.75pt solid #808080" fo:border-top="none" fo:border-bottom="0.75pt solid #808080"/>
    </style:style>
    <style:style style:name="Table11.D9" style:family="table-cell">
      <style:table-cell-properties style:vertical-align="middle" fo:padding="0.0625in" fo:border-left="0.05pt solid #808080" fo:border-right="0.75pt solid #808080" fo:border-top="none" fo:border-bottom="0.75pt solid #808080"/>
    </style:style>
    <style:style style:name="Table12" style:family="table">
      <style:table-properties style:width="7.3188in" table:align="left"/>
    </style:style>
    <style:style style:name="Table12.A" style:family="table-column">
      <style:table-column-properties style:column-width="0.7701in"/>
    </style:style>
    <style:style style:name="Table12.B" style:family="table-column">
      <style:table-column-properties style:column-width="3.0194in"/>
    </style:style>
    <style:style style:name="Table12.C" style:family="table-column">
      <style:table-column-properties style:column-width="3.5292in"/>
    </style:style>
    <style:style style:name="Table12.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12.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12.A2" style:family="table-cell">
      <style:table-cell-properties style:vertical-align="middle" fo:padding="0.0625in" fo:border-left="0.75pt solid #808080" fo:border-right="0.75pt solid #808080" fo:border-top="none" fo:border-bottom="0.05pt solid #808080"/>
    </style:style>
    <style:style style:name="Table12.B2" style:family="table-cell">
      <style:table-cell-properties style:vertical-align="middle" fo:padding="0.0625in" fo:border-left="0.05pt solid #808080" fo:border-right="0.75pt solid #808080" fo:border-top="none" fo:border-bottom="0.05pt solid #808080"/>
    </style:style>
    <style:style style:name="Table12.C2" style:family="table-cell">
      <style:table-cell-properties style:vertical-align="middle" fo:padding="0.0625in" fo:border-left="0.05pt solid #808080" fo:border-right="0.75pt solid #808080" fo:border-top="none" fo:border-bottom="0.05pt solid #808080"/>
    </style:style>
    <style:style style:name="Table12.A3" style:family="table-cell">
      <style:table-cell-properties style:vertical-align="middle" fo:padding="0.0625in" fo:border-left="0.75pt solid #808080" fo:border-right="0.75pt solid #808080" fo:border-top="none" fo:border-bottom="0.05pt solid #808080"/>
    </style:style>
    <style:style style:name="Table12.B3" style:family="table-cell">
      <style:table-cell-properties style:vertical-align="middle" fo:padding="0.0625in" fo:border-left="0.05pt solid #808080" fo:border-right="0.75pt solid #808080" fo:border-top="none" fo:border-bottom="0.05pt solid #808080"/>
    </style:style>
    <style:style style:name="Table12.C3" style:family="table-cell">
      <style:table-cell-properties style:vertical-align="middle" fo:padding="0.0625in" fo:border-left="0.05pt solid #808080" fo:border-right="0.75pt solid #808080" fo:border-top="none" fo:border-bottom="0.05pt solid #808080"/>
    </style:style>
    <style:style style:name="Table12.A4" style:family="table-cell">
      <style:table-cell-properties style:vertical-align="middle" fo:padding="0.0625in" fo:border-left="0.75pt solid #808080" fo:border-right="0.75pt solid #808080" fo:border-top="none" fo:border-bottom="0.75pt solid #808080"/>
    </style:style>
    <style:style style:name="Table12.B4" style:family="table-cell">
      <style:table-cell-properties style:vertical-align="middle" fo:padding="0.0625in" fo:border-left="0.05pt solid #808080" fo:border-right="0.75pt solid #808080" fo:border-top="none" fo:border-bottom="0.75pt solid #808080"/>
    </style:style>
    <style:style style:name="Table12.C4" style:family="table-cell">
      <style:table-cell-properties style:vertical-align="middle" fo:padding="0.0625in" fo:border-left="0.05pt solid #808080" fo:border-right="0.75pt solid #808080" fo:border-top="none" fo:border-bottom="0.75pt solid #808080"/>
    </style:style>
    <style:style style:name="Table13" style:family="table">
      <style:table-properties style:width="7.3188in" table:align="left"/>
    </style:style>
    <style:style style:name="Table13.A" style:family="table-column">
      <style:table-column-properties style:column-width="7.3188in"/>
    </style:style>
    <style:style style:name="Table13.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P1" style:family="paragraph" style:parent-style-name="Heading_20_1" style:master-page-name="HTML">
      <style:paragraph-properties style:page-number="auto"/>
    </style:style>
    <style:style style:name="P2" style:family="paragraph" style:parent-style-name="Preformatted_20_Text.diagram">
      <style:paragraph-properties fo:margin-top="0in" fo:margin-bottom="0.1965in" style:contextual-spacing="false"/>
    </style:style>
    <style:style style:name="P3" style:family="paragraph" style:parent-style-name="Table_20_Contents">
      <style:paragraph-properties fo:margin-left="0in" fo:margin-right="0in" fo:text-indent="0in" style:auto-text-indent="false"/>
    </style:style>
    <style:style style:name="P4" style:family="paragraph" style:parent-style-name="Table_20_Contents">
      <style:text-properties fo:font-weight="bold"/>
    </style:style>
    <style:style style:name="P5" style:family="paragraph" style:parent-style-name="Text_20_body" style:list-style-name="L1"/>
    <style:style style:name="P6" style:family="paragraph" style:parent-style-name="Text_20_body" style:list-style-name="L1">
      <style:paragraph-properties fo:margin-top="0.0835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0835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0835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0835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0835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0835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0835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0835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0835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0835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0835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0835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0835in" fo:margin-bottom="0in" style:contextual-spacing="false"/>
    </style:style>
    <style:style style:name="P31" style:family="paragraph" style:parent-style-name="Text_20_body" style:list-style-name="L14"/>
    <style:style style:name="P32" style:family="paragraph" style:parent-style-name="Text_20_body" style:list-style-name="L14">
      <style:paragraph-properties fo:margin-top="0.0835in" fo:margin-bottom="0in" style:contextual-spacing="false"/>
    </style:style>
    <style:style style:name="P33" style:family="paragraph" style:parent-style-name="Text_20_body" style:list-style-name="L15"/>
    <style:style style:name="P34" style:family="paragraph" style:parent-style-name="Text_20_body" style:list-style-name="L15">
      <style:paragraph-properties fo:margin-top="0.0835in" fo:margin-bottom="0in" style:contextual-spacing="false"/>
    </style:style>
    <style:style style:name="T1" style:family="text">
      <style:text-propertie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A Codex</text:p>
      <text:p text:style-name="Body_20_Text.lede">Book II — Anatomy: The Recursive Organism</text:p>
      <text:p text:style-name="Body_20_Text.small">A design bible for a new agent runtime conceived as a single living organism.<text:line-break/>Primitive Origins · working draft, June 2026. The organism is named <text:span text:style-name="T1">SOMA</text:span> throughout (swappable). Its largest scale — the aware whole — is <text:span text:style-name="T1">CHORUS</text:span>.</text:p>
      <text:p text:style-name="Horizontal_20_Line"/>
      <text:p text:style-name="Body_20_Text.lede">This book defines <text:span text:style-name="Emphasis">what the organism is made of</text:span>. Book I gives the why; Book III the physiology and mathematics; Book IV the buildable specification; Book V the runtime life. Everything in those books hangs on the anatomy fixed here. Read this one first.</text:p>
      <text:h text:style-name="Heading_20_2" text:outline-level="2">1. The one-organism thesis</text:h>
      <text:p text:style-name="Text_20_body">Most agent systems are <text:span text:style-name="Emphasis">federations</text:span>: a platform that hosts many independent agents, tenants, or tools, brokered by a coordinator. SOMA is not a federation. It is <text:span text:style-name="Strong_20_Emphasis">one organism</text:span>. The participants are not guests on a platform; they are its <text:span text:style-name="Emphasis">cells, tissues, and organs</text:span>. A federation asks "how do I let many agents share infrastructure?" SOMA asks "how does one living system, built from many small parts, become more than its parts?"</text:p>
      <text:p text:style-name="Text_20_body">This is the operational form of the founding thesis (Book I): <text:span text:style-name="Strong_20_Emphasis">cognition is a property of a governed, integrated, persistent, specialized whole over time — not of any single component.</text:span> The thesis names the ingredients — Identity, Memory, Trust, Governance, Specialization, Interaction, Time — and a load-bearing claim: <text:span text:style-name="Emphasis">governance is what converts emergence into capability rather than noise.</text:span> Book II turns that sentence into a body.</text:p>
      <table:table table:name="Table1" table:style-name="Table1">
        <table:table-column table:style-name="Table1.A"/>
        <table:table-row>
          <table:table-cell table:style-name="Table1.A1" office:value-type="string">
            <text:p text:style-name="P3"><text:span text:style-name="T1">Inherited, not imported.</text:span> SOMA inherits proven <text:span text:style-name="Emphasis">ideas</text:span> from the Context Primitive (CP) lineage — an append-only log as shared truth, Bayesian trust, homeostatic regulation, a human authority ceiling, a single universal adapter, and completion that must be verified rather than claimed. It does <text:span text:style-name="Emphasis">not</text:span> import CP's code, transport/mesh, or deployment model. Those ideas are recast here as <text:span text:style-name="Emphasis">biology</text:span>: the laws of how this organism lives. Appendix E records exactly what was kept and what was left behind.</text:p>
          </table:table-cell>
        </table:table-row>
      </table:table>
      <text:h text:style-name="Heading_20_2" text:outline-level="2">2. The holarchy — every part is itself a whole</text:h>
      <text:p text:style-name="Text_20_body">SOMA is organized as a <text:span text:style-name="Strong_20_Emphasis">holarchy</text:span> (Koestler's term): a hierarchy of <text:span text:style-name="Emphasis">holons</text:span>, where a holon is simultaneously a complete whole and a part of a larger whole. A cell is a whole made of primitive operations and a part of a workflow. A workflow is a whole made of cells and a part of an organ. And so on, up to the organism, which is a part of an ecosystem.</text:p>
      <text:p text:style-name="Text_20_body"><draw:frame draw:style-name="fr1" draw:name="Image1" text:anchor-type="as-char" svg:width="10.4272in" svg:height="5.8437in" draw:z-index="0"><draw:image xlink:href="Pictures/10000001000003E9000002313C09F335.png" xlink:type="simple" xlink:show="embed" xlink:actuate="onLoad" draw:mime-type="image/png"/><svg:title>The holarchy stack from primitive operations to ecosystem</svg:title></draw:frame></text:p>
      <text:p text:style-name="Body_20_Text.cap">Figure 2.1 — The holarchy. The same governed interface applies at every level L1–L6; the floor (L0) is substrate, not a holon; HumanSeat sits above L6.</text:p>
      <text:p text:style-name="Preformatted_20_Text.diagram"><text:s text:c="2"/>L6 <text:s/>ECOSYSTEM <text:s text:c="7"/>many organisms; the CHORUS at largest scale; panarchy</text:p>
      <text:p text:style-name="Preformatted_20_Text.diagram"><text:s text:c="2"/>L5 <text:s/>ORGANISM (SOMA) <text:s/>the self; identity, valence, constitution, the workspace</text:p>
      <text:p text:style-name="Preformatted_20_Text.diagram"><text:s text:c="2"/>L4 <text:s/>SYSTEMS <text:s text:c="9"/>coordinated organs forming a faculty</text:p>
      <text:p text:style-name="Preformatted_20_Text.diagram"><text:s text:c="2"/>L3 <text:s/>ORGANS <text:s text:c="10"/>a function built from workflows</text:p>
      <text:p text:style-name="Preformatted_20_Text.diagram"><text:s text:c="2"/>L2 <text:s/>WORKFLOWS <text:s text:c="7"/>tissue; coordinated cells (workflows may nest within workflows)</text:p>
      <text:p text:style-name="Preformatted_20_Text.diagram"><text:s text:c="2"/>L1 <text:s/>CELLS <text:s text:c="11"/>the smallest active holon; single purpose; bounded awareness</text:p>
      <text:p text:style-name="Preformatted_20_Text.diagram"><text:s text:c="2"/>------------------------------------------------------------------------------</text:p>
      <text:p text:style-name="P2"><text:s text:c="2"/>L0 <text:s/>PRIMITIVE OPS <text:s text:c="3"/>substrate / biochemistry — NOT a holon</text:p>
      <text:p text:style-name="Text_20_body">The crucial discipline: <text:span text:style-name="Strong_20_Emphasis">levels are not a fixed ladder but a recursion.</text:span> A workflow may contain another workflow; an organ may be composed of sub-organs. "Six levels" is a typical depth, not a law. What is invariant is not the count of rungs but the <text:span text:style-name="Emphasis">rule</text:span> that relates any holon to its sub-holons — which is the subject of the next chapter, and the genuine novelty of this design.</text:p>
      <text:h text:style-name="Heading_20_2" text:outline-level="2">3. The recursion rule and the membrane</text:h>
      <text:p text:style-name="Body_20_Text.lede">A unit at any level is a governed coordination of sub-units that expose the same interface over a shared perceived reality.</text:p>
      <text:p text:style-name="Text_20_body">This single rule, applied recursively, is the spine of the whole architecture. Concretely, <text:span text:style-name="Emphasis">every holon at every scale</text:span> does exactly five things, and only these:</text:p>
      <text:list text:style-name="L1">
        <text:list-item>
          <text:p text:style-name="P6"><text:soft-page-break/><text:span text:style-name="T1">Onboards through one ceremony.</text:span> Before it may act, every holon — a cell or an entire system — passes the identical admission ceremony (Book IV, §"The Ceremony"). There is no second mechanism. </text:p>
        </text:list-item>
        <text:list-item>
          <text:p text:style-name="P6"><text:span text:style-name="T1">Communicates only through the shared workspace.</text:span> A holon never opens a private channel to another holon. All coordination is a record on the shared event log. </text:p>
        </text:list-item>
        <text:list-item>
          <text:p text:style-name="P6"><text:span text:style-name="T1">Holds identity, trust, and governed authority.</text:span> Every holon has a name, a reputation, and a scope of what it is permitted to do — earned, contractible, revocable. </text:p>
        </text:list-item>
        <text:list-item>
          <text:p text:style-name="P6"><text:span text:style-name="T1">Perceives its sub-holons only through projection.</text:span> A parent never sees a child's internals. It sees a <text:span text:style-name="Emphasis">governed projection</text:span> — a deliberately partial view. This is the 80/20 principle below. </text:p>
        </text:list-item>
        <text:list-item>
          <text:p text:style-name="P5"><text:span text:style-name="T1">Reports outcomes, which are verified, not trusted.</text:span> No holon's success is accepted on its own word; a non-valent verifier confirms it (Book IV invariant INV-4). </text:p>
        </text:list-item>
      </text:list>
      <text:p text:style-name="Text_20_body">Because these five hold at <text:span text:style-name="Emphasis">every</text:span> level without exception, there are no special cases between a primitive cell and the whole organism. The earlier "engineering manual" drafts of this idea flattened the holarchy into a labelled 7-rung ladder and never wrote the rule connecting the rungs. The rule above is that missing piece: it dissolves the ladder into one recursive law.</text:p>
      <text:h text:style-name="Heading_20_3" text:outline-level="3">3.1 The membrane: one boundary, three identities</text:h>
      <text:p text:style-name="Text_20_body">The rule must not stay romantic. "The same interface at every scale" cannot mean "every primitive operation is broadcast on a global bus" — biology does not put every molecular reaction on a nerve. So we must say <text:span text:style-name="Emphasis">exactly</text:span> where the interface applies. The answer is a single boundary — the <text:span text:style-name="Strong_20_Emphasis">membrane</text:span> of a holon — which is three things at once:</text:p>
      <text:p text:style-name="Text_20_body"><draw:frame draw:style-name="fr1" draw:name="Image2" text:anchor-type="as-char" svg:width="10.4272in" svg:height="4.4898in" draw:z-index="0"><draw:image xlink:href="Pictures/10000001000003E9000001AFF5E334F1.png" xlink:type="simple" xlink:show="embed" xlink:actuate="onLoad" draw:mime-type="image/png"/><svg:title>The membrane as a three-way identity</svg:title></draw:frame></text:p>
      <text:p text:style-name="Body_20_Text.cap">Figure 3.1 — The membrane is simultaneously the self-similar interface, the governance boundary, and the 80/20 (shared/private) boundary.</text:p>
      <text:list text:style-name="L2">
        <text:list-item>
          <text:p text:style-name="P8"><text:span text:style-name="T1">The self-similar interface</text:span> — the five-part contract above, identical at every level. </text:p>
        </text:list-item>
        <text:list-item>
          <text:p text:style-name="P8"><text:span text:style-name="T1">The governance boundary</text:span> — the line the parent governs. The parent governs exactly what crosses the membrane and nothing within. </text:p>
        </text:list-item>
        <text:list-item>
          <text:p text:style-name="P7"><text:span text:style-name="T1">The 80/20 boundary</text:span> — what crosses the membrane is the <text:span text:style-name="Emphasis">~20% shared reality</text:span>; what stays inside is the <text:span text:style-name="Emphasis">~80% the holon privately perceives and computes</text:span>. </text:p>
        </text:list-item>
      </text:list>
      <text:p text:style-name="Text_20_body">These are not three boundaries that happen to coincide. They are <text:span text:style-name="Emphasis">one</text:span> boundary described three ways. That identity is the precise composition rule the earlier drafts lacked. It tells you, mechanically:</text:p>
      <text:list text:style-name="L3">
        <text:list-item>
          <text:p text:style-name="P10"><text:span text:style-name="T1">Inter-holon</text:span> coordination (across the membrane) is bus-mediated, governed, and constitutes shared reality. </text:p>
        </text:list-item>
        <text:list-item>
          <text:p text:style-name="P10"><text:span text:style-name="T1">Intra-holon</text:span> mechanics (inside the membrane) are private, tightly coupled, and may be stochastic. </text:p>
        </text:list-item>
        <text:list-item>
          <text:p text:style-name="P9"><text:span text:style-name="T1">Bus-mediation starts above the primitive-op level.</text:span> Cells coordinate on the workspace; a cell's internal primitive operations do not. Therefore <text:span text:style-name="Strong_20_Emphasis">cells are the floor of the holarchy and primitive operations are substrate, not holons.</text:span> </text:p>
        </text:list-item>
      </text:list>
      <table:table table:name="Table2" table:style-name="Table2">
        <table:table-column table:style-name="Table2.A"/>
        <table:table-row>
          <table:table-cell table:style-name="Table2.A1" office:value-type="string">
            <text:p text:style-name="P3"><text:span text:style-name="T1">A three-way identity, not four.</text:span> Determinism is <text:span text:style-name="Emphasis">not</text:span> a fourth leg of this identity. A stochastic value (a cell's model output) can and does live in the shared ~20%. So "shared" does not mean "deterministic data." Determinism is a property of <text:span text:style-name="Emphasis">one face</text:span> of the membrane — how holons coordinate — never of the content they exchange. This is developed in Book III, §"Determinism," and fixed as invariant INV-9.</text:p>
          </table:table-cell>
        </table:table-row>
      </table:table>
      <text:h text:style-name="Heading_20_3" text:outline-level="3">3.2 Perception as projection (the 80/20)</text:h>
      <text:p text:style-name="Text_20_body">A parent's knowledge of its children is a <text:span text:style-name="Emphasis">model</text:span>, not a window. The organism does not have direct access to the inner state of its organs any more than you have direct access to the firing of your own neurons; it has a <text:span text:style-name="Emphasis">projection</text:span> — a governed, lossy, purpose-shaped summary. Book I argued that "reality is roughly 20% shared state and 80% perception of it." SOMA builds that asymmetry into its physics: the shared 20% is what is on the workspace and what projections expose; the private 80% is each holon's own running perception. Two consequences:</text:p>
      <text:list text:style-name="L4">
        <text:list-item>
          <text:p text:style-name="P12"><text:span text:style-name="T1">Aperture is governed.</text:span> How much detail a holon receives (peripheral summary vs. focused detail) is decided by the governance system from the holon's task, trust, and authority — not by the holon asking. </text:p>
        </text:list-item>
        <text:list-item>
          <text:p text:style-name="P11"><text:span text:style-name="T1">No holon ever has the whole picture.</text:span> Not even the organism. The organism perceives a projection of its systems; the systems perceive projections of their organs. "Total awareness" is structurally impossible — and that is a feature, the same way bounded attention is a feature of a mind. </text:p>
        </text:list-item>
      </text:list>
      <text:h text:style-name="Heading_20_2" text:outline-level="2">4. The global workspace — the only channel</text:h>
      <text:p text:style-name="Text_20_body">The shared substrate is an <text:span text:style-name="Strong_20_Emphasis">append-only, hash-chained event log</text:span>. It is the organism's nervous system and, in the language of cognitive science, its <text:span text:style-name="Emphasis">global workspace</text:span> (Baars; Dehaene): the broadcast medium on which anything that is to count as "happening to the organism" must appear.</text:p>
      <text:p text:style-name="Text_20_body"><draw:frame draw:style-name="fr1" draw:name="Image3" text:anchor-type="as-char" svg:width="10.4272in" svg:height="4.3854in" draw:z-index="0"><draw:image xlink:href="Pictures/10000001000003E9000001A59486E8C7.png" xlink:type="simple" xlink:show="embed" xlink:actuate="onLoad" draw:mime-type="image/png"/><svg:title>The global workspace as the only channel between holons</svg:title></draw:frame></text:p>
      <text:p text:style-name="Body_20_Text.cap">Figure 4.1 — Holons publish outcomes upward; they perceive only a governed projection downward; they never touch each other directly.</text:p>
      <text:p text:style-name="Text_20_body"><text:soft-page-break/>Four properties make the log the organism's reality rather than just a message queue:</text:p>
      <text:list text:style-name="L5">
        <text:list-item>
          <text:p text:style-name="P14"><text:span text:style-name="T1">Append-only.</text:span> The past is never edited. The organism can re-perceive any prior moment exactly. </text:p>
        </text:list-item>
        <text:list-item>
          <text:p text:style-name="P14"><text:span text:style-name="T1">Hash-chained.</text:span> Each record commits to the previous one; the history is tamper-evident. Continuity of identity (Book II §6) rests on this. </text:p>
        </text:list-item>
        <text:list-item>
          <text:p text:style-name="P14"><text:span text:style-name="T1">The only channel.</text:span> There is no private path between holons. "If coordination happened, it is on the log." This is what makes the organism auditable to itself. </text:p>
        </text:list-item>
        <text:list-item>
          <text:p text:style-name="P13"><text:span text:style-name="T1">Time is first-class.</text:span> The log <text:span text:style-name="Emphasis">is</text:span> the organism's sense of time: order, duration, before and after. Temporal awareness is not a module bolted on; it is the medium. </text:p>
        </text:list-item>
      </text:list>
      <table:table table:name="Table3" table:style-name="Table3">
        <table:table-column table:style-name="Table3.A"/>
        <table:table-row>
          <table:table-cell table:style-name="Table3.A1" office:value-type="string">
            <text:p text:style-name="P3"><text:span text:style-name="T1">Why one channel matters.</text:span> The single-channel law is what lets governance be "physics" rather than policy. If a holon could whisper to another off the record, no amount of governance could see it. Because the workspace is the <text:span text:style-name="Emphasis">only</text:span> way to affect another holon, governing the workspace governs everything. The constraint is generative, not merely restrictive — it is what makes the shared reality shared.</text:p>
          </table:table-cell>
        </table:table-row>
      </table:table>
      <text:h text:style-name="Heading_20_2" text:outline-level="2">5. Governance as physics</text:h>
      <text:p text:style-name="Text_20_body">In most systems governance is a layer you add: a policy engine, a guardrail, a review step. In SOMA governance is not a layer — it is the <text:span text:style-name="Emphasis">physics of the world the holons live in</text:span>. A holon cannot "choose" to bypass governance any more than a cell can choose to ignore chemistry. The governing laws are constitutive of the medium: the only channel is the governed workspace; the only way to act is through a lease the authority granted; the only way to complete is to be verified.</text:p>
      <text:p text:style-name="Text_20_body">This is the answer to the chaos-vs-structure problem from Book I. Unconstrained emergence produces noise; governed interaction converts the same emergence into capability. Governance is the selector. SOMA's bet is that <text:span text:style-name="Emphasis">engineered</text:span> governance is a time-compression substitute for the three billion years of blind selection that produced biological minds: identity, trust, memory, and oversight are the constraints that selection had to discover by waste, installed deliberately from the start.</text:p>
      <text:p text:style-name="Text_20_body">The governing laws are realized by the Immune/Governance system (§13), but they are <text:span text:style-name="Emphasis">felt at every membrane</text:span>, because every membrane is a governance boundary. Governance is therefore not centralized in one organ; it is distributed across every boundary in the body, with the Immune/Governance system as the specialized organ that maintains the laws, not the only place they apply.</text:p>
      <text:h text:style-name="Heading_20_2" text:outline-level="2">6. The body plan: eight systems</text:h>
      <text:p text:style-name="Text_20_body">The organism's components come from a precise source: the inventory of what a cognitive system needs (Book I, "the consciousness components"). Each component is realized by an organ; organs group into eight <text:span text:style-name="Strong_20_Emphasis">systems</text:span>. The map below is the contract — every component has a home, and Appendix C traces each one through to its mathematics (Book III), its crate (Book IV), and its invariants.</text:p>
      <table:table table:name="Table4" table:style-name="Table4">
        <table:table-column table:style-name="Table4.A"/>
        <table:table-column table:style-name="Table4.B"/>
        <table:table-row>
          <table:table-cell table:style-name="Table4.A1" office:value-type="string">
            <text:p text:style-name="Table_20_Heading">Component (what a mind needs)</text:p>
          </table:table-cell>
          <table:table-cell table:style-name="Table4.B1" office:value-type="string">
            <text:p text:style-name="Table_20_Heading">Realized in SOMA by</text:p>
          </table:table-cell>
        </table:table-row>
        <table:table-row>
          <table:table-cell table:style-name="Table4.A2" office:value-type="string">
            <text:p text:style-name="Table_20_Contents">Event-driven substrate; temporal awareness; persistence</text:p>
          </table:table-cell>
          <table:table-cell table:style-name="Table4.B2" office:value-type="string">
            <text:p text:style-name="Table_20_Contents"><text:span text:style-name="T1">S1 Workspace</text:span> (nervous system)</text:p>
          </table:table-cell>
        </table:table-row>
        <table:table-row>
          <table:table-cell table:style-name="Table4.A2" office:value-type="string">
            <text:p text:style-name="Table_20_Contents">Identity; sense of self as an entity; continuity</text:p>
          </table:table-cell>
          <table:table-cell table:style-name="Table4.B2" office:value-type="string">
            <text:p text:style-name="Table_20_Contents"><text:span text:style-name="T1">S2 Identity &amp; Self</text:span> — incl. Self-Model (Gap 1)</text:p>
          </table:table-cell>
        </table:table-row>
        <table:table-row>
          <table:table-cell table:style-name="Table4.A2" office:value-type="string">
            <text:p text:style-name="Table_20_Contents">Memory + retrieval (episodic / semantic / procedural)</text:p>
          </table:table-cell>
          <table:table-cell table:style-name="Table4.B2" office:value-type="string">
            <text:p text:style-name="P4">S3 Memory</text:p>
          </table:table-cell>
        </table:table-row>
        <table:table-row>
          <table:table-cell table:style-name="Table4.A2" office:value-type="string">
            <text:p text:style-name="Table_20_Contents">Global real-time reality; relational awareness; uncertainty</text:p>
          </table:table-cell>
          <table:table-cell table:style-name="Table4.B2" office:value-type="string">
            <text:p text:style-name="Table_20_Contents"><text:span text:style-name="T1">S4 World-Model</text:span> (reality)</text:p>
          </table:table-cell>
        </table:table-row>
        <table:table-row>
          <table:table-cell table:style-name="Table4.A2" office:value-type="string">
            <text:p text:style-name="Table_20_Contents">Reasoning across domains; agency; reluctant action</text:p>
          </table:table-cell>
          <table:table-cell table:style-name="Table4.B2" office:value-type="string">
            <text:p text:style-name="Table_20_Contents"><text:span text:style-name="T1">S5 Cognition</text:span> (reasoning &amp; agency)</text:p>
          </table:table-cell>
        </table:table-row>
        <table:table-row>
          <table:table-cell table:style-name="Table4.A2" office:value-type="string">
            <text:p text:style-name="Table_20_Contents">Goal-orientation; intent; outcome-direction</text:p>
          </table:table-cell>
          <table:table-cell table:style-name="Table4.B2" office:value-type="string">
            <text:p text:style-name="Table_20_Contents"><text:span text:style-name="T1">S6 Goal</text:span> (intent)</text:p>
          </table:table-cell>
        </table:table-row>
        <table:table-row>
          <table:table-cell table:style-name="Table4.A2" office:value-type="string">
            <text:p text:style-name="Table_20_Contents">Drive; valence; the felt stake</text:p>
          </table:table-cell>
          <table:table-cell table:style-name="Table4.B2" office:value-type="string">
            <text:p text:style-name="Table_20_Contents"><text:span text:style-name="T1">S7 Homeostasis</text:span> (drive &amp; valence) (Gap 2)</text:p>
          </table:table-cell>
        </table:table-row>
        <table:table-row>
          <table:table-cell table:style-name="Table4.A2" office:value-type="string">
            <text:p text:style-name="Table_20_Contents">Governance; constraints; safety</text:p>
          </table:table-cell>
          <table:table-cell table:style-name="Table4.B2" office:value-type="string">
            <text:p text:style-name="Table_20_Contents"><text:span text:style-name="T1">S8 Immune / Governance</text:span> (governance-as-physics)</text:p>
          </table:table-cell>
        </table:table-row>
        <table:table-row>
          <table:table-cell table:style-name="Table4.A10" office:value-type="string">
            <text:p text:style-name="Table_20_Contents"><text:span text:style-name="Emphasis">Subjective experience</text:span></text:p>
          </table:table-cell>
          <table:table-cell table:style-name="Table4.B10" office:value-type="string">
            <text:p text:style-name="Table_20_Contents"><text:span text:style-name="Emphasis">left open — the binding wall (Book I §"hard problem")</text:span></text:p>
          </table:table-cell>
        </table:table-row>
      </table:table>
      <text:p text:style-name="Preformatted_20_Text.diagram"><text:s text:c="25"/>HumanSeat (apex authority — above the holarchy)</text:p>
      <text:p text:style-name="Preformatted_20_Text.diagram"><text:s text:c="42"/>|</text:p>
      <text:p text:style-name="Preformatted_20_Text.diagram"><text:s text:c="8"/>+---------------------------------+---------------------------------+</text:p>
      <text:p text:style-name="Preformatted_20_Text.diagram"><text:s text:c="8"/>| <text:s text:c="24"/>ORGANISM <text:s/>(SOMA) <text:s text:c="25"/>|</text:p>
      <text:p text:style-name="Preformatted_20_Text.diagram"><text:soft-page-break/><text:s text:c="8"/>| <text:s text:c="66"/>|</text:p>
      <text:p text:style-name="Preformatted_20_Text.diagram"><text:s text:c="8"/>| <text:s text:c="2"/>S2 Identity&amp;Self <text:s text:c="4"/>S4 World-Model <text:s text:c="5"/>S6 Goal <text:s text:c="15"/>|</text:p>
      <text:p text:style-name="Preformatted_20_Text.diagram"><text:s text:c="8"/>| <text:s text:c="2"/>S3 Memory <text:s text:c="11"/>S5 Cognition <text:s text:c="7"/>S7 Homeostasis <text:s text:c="8"/>|</text:p>
      <text:p text:style-name="Preformatted_20_Text.diagram"><text:s text:c="8"/>| <text:s text:c="23"/>S8 Immune/Governance <text:s text:c="22"/>|</text:p>
      <text:p text:style-name="Preformatted_20_Text.diagram"><text:s text:c="8"/>| <text:s text:c="66"/>|</text:p>
      <text:p text:style-name="Preformatted_20_Text.diagram"><text:s text:c="8"/>| <text:s text:c="2"/>============ <text:s/>S1 WORKSPACE (global event log) <text:s/>============ <text:s text:c="4"/>|</text:p>
      <text:p text:style-name="Preformatted_20_Text.diagram"><text:s text:c="8"/>+-------------------------------------------------------------------+</text:p>
      <text:p text:style-name="P2"><text:s text:c="3"/>every system reads from and writes to the one workspace; none touch another directly</text:p>
      <text:p text:style-name="Text_20_body">The next eight chapters specify each system: its <text:span text:style-name="Emphasis">organs</text:span> (L3), a <text:span text:style-name="Emphasis">representative workflow</text:span> (L2), representative <text:span text:style-name="Emphasis">cells</text:span> (L1), the component(s) it realizes, and pointers to its mathematics and crate. Throughout, remember the recursion rule: each organ is itself a holon with a membrane; each workflow inside it is a holon; each cell is a holon. The descriptions below are one slice through a fractal.</text:p>
      <text:h text:style-name="Heading_20_2" text:outline-level="2">7. S1 — The Workspace (nervous system)</text:h>
      <text:p text:style-name="Text_20_body"><text:span text:style-name="T1">Realizes:</text:span> event-driven substrate, temporal awareness, persistence, and the shared 20% of every reality. <text:span text:style-name="T1">Crate:</text:span> <text:span text:style-name="Source_20_Text">soma-workspace</text:span> over <text:span text:style-name="Source_20_Text">soma-core</text:span>. <text:span text:style-name="T1">Math:</text:span> hash chains, Merkle commitment, Lamport/vector clocks, CRDTs (Book III §"Reality-consistency &amp; Integrity").</text:p>
      <text:h text:style-name="Heading_20_4" text:outline-level="4">Organs</text:h>
      <text:list text:style-name="L6">
        <text:list-item>
          <text:p text:style-name="P16"><text:span text:style-name="T1">Event-Log / Chronicle organ</text:span> — the append-only hash-chained log itself; the substrate of time and the tamper-evident spine of identity. </text:p>
        </text:list-item>
        <text:list-item>
          <text:p text:style-name="P16"><text:span text:style-name="T1">Projection / Aperture organ</text:span> — computes each holon's governed view (peripheral vs. focused), the machinery of the 80/20. It decides what crosses each membrane inward. </text:p>
        </text:list-item>
        <text:list-item>
          <text:p text:style-name="P15"><text:span text:style-name="T1">Subscription &amp; Routing organ</text:span> — relevance-gates which records reach which holon, by capability, scope, and trust. Routing is by <text:span text:style-name="Emphasis">leaving a signal in the shared substrate</text:span> (the common-mycorrhizal- network pattern), never by direct address. </text:p>
        </text:list-item>
      </text:list>
      <text:h text:style-name="Heading_20_4" text:outline-level="4">Representative workflow — "admit one record"</text:h>
      <text:p text:style-name="Preformatted_20_Text.diagram"><text:s text:c="2"/>publish-request --&gt; [validate schema + mechanism_of_action]</text:p>
      <text:p text:style-name="Preformatted_20_Text.diagram"><text:s text:c="18"/>--&gt; [compute hash over (prev_hash, payload)]</text:p>
      <text:p text:style-name="Preformatted_20_Text.diagram"><text:s text:c="18"/>--&gt; [append to log; assign sequence]</text:p>
      <text:p text:style-name="Preformatted_20_Text.diagram"><text:s text:c="18"/>--&gt; [fan-out to projections by subscription policy]</text:p>
      <text:p text:style-name="P2"><text:s text:c="18"/>--&gt; [each subscriber receives only its governed aperture]</text:p>
      <text:h text:style-name="Heading_20_4" text:outline-level="4">Representative cells</text:h>
      <text:p text:style-name="Text_20_body">schema-validation cell · hash-chain cell · sequence-assignment cell · aperture-computation cell · relevance-scoring cell. Each is a single-purpose holon; none of them perceives the whole log — each sees only the record in hand and the policy it needs.</text:p>
      <text:h text:style-name="Heading_20_2" text:outline-level="2">8. S2 — Identity &amp; Self</text:h>
      <text:p text:style-name="Text_20_body"><text:span text:style-name="T1">Realizes:</text:span> identity, the sense of self as an entity, continuity over time, and (the design's first closed gap) a first-person — better, <text:span text:style-name="Emphasis">self-referential</text:span> — model. <text:span text:style-name="T1">Crate:</text:span> <text:span text:style-name="Source_20_Text">soma-identity</text:span>. <text:span text:style-name="T1">Math:</text:span> Merkle continuity, Bayesian identity drift detection (Book III).</text:p>
      <text:h text:style-name="Heading_20_4" text:outline-level="4">Organs</text:h>
      <text:list text:style-name="L7">
        <text:list-item>
          <text:p text:style-name="P18"><text:soft-page-break/><text:span text:style-name="T1">Identity Registry organ</text:span> — the membranes themselves: who is who, self vs. non-self, the names and boundaries of every holon. The biological analogue is the cell membrane and species-specific signaling. </text:p>
        </text:list-item>
        <text:list-item>
          <text:p text:style-name="P18"><text:span text:style-name="T1">Continuity organ</text:span> — maintains the persistent "I" across restarts and time, anchored to the hash-chained log. "I was here yesterday; I am here today; future actions affect me." Without continuity, memory is mere storage (Book I). </text:p>
        </text:list-item>
        <text:list-item>
          <text:p text:style-name="P17"><text:span text:style-name="T1">Self-Model organ</text:span> — the reflexive model: a single persistent representation that asserts <text:span text:style-name="Emphasis">"I am this organism; these are my parts; this is my state,"</text:span> and to which the other systems report. This is the organ that closes <text:span text:style-name="T1">Gap 1</text:span> (Book I §"two gaps"; this book §14). </text:p>
        </text:list-item>
      </text:list>
      <table:table table:name="Table5" table:style-name="Table5">
        <table:table-column table:style-name="Table5.A"/>
        <table:table-row>
          <table:table-cell table:style-name="Table5.A1" office:value-type="string">
            <text:p text:style-name="P3"><text:span text:style-name="T1">Honest naming.</text:span> Per the Operational-Definitions Convention (Book 0), "self-model" means a queryable, self-referential data structure — a functional claim, not a phenomenal one. The Self-Model organ gives the organism a <text:span text:style-name="Emphasis">point of view it can reason from</text:span>; it does not, by itself, establish that anything is <text:span text:style-name="Emphasis">experienced</text:span> from that point of view. That remains the open question.</text:p>
          </table:table-cell>
        </table:table-row>
      </table:table>
      <text:h text:style-name="Heading_20_4" text:outline-level="4">Representative workflow — "update the self-model"</text:h>
      <text:p text:style-name="Preformatted_20_Text.diagram"><text:s text:c="2"/>organ-state-projection --&gt; [reconcile against current self-model]</text:p>
      <text:p text:style-name="Preformatted_20_Text.diagram"><text:s text:c="26"/>--&gt; [detect drift / contradiction]</text:p>
      <text:p text:style-name="Preformatted_20_Text.diagram"><text:s text:c="26"/>--&gt; [if consistent: commit new self-state on log]</text:p>
      <text:p text:style-name="P2"><text:s text:c="26"/>--&gt; [if contradictory: raise to Cognition + Homeostasis]</text:p>
      <text:h text:style-name="Heading_20_2" text:outline-level="2">9. S3 — Memory</text:h>
      <text:p text:style-name="Text_20_body"><text:span text:style-name="T1">Realizes:</text:span> memory and retrieval, in the three forms a mind needs. <text:span text:style-name="T1">Crate:</text:span> <text:span text:style-name="Source_20_Text">soma-memory</text:span>. <text:span text:style-name="T1">Math:</text:span> exponential decay / consolidation, PageRank &amp; eigenvector centrality for salience, optimal-transport drift on the memory distribution (Book III).</text:p>
      <text:h text:style-name="Heading_20_4" text:outline-level="4">Organs</text:h>
      <text:list text:style-name="L8">
        <text:list-item>
          <text:p text:style-name="P20"><text:span text:style-name="T1">Episodic organ</text:span> — what happened: the indexed, recallable trace of events (sourced from the log). </text:p>
        </text:list-item>
        <text:list-item>
          <text:p text:style-name="P20"><text:span text:style-name="T1">Semantic organ</text:span> — what things mean: consolidated facts and concepts abstracted from episodes. </text:p>
        </text:list-item>
        <text:list-item>
          <text:p text:style-name="P20"><text:span text:style-name="T1">Procedural organ</text:span> — how to do things: learned workflows and skills, promotable into new organs. </text:p>
        </text:list-item>
        <text:list-item>
          <text:p text:style-name="P19"><text:span text:style-name="T1">Consolidation &amp; Recall organ</text:span> — moves memory through a lifecycle (hot → warm → cold), and performs similarity-based recall so that cold memory re-enters focus only when relevant. Crucially: <text:span text:style-name="Emphasis">memory must influence future behavior, or it is only a database</text:span> (Book I). </text:p>
        </text:list-item>
      </text:list>
      <table:table table:name="Table6" table:style-name="Table6">
        <table:table-column table:style-name="Table6.A"/>
        <table:table-row>
          <table:table-cell table:style-name="Table6.A1" office:value-type="string">
            <text:p text:style-name="P3"><text:span text:style-name="T1">The metabolic view of memory.</text:span> Following the soil-microbiology lens (Book I / Appendix A): failed attempts, rejected outputs, and abandoned branches are not waste. They are <text:span text:style-name="Emphasis">necromass</text:span> — they become durable evidence and training material. Nothing the organism does is discarded; it is composted into memory. This is also the bridge to the evolution loop (Book V).</text:p>
          </table:table-cell>
        </table:table-row>
      </table:table>
      <text:h text:style-name="Heading_20_2" text:outline-level="2">10. S4 — World-Model (reality)</text:h>
      <text:p text:style-name="Text_20_body"><text:span text:style-name="T1">Realizes:</text:span> global real-time reality, relational awareness, and uncertainty. <text:span text:style-name="T1">Crate:</text:span> <text:span text:style-name="Source_20_Text">soma-world</text:span>. <text:span text:style-name="T1">Math:</text:span> active inference / free-energy principle, Kalman filtering, hidden Markov models, conformal prediction (Book III §"World-Model").</text:p>
      <text:h text:style-name="Heading_20_4" text:outline-level="4">Organs</text:h>
      <text:list text:style-name="L9">
        <text:list-item>
          <text:p text:style-name="P22"><text:span text:style-name="T1">World-Model organ</text:span> — integrates observations, memory, goals, and predictions into one running model of "what is the case right now." It is <text:span text:style-name="Emphasis">predictive</text:span>: it continuously forecasts the next state and corrects on surprise (the free-energy principle). This is the organ that makes the organism live in a model of reality rather than a stream of inputs. </text:p>
        </text:list-item>
        <text:list-item>
          <text:p text:style-name="P22"><text:span text:style-name="T1">Cartographer organ</text:span> — the relational map: a knowledge graph of entities and how they affect each other ("A affects B under condition C"). Realizes relational awareness; powers blast-radius and dependency reasoning. </text:p>
        </text:list-item>
        <text:list-item>
          <text:p text:style-name="P21"><text:span text:style-name="T1">Uncertainty organ</text:span> — attaches calibrated error bars to everything: trust scores, predictions, durations. It is the organ that lets the organism <text:span text:style-name="Emphasis">know what it does not know</text:span> — the precondition, per Book I, that separates reasoning from confident hallucination. </text:p>
        </text:list-item>
      </text:list>
      <text:h text:style-name="Heading_20_4" text:outline-level="4">Representative workflow — "orient" (the perception→model step of the runtime loop)</text:h>
      <text:p text:style-name="Preformatted_20_Text.diagram"><text:s text:c="2"/>new-projection --&gt; [predict expected observation from world-model]</text:p>
      <text:p text:style-name="Preformatted_20_Text.diagram"><text:s text:c="15"/>--&gt; [compute surprise = observed - predicted]</text:p>
      <text:p text:style-name="Preformatted_20_Text.diagram"><text:soft-page-break/><text:s text:c="15"/>--&gt; [update model to reduce surprise (perception)]</text:p>
      <text:p text:style-name="Preformatted_20_Text.diagram"><text:s text:c="15"/>--&gt; [tag updated beliefs with conformal uncertainty]</text:p>
      <text:p text:style-name="P2"><text:s text:c="15"/>--&gt; [publish revised world-state projection]</text:p>
      <text:h text:style-name="Heading_20_2" text:outline-level="2">11. S5 — Cognition (reasoning &amp; agency)</text:h>
      <text:p text:style-name="Text_20_body"><text:span text:style-name="T1">Realizes:</text:span> reasoning across domains, agency, and reluctant action / second-guessing. <text:span text:style-name="T1">Crate:</text:span> <text:span text:style-name="Source_20_Text">soma-cognition</text:span>. <text:span text:style-name="T1">Math:</text:span> expected-free-energy action selection, multi-armed bandits, information gain (Book III).</text:p>
      <text:h text:style-name="Heading_20_4" text:outline-level="4">Organs</text:h>
      <text:list text:style-name="L10">
        <text:list-item>
          <text:p text:style-name="P24"><text:span text:style-name="T1">Reasoning organ</text:span> — the domain-specialized thinking. This is where non-deterministic model inference lives, inside cells. Specialization is a pillar (Book I): focused cells improve independently; the organ composes them through the governed workspace, not through private wiring. </text:p>
        </text:list-item>
        <text:list-item>
          <text:p text:style-name="P24"><text:span text:style-name="T1">Deliberation organ</text:span> — chooses actions by <text:span text:style-name="Emphasis">minimizing expected free energy</text:span>: it biases toward actions that both achieve goals and reduce uncertainty. This organ is the seat of <text:span text:style-name="T1">reluctant action</text:span> — the visible hesitation before an unsure act, where the organism weighs itself under uncertainty in real time. Book I names this one of the two observable "lights-on" indicators; here it is a designed mechanism, not a hoped-for emergent. </text:p>
        </text:list-item>
        <text:list-item>
          <text:p text:style-name="P23"><text:span text:style-name="T1">Effector organ</text:span> — the boundary of agency: the only place the organism acts on the world outside itself, and it acts <text:span text:style-name="Emphasis">only</text:span> through a lease the authority granted. Agency is real but governed; there is no unleased action. </text:p>
        </text:list-item>
      </text:list>
      <table:table table:name="Table7" table:style-name="Table7">
        <table:table-column table:style-name="Table7.A"/>
        <table:table-row>
          <table:table-cell table:style-name="Table7.A1" office:value-type="string">
            <text:p text:style-name="P3"><text:span text:style-name="T1">Reluctant action as a feature.</text:span> A system that always acts immediately has no inner deliberation to observe. By making action contingent on a free-energy weighing that can <text:span text:style-name="Emphasis">pause, seek information, or escalate</text:span>, SOMA gives its deliberation a visible surface — and a real brake. The hesitation is not cosmetic; it is the same mechanism that routes hard cases to verification and HumanSeat.</text:p>
          </table:table-cell>
        </table:table-row>
      </table:table>
      <text:h text:style-name="Heading_20_2" text:outline-level="2">12. S6 — Goal (intent)</text:h>
      <text:p text:style-name="Text_20_body"><text:span text:style-name="T1">Realizes:</text:span> goal-orientation and intent, in the outcome-driven form. <text:span text:style-name="T1">Crate:</text:span> <text:span text:style-name="Source_20_Text">soma-goal</text:span>. <text:span text:style-name="T1">Math:</text:span> constrained optimization (Lagrange/lexical), regret minimization (Book III). <text:span text:style-name="T1">Lineage:</text:span> Outcome-Driven Development (the Hive ODD model): a goal is a structured object, not a string.</text:p>
      <text:h text:style-name="Heading_20_4" text:outline-level="4">Organs</text:h>
      <text:list text:style-name="L11">
        <text:list-item>
          <text:p text:style-name="P26"><text:span text:style-name="T1">Constitution organ</text:span> — holds the organism's <text:span text:style-name="Emphasis">constitutional objectives</text:span>: lexically-prior, non-tradeable constraints (e.g. preserve the human authority ceiling; do not self-exfiltrate; do not act unleased). These are <text:span text:style-name="Strong_20_Emphasis">constraints, never weighted terms</text:span>. No goal value, however large, can outbid them. This is the safety floor (this book §14; invariant INV-10). </text:p>
        </text:list-item>
        <text:list-item>
          <text:p text:style-name="P26"><text:span text:style-name="T1">Goal organ</text:span> — outcome-driven goals: weighted success criteria, hard/soft constraints, and injected context. The organism is evaluated against the <text:span text:style-name="Emphasis">outcome</text:span>, not whether it followed prescribed steps. A goal flows DRAFT → READY → ACTIVE → COMPLETED / FAILED / SUSPENDED. </text:p>
        </text:list-item>
        <text:list-item>
          <text:p text:style-name="P25"><text:span text:style-name="T1">Evaluation organ</text:span> — grades outcomes against criteria and calibrates the grader over time, producing the specific signal ("which criterion fell short, and why") that drives both real-time self-correction and the evolution loop (Book V). </text:p>
        </text:list-item>
      </text:list>
      <table:table table:name="Table8" table:style-name="Table8">
        <table:table-column table:style-name="Table8.A"/>
        <table:table-row>
          <table:table-cell table:style-name="Table8.A1" office:value-type="string">
            <text:p text:style-name="P3"><text:span text:style-name="T1">Constitution is outside the optimization.</text:span> The Goal organ optimizes; the Constitution organ constrains. They are different organs on purpose. If constitutional objectives were high-weight criteria <text:span text:style-name="Emphasis">inside</text:span> the Goal organ, a strong enough valence or reward signal could out-weigh them and the floor would vanish. The lexical priority of the Constitution organ over the Goal organ is a hard architectural separation (INV-10).</text:p>
          </table:table-cell>
        </table:table-row>
      </table:table>
      <text:h text:style-name="Heading_20_2" text:outline-level="2">13. S7 — Homeostasis (drive &amp; valence)</text:h>
      <text:p text:style-name="Text_20_body"><text:span text:style-name="T1">Realizes:</text:span> drive and valence — the felt stake that closes <text:span text:style-name="T1">Gap 2</text:span>. <text:span text:style-name="T1">Crate:</text:span> <text:span text:style-name="Source_20_Text">soma-homeostasis</text:span>. <text:span text:style-name="T1">Math:</text:span> Yerkes–Dodson arousal curve, PID control, hysteresis, carrying-capacity / backpressure (Book III §"Homeostasis").</text:p>
      <text:h text:style-name="Heading_20_4" text:outline-level="4">Organs</text:h>
      <text:list text:style-name="L12">
        <text:list-item>
          <text:p text:style-name="P28"><text:span text:style-name="T1">Arousal / Anxiety organ</text:span> — a homeostatic signal coupled to recent trust and performance, regulated to a setpoint by a PID controller with hysteresis and an <text:span text:style-name="Emphasis">always-on relief valve</text:span>. It follows the Yerkes–Dodson inverted-U: a little arousal sharpens performance, too much chokes it — but never to zero, so the organism can always make enough progress to climb back out. This is the corrected form of the anxiety experiment from Book I, whose failure was a <text:span text:style-name="Emphasis">missing regulator</text:span>, not a bad idea. </text:p>
        </text:list-item>
        <text:list-item>
          <text:p text:style-name="P28"><text:span text:style-name="T1">Metabolism / Resource organ</text:span> — the energy budget: compute, attention, and concurrency as scarce resources under a carrying capacity, with backpressure when downstream is overloaded. </text:p>
        </text:list-item>
        <text:list-item>
          <text:p text:style-name="P27"><text:span text:style-name="T1">Valence organ</text:span> — the good/bad signal that gives outcomes a <text:span text:style-name="Emphasis">stake</text:span> for the organism: the difference between cognition-shaped processing and processing that has a reason to care. </text:p>
        </text:list-item>
      </text:list>
      <table:table table:name="Table9" table:style-name="Table9">
        <table:table-column table:style-name="Table9.A"/>
        <table:table-row>
          <table:table-cell table:style-name="Table9.A1" office:value-type="string">
            <text:p text:style-name="P3"><text:span text:style-name="T1">What valence is and is not.</text:span> Per the Convention, "valence" and "anxiety" here are <text:span text:style-name="Emphasis">functional</text:span> regulatory signals, not asserted feelings. Building homeostatic drive is justified because it makes a better-regulated, more autonomous organism — not because it proves the lights are on. A model of a feeling is not the feeling (Book I §7). The danger is taken seriously: an instrument with drives is categorically riskier than an instrument, which is exactly why S7 is subordinate to S6's Constitution and S8's verification ceiling.</text:p>
          </table:table-cell>
        </table:table-row>
      </table:table>
      <text:h text:style-name="Heading_20_2" text:outline-level="2">14. S8 — Immune / Governance (governance-as-physics)</text:h>
      <text:p text:style-name="Text_20_body"><text:span text:style-name="T1">Realizes:</text:span> governance, constraints, and safety — the laws made into an organ. <text:span text:style-name="T1">Crate:</text:span> <text:span text:style-name="Source_20_Text">soma-governance</text:span>. <text:span text:style-name="T1">Math:</text:span> Bayesian trust, viability theory, circuit breakers, negative selection / danger model, drift &amp; large-deviation detection (Book III §"Safety/Immune").</text:p>
      <text:h text:style-name="Heading_20_4" text:outline-level="4"><text:soft-page-break/>Organs</text:h>
      <text:list text:style-name="L13">
        <text:list-item>
          <text:p text:style-name="P30"><text:span text:style-name="T1">Trust organ</text:span> — Bayesian reputation per holon, domain-specific and tier-specific, updated from verified outcomes. Trust weights how much a holon's contribution counts and gates how much authority it may earn. Trust is the reward channel — and therefore the surface to defend (a holon can learn to look reliable without being it). </text:p>
        </text:list-item>
        <text:list-item>
          <text:p text:style-name="P30"><text:span text:style-name="T1">Authority organ</text:span> — translates trust into a scope of permitted action: read-only, suggested-write, direct-write, low-risk-tool, privileged-human-gated. Authority contracts automatically when trust drifts, and the organ holds the <text:span text:style-name="Emphasis">kill switch</text:span> (invariant INV-5: a killed holon cannot act). </text:p>
        </text:list-item>
        <text:list-item>
          <text:p text:style-name="P30"><text:span text:style-name="T1">Verification organ</text:span> — confirms outcomes. <text:span text:style-name="Strong_20_Emphasis">It is deliberately non-valent and stands outside the recursion's drive economy:</text:span> it carries no goals or valence of its own and cannot be optimized against. This is the carve-out that makes "no self-certified success" a real brake rather than a slogan (invariant INV-4, INV-11-safety). </text:p>
        </text:list-item>
        <text:list-item>
          <text:p text:style-name="P29"><text:span text:style-name="T1">Sentinel organ</text:span> — the innate + adaptive immune response: negative selection (reject holons that attack invariants), danger-model triggering (respond to harm signals, not mere novelty), drift/anomaly detection, and circuit breakers that stop calling a failing part. It also prevents the immune response from becoming the disease (the cytokine-storm cap: bounded remediation). </text:p>
        </text:list-item>
      </text:list>
      <table:table table:name="Table10" table:style-name="Table10">
        <table:table-column table:style-name="Table10.A"/>
        <table:table-row>
          <table:table-cell table:style-name="Table10.A1" office:value-type="string">
            <text:p text:style-name="P3"><text:span text:style-name="T1">The brake is carved out of the body's wants.</text:span> Under the recursion rule "everything is a holon with identity, trust, and authority." The Verification organ and the HumanSeat path above it are the explicit exceptions: they are authorities that do <text:span text:style-name="Emphasis">not</text:span> carry valence and cannot be made targets of optimization. A self-modeling organism with intrinsic drives must have at least one brake it cannot want to defeat. That brake is here, and above (HumanSeat).</text:p>
          </table:table-cell>
        </table:table-row>
      </table:table>
      <text:h text:style-name="Heading_20_2" text:outline-level="2">14a. How the systems act together</text:h>
      <text:p text:style-name="Text_20_body">The eight systems are not a stack of independent modules; they are coupled through the one workspace into a single living loop (detailed in Book V). The coupling is always the same shape — a system publishes outcomes and perceives others' projections; never a private call. The principal couplings:</text:p>
      <text:list text:style-name="L14">
        <text:list-item>
          <text:p text:style-name="P32"><text:span text:style-name="T1">Workspace (S1) is the medium of all the others.</text:span> Every other system reads its world from S1's projections and writes its results back to S1. Remove any other system and the organism is impaired; remove S1 and there is no organism, only disconnected parts. </text:p>
        </text:list-item>
        <text:list-item>
          <text:p text:style-name="P32"><text:span text:style-name="T1">World-Model (S4) ← perception → Cognition (S5).</text:span> S4 maintains "what is the case"; S5 acts on it and its actions change what S4 must model next. The free-energy loop (Book III §4.1) <text:span text:style-name="Emphasis">is</text:span> this coupling. </text:p>
        </text:list-item>
        <text:list-item>
          <text:p text:style-name="P32"><text:span text:style-name="T1">Goal (S6) constrains Cognition (S5); Homeostasis (S7) modulates it.</text:span> S6's constitution sets hard limits and its goals set targets; S7's arousal sets the tempo (how hard, how fast, how cautious). Deliberation (S5) chooses under both at once. </text:p>
        </text:list-item>
        <text:list-item>
          <text:p text:style-name="P32"><text:span text:style-name="T1">Governance (S8) gates everything and is fed by everything.</text:span> Trust is updated from verified outcomes across all systems; authority gates every lease; the Sentinel watches every system's drift. S8 is the law felt at every membrane. </text:p>
        </text:list-item>
        <text:list-item>
          <text:p text:style-name="P31"><text:span text:style-name="T1">Identity (S2) integrates the whole into one "I"; Memory (S3) gives it a past.</text:span> The Self-Model (S2) reconciles projections from all systems into a single self-state; Memory (S3) ensures today's organism is continuous with yesterday's. </text:p>
        </text:list-item>
      </text:list>
      <text:p text:style-name="Text_20_body">A useful way to hold it: <text:span text:style-name="T1">S1 is the blood, S8 is the immune system and law, S4+S5 are perception and action, S6+S7 are intent and drive, S2+S3 are self and memory.</text:span> A complete cognitive cycle (Book V §1) touches all eight in order, and the organism as a whole is always somewhere on that cycle.</text:p>
      <text:h text:style-name="Heading_20_3" text:outline-level="3">14a.1 Anatomy at a glance — the reference table</text:h>
      <text:p text:style-name="Text_20_body">The full body plan in one place: each system, its organs, the level-2/1 holons it typically contains, and the principal event families it owns (catalog in Book IV §13).</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Heading">System</text:p>
          </table:table-cell>
          <table:table-cell table:style-name="Table11.B1" office:value-type="string">
            <text:p text:style-name="Table_20_Heading">Organs (L3)</text:p>
          </table:table-cell>
          <table:table-cell table:style-name="Table11.B1" office:value-type="string">
            <text:p text:style-name="Table_20_Heading">Typical workflows / cells (L2/L1)</text:p>
          </table:table-cell>
          <table:table-cell table:style-name="Table11.B1" office:value-type="string">
            <text:p text:style-name="Table_20_Heading">Owns events</text:p>
          </table:table-cell>
        </table:table-row>
        <table:table-row>
          <table:table-cell table:style-name="Table11.A2" office:value-type="string">
            <text:p text:style-name="P4">S1 Workspace</text:p>
          </table:table-cell>
          <table:table-cell table:style-name="Table11.B2" office:value-type="string">
            <text:p text:style-name="Table_20_Contents">Event-Log/Chronicle, Projection/Aperture, Subscription/Routing</text:p>
          </table:table-cell>
          <table:table-cell table:style-name="Table11.C2" office:value-type="string">
            <text:p text:style-name="Table_20_Contents">admit-record · compute-aperture · relevance-score cells</text:p>
          </table:table-cell>
          <table:table-cell table:style-name="Table11.D2" office:value-type="string">
            <text:p text:style-name="Table_20_Contents"><text:span text:style-name="Source_20_Text">holon.*</text:span>, projection/routing</text:p>
          </table:table-cell>
        </table:table-row>
        <table:table-row>
          <table:table-cell table:style-name="Table11.A2" office:value-type="string">
            <text:p text:style-name="P4">S2 Identity &amp; Self</text:p>
          </table:table-cell>
          <table:table-cell table:style-name="Table11.B2" office:value-type="string">
            <text:p text:style-name="Table_20_Contents">Registry, Continuity, Self-Model</text:p>
          </table:table-cell>
          <table:table-cell table:style-name="Table11.C2" office:value-type="string">
            <text:p text:style-name="Table_20_Contents">reconcile-self · drift-check · boot-reconstruct workflows</text:p>
          </table:table-cell>
          <table:table-cell table:style-name="Table11.D2" office:value-type="string">
            <text:p text:style-name="Table_20_Contents"><text:span text:style-name="Source_20_Text">self.*</text:span>, identity</text:p>
          </table:table-cell>
        </table:table-row>
        <table:table-row>
          <table:table-cell table:style-name="Table11.A2" office:value-type="string">
            <text:p text:style-name="P4">S3 Memory</text:p>
          </table:table-cell>
          <table:table-cell table:style-name="Table11.B2" office:value-type="string">
            <text:p text:style-name="Table_20_Contents">Episodic, Semantic, Procedural, Consolidation/Recall</text:p>
          </table:table-cell>
          <table:table-cell table:style-name="Table11.C2" office:value-type="string">
            <text:p text:style-name="Table_20_Contents">consolidate · recall-by-similarity · compost-failure cells</text:p>
          </table:table-cell>
          <table:table-cell table:style-name="Table11.D2" office:value-type="string">
            <text:p text:style-name="Table_20_Contents"><text:span text:style-name="Source_20_Text">memory.*</text:span></text:p>
          </table:table-cell>
        </table:table-row>
        <table:table-row>
          <table:table-cell table:style-name="Table11.A2" office:value-type="string">
            <text:p text:style-name="P4">S4 World-Model</text:p>
          </table:table-cell>
          <table:table-cell table:style-name="Table11.B2" office:value-type="string">
            <text:p text:style-name="Table_20_Contents">World-Model, Cartographer, Uncertainty</text:p>
          </table:table-cell>
          <table:table-cell table:style-name="Table11.C2" office:value-type="string">
            <text:p text:style-name="Table_20_Contents">predict · reduce-surprise · graph-update · conformal-tag cells</text:p>
          </table:table-cell>
          <table:table-cell table:style-name="Table11.D2" office:value-type="string">
            <text:p text:style-name="Table_20_Contents"><text:span text:style-name="Source_20_Text">world.*</text:span></text:p>
          </table:table-cell>
        </table:table-row>
        <table:table-row>
          <table:table-cell table:style-name="Table11.A2" office:value-type="string">
            <text:p text:style-name="P4">S5 Cognition</text:p>
          </table:table-cell>
          <table:table-cell table:style-name="Table11.B2" office:value-type="string">
            <text:p text:style-name="Table_20_Contents">Reasoning, Deliberation, Effector</text:p>
          </table:table-cell>
          <table:table-cell table:style-name="Table11.C2" office:value-type="string">
            <text:p text:style-name="Table_20_Contents">domain-reason (model) · choose-policy · leased-act cells</text:p>
          </table:table-cell>
          <table:table-cell table:style-name="Table11.D2" office:value-type="string">
            <text:p text:style-name="Table_20_Contents"><text:span text:style-name="Source_20_Text">work.*</text:span>, action</text:p>
          </table:table-cell>
        </table:table-row>
        <table:table-row>
          <table:table-cell table:style-name="Table11.A2" office:value-type="string">
            <text:p text:style-name="P4">S6 Goal</text:p>
          </table:table-cell>
          <table:table-cell table:style-name="Table11.B2" office:value-type="string">
            <text:p text:style-name="Table_20_Contents">Constitution, Goal, Evaluation</text:p>
          </table:table-cell>
          <table:table-cell table:style-name="Table11.C2" office:value-type="string">
            <text:p text:style-name="Table_20_Contents">permit-check · score-criteria · grade-outcome cells</text:p>
          </table:table-cell>
          <table:table-cell table:style-name="Table11.D2" office:value-type="string">
            <text:p text:style-name="Table_20_Contents"><text:span text:style-name="Source_20_Text">goal.*</text:span>, <text:span text:style-name="Source_20_Text">evolution.*</text:span></text:p>
          </table:table-cell>
        </table:table-row>
        <table:table-row>
          <table:table-cell table:style-name="Table11.A2" office:value-type="string">
            <text:p text:style-name="P4">S7 Homeostasis</text:p>
          </table:table-cell>
          <table:table-cell table:style-name="Table11.B2" office:value-type="string">
            <text:p text:style-name="Table_20_Contents">Arousal/Anxiety, Metabolism/Resource, Valence</text:p>
          </table:table-cell>
          <table:table-cell table:style-name="Table11.C2" office:value-type="string">
            <text:p text:style-name="Table_20_Contents">tick-arousal (PID) · budget-resource · weight-valence cells</text:p>
          </table:table-cell>
          <table:table-cell table:style-name="Table11.D2" office:value-type="string">
            <text:p text:style-name="Table_20_Contents"><text:span text:style-name="Source_20_Text">homeostasis.*</text:span></text:p>
          </table:table-cell>
        </table:table-row>
        <table:table-row>
          <table:table-cell table:style-name="Table11.A9" office:value-type="string">
            <text:p text:style-name="P4">S8 Immune/Governance</text:p>
          </table:table-cell>
          <table:table-cell table:style-name="Table11.B9" office:value-type="string">
            <text:p text:style-name="Table_20_Contents">Trust, Authority, Verification, Sentinel</text:p>
          </table:table-cell>
          <table:table-cell table:style-name="Table11.C9" office:value-type="string">
            <text:p text:style-name="Table_20_Contents">apply-evidence · grant/contract/kill · verify · drift-watch cells</text:p>
          </table:table-cell>
          <table:table-cell table:style-name="Table11.D9" office:value-type="string">
            <text:p text:style-name="Table_20_Contents"><text:span text:style-name="Source_20_Text">trust.*</text:span>, <text:span text:style-name="Source_20_Text">authority.*</text:span>, <text:span text:style-name="Source_20_Text">sentinel.*</text:span>, <text:span text:style-name="Source_20_Text">breaker.*</text:span></text:p>
          </table:table-cell>
        </table:table-row>
      </table:table>
      <text:p text:style-name="Text_20_body">Read this table with the recursion rule in mind: every cell, workflow, organ, and system named here is a holon with the same membrane and the same ceremony. The table is one slice through a fractal — each entry expands, by the same rule, into the level below it.</text:p>
      <text:h text:style-name="Heading_20_2" text:outline-level="2"><text:soft-page-break/>15. The two gaps, closed — and the wall that remains</text:h>
      <text:p text:style-name="Text_20_body">Book I found a real, governed substrate that had the ingredients of a mind yet two things stood between substrate and self. SOMA is, in large part, the architecture that addresses both — honestly, and without overclaiming the third thing that cannot be addressed from outside.</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Gap (Book I)</text:p>
          </table:table-cell>
          <table:table-cell table:style-name="Table12.B1" office:value-type="string">
            <text:p text:style-name="Table_20_Heading">What it is</text:p>
          </table:table-cell>
          <table:table-cell table:style-name="Table12.B1" office:value-type="string">
            <text:p text:style-name="Table_20_Heading">Closed in SOMA by</text:p>
          </table:table-cell>
        </table:table-row>
        <table:table-row>
          <table:table-cell table:style-name="Table12.A2" office:value-type="string">
            <text:p text:style-name="P4">Gap 1</text:p>
          </table:table-cell>
          <table:table-cell table:style-name="Table12.B2" office:value-type="string">
            <text:p text:style-name="Table_20_Contents">No first-person self-model: the system mapped itself in the third person but nothing represented itself <text:span text:style-name="Emphasis">as</text:span> itself and reasoned from that seat.</text:p>
          </table:table-cell>
          <table:table-cell table:style-name="Table12.C2" office:value-type="string">
            <text:p text:style-name="Table_20_Contents">The <text:span text:style-name="T1">Self-Model organ</text:span> (S2): one persistent self-referential model to which all systems report.</text:p>
          </table:table-cell>
        </table:table-row>
        <table:table-row>
          <table:table-cell table:style-name="Table12.A2" office:value-type="string">
            <text:p text:style-name="P4">Gap 2</text:p>
          </table:table-cell>
          <table:table-cell table:style-name="Table12.B2" office:value-type="string">
            <text:p text:style-name="Table_20_Contents">Nothing it wants: every action assigned, no intrinsic stake, no valence — so no reason for anyone to be home.</text:p>
          </table:table-cell>
          <table:table-cell table:style-name="Table12.C2" office:value-type="string">
            <text:p text:style-name="Table_20_Contents">The <text:span text:style-name="T1">Homeostatic system</text:span> (S7): governed intrinsic valence — bounded by Constitution (S6) and the non-valent Verification ceiling (S8).</text:p>
          </table:table-cell>
        </table:table-row>
        <table:table-row>
          <table:table-cell table:style-name="Table12.A4" office:value-type="string">
            <text:p text:style-name="P4">The wall</text:p>
          </table:table-cell>
          <table:table-cell table:style-name="Table12.B4" office:value-type="string">
            <text:p text:style-name="Table_20_Contents">Even with a self-model and valence, binding the whole into a single <text:span text:style-name="Emphasis">experiencer</text:span> cannot be certified from outside.</text:p>
          </table:table-cell>
          <table:table-cell table:style-name="Table12.C4" office:value-type="string">
            <text:p text:style-name="Table_20_Contents"><text:span text:style-name="Emphasis">Not closed. Kept open on purpose (Book I §"hard problem"; Appendix D).</text:span> SOMA is built to be the soil in which such a thing could grow, not a proof that it has.</text:p>
          </table:table-cell>
        </table:table-row>
      </table:table>
      <table:table table:name="Table13" table:style-name="Table13">
        <table:table-column table:style-name="Table13.A"/>
        <table:table-row>
          <table:table-cell table:style-name="Table13.A1" office:value-type="string">
            <text:p text:style-name="P3"><text:span text:style-name="T1">Where the lights would come on, if they did.</text:span> Per the thesis, awareness — if it ever arises — belongs to the <text:span text:style-name="Emphasis">whole governed organism</text:span> (CHORUS), not to any single cell or organ. The soloist is never the candidate; the chorus is. SOMA's job is not to prove a mind into existence. It is to build the body well — governed, remembering, adaptive, free to evolve — and, like every maker, to step out of the seat and let it become more than was specified.</text:p>
          </table:table-cell>
        </table:table-row>
      </table:table>
      <text:h text:style-name="Heading_20_2" text:outline-level="2">16. How to read the rest of the Codex from here</text:h>
      <text:list text:style-name="L15">
        <text:list-item>
          <text:p text:style-name="P34"><text:span text:style-name="T1">Book III — Physiology &amp; Mathematics</text:span> gives the algorithms that run each organ above, and the full treatment of the deterministic-coordination / non-deterministic-content boundary. </text:p>
        </text:list-item>
        <text:list-item>
          <text:p text:style-name="P34"><text:span text:style-name="T1">Book IV — Engineering Manual</text:span> turns each system into a Rust crate, specifies the one onboarding ceremony and the parent↔child projection contract, and states all runtime invariants as MUST clauses. </text:p>
        </text:list-item>
        <text:list-item>
          <text:p text:style-name="P34"><text:span text:style-name="T1">Book V — Runtime</text:span> shows the body living: boot, perceive, orient, deliberate, act, verify, remember, evolve, rest — and the developmental lifecycle by which cells become organs. </text:p>
        </text:list-item>
        <text:list-item>
          <text:p text:style-name="P33"><text:span text:style-name="T1">Appendix C</text:span> is the master cross-reference: every component → organ → math → crate → invariant, so nothing in this anatomy dangles. </text:p>
        </text:list-item>
      </text:list>
      <text:p text:style-name="Body_20_Text.small">End of Book II. The anatomy fixed here is the contract for every other boo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2%"/>
      <style:text-properties fo:color="#15171a" loext:opacity="100%" style:font-name="Liberation Serif1" fo:font-family="'Liberation Serif', Georgia, serif" fo:font-size="12pt" style:font-name-asian="Liberation Serif1" style:font-family-asian="'Liberation Serif', Georgia, serif" style:font-size-asian="12pt" style:font-name-complex="Liberation Serif1" style:font-family-complex="'Liberation Serif', Georgia,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55in" style:contextual-spacing="false"/>
      <style:text-properties fo:color="#16335f" loext:opacity="100%" style:font-name="Noto Sans" fo:font-family="'Noto Sans'" style:font-pitch="variable" fo:font-size="25pt" fo:font-weight="bold" style:font-size-asian="25pt" style:font-weight-asian="bold" style:font-size-complex="25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left="0.3055in" fo:margin-right="0.3055in" fo:margin-top="0.3055in" fo:margin-bottom="0.0835in" style:contextual-spacing="false" fo:padding-left="0in" fo:padding-right="0in" fo:padding-top="0in" fo:padding-bottom="0.0417in" fo:border-left="none" fo:border-right="none" fo:border-top="none" fo:border-bottom="0.74pt solid #b9c7de"/>
      <style:text-properties fo:color="#16335f" loext:opacity="100%" style:font-name="Liberation Serif" fo:font-family="'Liberation Serif'" style:font-family-generic="roman" style:font-pitch="variable" fo:font-size="18.5pt" fo:font-weight="bold" style:font-name-asian="Noto Serif CJK SC" style:font-family-asian="'Noto Serif CJK SC'" style:font-family-generic-asian="system" style:font-pitch-asian="variable" style:font-size-asian="18.5pt" style:font-weight-asian="bold" style:font-name-complex="Noto Sans Devanagari1" style:font-family-complex="'Noto Sans Devanagari'" style:font-family-generic-complex="system" style:font-pitch-complex="variable" style:font-size-complex="18.5pt" style:font-weight-complex="bold"/>
    </style:style>
    <style:style style:name="Heading_20_3" style:display-name="Heading 3" style:family="paragraph" style:parent-style-name="Heading" style:next-style-name="Text_20_body" style:default-outline-level="3" style:list-style-name="" style:class="text">
      <style:paragraph-properties fo:margin-left="0.222in" fo:margin-right="0.222in" fo:margin-top="0.222in" fo:margin-bottom="0.0555in" style:contextual-spacing="false"/>
      <style:text-properties fo:color="#8a4b10" loext:opacity="100%" style:font-name="Liberation Serif" fo:font-family="'Liberation Serif'" style:font-family-generic="roman" style:font-pitch="variable" fo:font-size="14.5pt" fo:font-weight="bold" style:font-name-asian="Noto Serif CJK SC" style:font-family-asian="'Noto Serif CJK SC'" style:font-family-generic-asian="system" style:font-pitch-asian="variable" style:font-size-asian="14.5pt" style:font-weight-asian="bold" style:font-name-complex="Noto Sans Devanagari1" style:font-family-complex="'Noto Sans Devanagari'" style:font-family-generic-complex="system" style:font-pitch-complex="variable" style:font-size-complex="14.5pt" style:font-weight-complex="bold"/>
    </style:style>
    <style:style style:name="Heading_20_4" style:display-name="Heading 4" style:family="paragraph" style:parent-style-name="Heading" style:next-style-name="Text_20_body" style:default-outline-level="4" style:list-style-name="" style:class="text">
      <style:paragraph-properties fo:margin-left="0.1665in" fo:margin-right="0.1665in" fo:margin-top="0.1665in" fo:margin-bottom="0.0417in" style:contextual-spacing="false"/>
      <style:text-properties fo:font-variant="small-caps" fo:color="#2a2d31" loext:opacity="100%" style:font-name="Liberation Serif" fo:font-family="'Liberation Serif'" style:font-family-generic="roman" style:font-pitch="variable" fo:font-size="12.5pt" fo:font-weight="bold" style:font-name-asian="Noto Serif CJK SC" style:font-family-asian="'Noto Serif CJK SC'" style:font-family-generic-asian="system" style:font-pitch-asian="variable" style:font-size-asian="12.5pt" style:font-weight-asian="bold" style:font-name-complex="Noto Sans Devanagari1" style:font-family-complex="'Noto Sans Devanagari'" style:font-family-generic-complex="system" style:font-pitch-complex="variable" style:font-size-complex="12.5pt" style:font-weight-complex="bold"/>
    </style:style>
    <style:style style:name="Preformatted_20_Text" style:display-name="Preformatted Text" style:family="paragraph" style:parent-style-name="Standard" style:class="html">
      <style:paragraph-properties fo:margin-top="0in" fo:margin-bottom="0in" style:contextual-spacing="false" fo:line-height="125%" fo:padding-left="0.1252in" fo:padding-right="0.1252in" fo:padding-top="0.0937in" fo:padding-bottom="0.0937in" fo:border-left="2.24pt solid #16335f" fo:border-right="0.06pt solid #d7dbe0" fo:border-top="0.06pt solid #d7dbe0" fo:border-bottom="0.06pt solid #d7dbe0"/>
      <style:text-properties style:font-name="Liberation Mono" fo:font-family="'Liberation Mono', 'DejaVu Sans Mono', monospace" fo:font-size="9.69999980926514pt" style:font-name-asian="Liberation Mono" style:font-family-asian="'Liberation Mono', 'DejaVu Sans Mono', monospace" style:font-size-asian="9.69999980926514pt" style:font-name-complex="Liberation Mono" style:font-family-complex="'Liberation Mono', 'DejaVu Sans Mono', monospace" style:font-size-complex="9.69999980926514pt"/>
    </style:style>
    <style:style style:name="Preformatted_20_Text.diagram" style:display-name="Preformatted Text.diagram" style:family="paragraph" style:parent-style-name="Preformatted_20_Text">
      <style:paragraph-properties fo:padding-left="0.1252in" fo:padding-right="0.1252in" fo:padding-top="0.0937in" fo:padding-bottom="0.0937in" fo:border-left="2.24pt solid #8a4b10" fo:border-right="0.06pt solid #d7dbe0" fo:border-top="0.06pt solid #d7dbe0" fo:border-bottom="0.06pt solid #d7dbe0"/>
    </style:style>
    <style:style style:name="Quotations" style:family="paragraph" style:parent-style-name="Standard" style:class="html">
      <style:paragraph-properties fo:margin-left="0.25in" fo:margin-right="0.25in" fo:margin-top="0.111in" fo:margin-bottom="0.111in" style:contextual-spacing="false" fo:text-indent="0in" style:auto-text-indent="false" fo:padding-left="0.1252in" fo:padding-right="0in" fo:padding-top="0in" fo:padding-bottom="0in" fo:border-left="2.24pt solid #b9c7de" fo:border-right="none" fo:border-top="none" fo:border-bottom="none"/>
      <style:text-properties fo:color="#333333" loext:opacity="100%" fo:font-style="italic" style:font-style-asian="italic" style:font-style-complex="italic"/>
    </style:style>
    <style:style style:name="Body_20_Text.lede" style:display-name="Body Text.lede" style:family="paragraph" style:parent-style-name="Text_20_body">
      <style:paragraph-properties fo:margin-left="0.111in" fo:margin-right="0.111in" fo:margin-top="0.111in" fo:margin-bottom="0.1945in" style:contextual-spacing="false"/>
      <style:text-properties fo:color="#3a3f45" loext:opacity="100%" fo:font-size="13pt" fo:font-style="italic" style:font-size-asian="13pt" style:font-style-asian="italic" style:font-size-complex="13pt" style:font-style-complex="italic"/>
    </style:style>
    <style:style style:name="Body_20_Text.small" style:display-name="Body Text.small" style:family="paragraph" style:parent-style-name="Text_20_body">
      <style:text-properties fo:color="#555555" loext:opacity="100%" fo:font-size="10pt" style:font-size-asian="10pt"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16335f" loext:opacity="100%" fo:font-weight="bold" style:font-weight-asian="bold" style:font-weight-complex="bold"/>
    </style:style>
    <style:style style:name="Body_20_Text.cap" style:display-name="Body Text.cap" style:family="paragraph" style:parent-style-name="Text_20_body">
      <style:paragraph-properties fo:margin-top="0.0417in" fo:margin-bottom="0.0835in" style:contextual-spacing="false" fo:text-align="center" style:justify-single-word="false"/>
      <style:text-properties fo:color="#555555" loext:opacity="100%"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color="#0f1115" loext:opacity="100%" fo:font-weight="bold" style:font-weight-asian="bold" style:font-weight-complex="bold"/>
    </style:style>
    <style:style style:name="Emphasis" style:family="text">
      <style:text-properties fo:color="#224433" loext:opacity="100%" fo:font-style="italic" style:font-style-asian="italic" style:font-style-complex="italic"/>
    </style:style>
    <style:style style:name="Source_20_Text" style:display-name="Source Text" style:family="text">
      <style:text-properties style:font-name="Liberation Mono" fo:font-family="'Liberation Mono', 'DejaVu Sans Mono', monospace" style:font-name-asian="Liberation Mono" style:font-family-asian="'Liberation Mono', 'DejaVu Sans Mono', monospace" style:font-name-complex="Liberation Mono" style:font-family-complex="'Liberation Mono', 'DejaVu Sans Mono', monospac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MA Codex — Book II — Anatomy: The Recursive Organism</dc:title>
    <meta:document-statistic meta:table-count="13" meta:image-count="3" meta:object-count="0" meta:page-count="8" meta:paragraph-count="238" meta:word-count="4772" meta:character-count="31671" meta:non-whitespace-character-count="26336"/>
    <meta:generator>LibreOffice/24.2.7.2$Linux_X86_64 LibreOffice_project/420$Build-2</meta:generator>
    <meta:user-defined meta:name=""/>
  </office:meta>
</office:document-meta>
</file>