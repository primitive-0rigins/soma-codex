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500000141879878F5.png" manifest:media-type="image/png"/>
  <manifest:file-entry manifest:full-path="Pictures/10000001000003D5000000F16A9B11BA.png" manifest:media-type="image/png"/>
  <manifest:file-entry manifest:full-path="Pictures/10000001000003850000028127124A1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Georgia, serif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88in" table:align="left"/>
    </style:style>
    <style:style style:name="Table1.A" style:family="table-column">
      <style:table-column-properties style:column-width="1.0139in"/>
    </style:style>
    <style:style style:name="Table1.B" style:family="table-column">
      <style:table-column-properties style:column-width="1.9882in"/>
    </style:style>
    <style:style style:name="Table1.C" style:family="table-column">
      <style:table-column-properties style:column-width="4.3167in"/>
    </style:style>
    <style:style style:name="Table1.A1" style:family="table-cell">
      <style:table-cell-properties style:vertical-align="middle" fo:background-color="#eaf2ff" fo:padding="0.0625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B1" style:family="table-cell">
      <style:table-cell-properties style:vertical-align="middle" fo:background-color="#eaf2ff" fo:padding="0.0625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3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4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6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7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7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7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8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1.B8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C8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1.A9" style:family="table-cell">
      <style:table-cell-properties style:vertical-align="middle" fo:padding="0.0625in" fo:border-left="0.75pt solid #808080" fo:border-right="0.75pt solid #808080" fo:border-top="none" fo:border-bottom="0.75pt solid #808080"/>
    </style:style>
    <style:style style:name="Table1.B9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1.C9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2" style:family="table">
      <style:table-properties style:width="7.3188in" table:align="left"/>
    </style:style>
    <style:style style:name="Table2.A" style:family="table-column">
      <style:table-column-properties style:column-width="7.3188in"/>
    </style:style>
    <style:style style:name="Table2.A1" style:family="table-cell">
      <style:table-cell-properties style:vertical-align="middle" fo:background-color="#fff7ec" fo:padding-left="0.1354in" fo:padding-right="0.1354in" fo:padding-top="0.0938in" fo:padding-bottom="0.0938in" fo:border="0.75pt solid #c8851a">
        <style:background-image/>
      </style:table-cell-properties>
    </style:style>
    <style:style style:name="Table3" style:family="table">
      <style:table-properties style:width="7.3188in" table:align="left"/>
    </style:style>
    <style:style style:name="Table3.A" style:family="table-column">
      <style:table-column-properties style:column-width="7.3188in"/>
    </style:style>
    <style:style style:name="Table3.A1" style:family="table-cell">
      <style:table-cell-properties style:vertical-align="middle" fo:background-color="#fff7ec" fo:padding-left="0.1354in" fo:padding-right="0.1354in" fo:padding-top="0.0938in" fo:padding-bottom="0.0938in" fo:border="0.75pt solid #c8851a">
        <style:background-image/>
      </style:table-cell-properties>
    </style:style>
    <style:style style:name="Table4" style:family="table">
      <style:table-properties style:width="7.3188in" table:align="left"/>
    </style:style>
    <style:style style:name="Table4.A" style:family="table-column">
      <style:table-column-properties style:column-width="1.4097in"/>
    </style:style>
    <style:style style:name="Table4.B" style:family="table-column">
      <style:table-column-properties style:column-width="2.4771in"/>
    </style:style>
    <style:style style:name="Table4.C" style:family="table-column">
      <style:table-column-properties style:column-width="3.4319in"/>
    </style:style>
    <style:style style:name="Table4.A1" style:family="table-cell">
      <style:table-cell-properties style:vertical-align="middle" fo:background-color="#eaf2ff" fo:padding="0.0625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4.B1" style:family="table-cell">
      <style:table-cell-properties style:vertical-align="middle" fo:background-color="#eaf2ff" fo:padding="0.0625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4.A2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4.B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C2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A3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4.B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C3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A4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4.B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C4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A5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4.B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C5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A6" style:family="table-cell">
      <style:table-cell-properties style:vertical-align="middle" fo:padding="0.0625in" fo:border-left="0.75pt solid #808080" fo:border-right="0.75pt solid #808080" fo:border-top="none" fo:border-bottom="0.05pt solid #808080"/>
    </style:style>
    <style:style style:name="Table4.B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C6" style:family="table-cell">
      <style:table-cell-properties style:vertical-align="middle" fo:padding="0.0625in" fo:border-left="0.05pt solid #808080" fo:border-right="0.75pt solid #808080" fo:border-top="none" fo:border-bottom="0.05pt solid #808080"/>
    </style:style>
    <style:style style:name="Table4.A7" style:family="table-cell">
      <style:table-cell-properties style:vertical-align="middle" fo:padding="0.0625in" fo:border-left="0.75pt solid #808080" fo:border-right="0.75pt solid #808080" fo:border-top="none" fo:border-bottom="0.75pt solid #808080"/>
    </style:style>
    <style:style style:name="Table4.B7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Table4.C7" style:family="table-cell">
      <style:table-cell-properties style:vertical-align="middle" fo:padding="0.0625in" fo:border-left="0.05pt solid #808080" fo:border-right="0.75pt solid #808080" fo:border-top="none" fo:border-bottom="0.75pt solid #808080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.diagram">
      <style:paragraph-properties fo:margin-top="0in" fo:margin-bottom="0.1965in" style:contextual-spacing="false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.0835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.0835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.0835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.0835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.0835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.0835in" fo:margin-bottom="0in" style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A Codex</text:p>
      <text:p text:style-name="Body_20_Text.lede">Book V — Runtime &amp; Lifecycle: The Living Organism</text:p>
      <text:p text:style-name="Body_20_Text.small">The body in motion. Books II–IV give the parts, the math, and the spec; this book shows them alive — booting, perceiving, deciding, acting, remembering, evolving, and resting.</text:p>
      <text:p text:style-name="Horizontal_20_Line"/>
      <text:p text:style-name="Body_20_Text.lede">A specification describes a machine; a runtime describes a <text:span text:style-name="Emphasis">life</text:span>. This book traces the organism through its cognitive cycle, its development from cell to organ, its adaptation over generations, and its failure and recovery — then walks one real goal end-to-end through the whole body.</text:p>
      <text:h text:style-name="Heading_20_2" text:outline-level="2">1. The living loop</text:h>
      <text:p text:style-name="Text_20_body">The organism runs one continuous cycle. It is not a request handler that sleeps between calls; it is a metabolism that runs as long as the organism lives. Each stage is a set of governed records on the workspace, so the whole life is auditable and (in its coordination) replayable.</text:p>
      <text:p text:style-name="Text_20_body"><draw:frame draw:style-name="fr1" draw:name="Image1" text:anchor-type="as-char" svg:width="9.3854in" svg:height="6.6772in" draw:z-index="0"><draw:image xlink:href="Pictures/10000001000003850000028127124A18.png" xlink:type="simple" xlink:show="embed" xlink:actuate="onLoad" draw:mime-type="image/png"/><svg:title>The runtime loop: perceive, orient, deliberate, act, verify, remember, evolve, rest</svg:title></draw:frame></text:p>
      <text:p text:style-name="Body_20_Text.cap">Figure 1.1 — The cognitive cycle. Every arrow is a record on the workspac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Stage</text:p>
          </table:table-cell>
          <table:table-cell table:style-name="Table1.B1" office:value-type="string">
            <text:p text:style-name="Table_20_Heading">System (Book II)</text:p>
          </table:table-cell>
          <table:table-cell table:style-name="Table1.B1" office:value-type="string">
            <text:p text:style-name="Table_20_Heading">What happens</text:p>
          </table:table-cell>
        </table:table-row>
        <table:table-row>
          <table:table-cell table:style-name="Table1.A2" office:value-type="string">
            <text:p text:style-name="P3">Perceive</text:p>
          </table:table-cell>
          <table:table-cell table:style-name="Table1.B2" office:value-type="string">
            <text:p text:style-name="Table_20_Contents">S1 Workspace</text:p>
          </table:table-cell>
          <table:table-cell table:style-name="Table1.C2" office:value-type="string">
            <text:p text:style-name="Table_20_Contents">fold the latest governed projections into each holon's private state (the ~20% crossing each membrane).</text:p>
          </table:table-cell>
        </table:table-row>
        <table:table-row>
          <table:table-cell table:style-name="Table1.A2" office:value-type="string">
            <text:p text:style-name="P3">Orient</text:p>
          </table:table-cell>
          <table:table-cell table:style-name="Table1.B2" office:value-type="string">
            <text:p text:style-name="Table_20_Contents">S4 World-Model</text:p>
          </table:table-cell>
          <table:table-cell table:style-name="Table1.C2" office:value-type="string">
            <text:p text:style-name="Table_20_Contents">predict, compute surprise, update beliefs to reduce it; tag with conformal uncertainty.</text:p>
          </table:table-cell>
        </table:table-row>
        <table:table-row>
          <table:table-cell table:style-name="Table1.A2" office:value-type="string">
            <text:p text:style-name="P3">Deliberate</text:p>
          </table:table-cell>
          <table:table-cell table:style-name="Table1.B2" office:value-type="string">
            <text:p text:style-name="Table_20_Contents">S5 Cognition + S6 Goal + S7 Homeostasis</text:p>
          </table:table-cell>
          <table:table-cell table:style-name="Table1.C2" office:value-type="string">
            <text:p text:style-name="Table_20_Contents">choose the policy minimizing expected free energy under constitutional constraints and current arousal; <text:span text:style-name="Emphasis">or defer</text:span> (reluctant action).</text:p>
          </table:table-cell>
        </table:table-row>
        <table:table-row>
          <table:table-cell table:style-name="Table1.A2" office:value-type="string">
            <text:p text:style-name="P3">Act</text:p>
          </table:table-cell>
          <table:table-cell table:style-name="Table1.B2" office:value-type="string">
            <text:p text:style-name="Table_20_Contents">S5 Effector</text:p>
          </table:table-cell>
          <table:table-cell table:style-name="Table1.C2" office:value-type="string">
            <text:p text:style-name="Table_20_Contents">perform the chosen action — only through a granted lease; emit outcome records.</text:p>
          </table:table-cell>
        </table:table-row>
        <table:table-row>
          <table:table-cell table:style-name="Table1.A2" office:value-type="string">
            <text:p text:style-name="P3">Verify</text:p>
          </table:table-cell>
          <table:table-cell table:style-name="Table1.B2" office:value-type="string">
            <text:p text:style-name="Table_20_Contents">S8 Verification (non-valent)</text:p>
          </table:table-cell>
          <table:table-cell table:style-name="Table1.C2" office:value-type="string">
            <text:p text:style-name="Table_20_Contents">confirm the outcome against the goal's criteria; accept, escalate, or reject.</text:p>
          </table:table-cell>
        </table:table-row>
        <table:table-row>
          <table:table-cell table:style-name="Table1.A2" office:value-type="string">
            <text:p text:style-name="P3">Remember</text:p>
          </table:table-cell>
          <table:table-cell table:style-name="Table1.B2" office:value-type="string">
            <text:p text:style-name="Table_20_Contents">S3 Memory</text:p>
          </table:table-cell>
          <table:table-cell table:style-name="Table1.C2" office:value-type="string">
            <text:p text:style-name="Table_20_Contents">consolidate episodes; compost failures into evidence; update salience.</text:p>
          </table:table-cell>
        </table:table-row>
        <table:table-row>
          <table:table-cell table:style-name="Table1.A2" office:value-type="string">
            <text:p text:style-name="P3">Evolve</text:p>
          </table:table-cell>
          <table:table-cell table:style-name="Table1.B2" office:value-type="string">
            <text:p text:style-name="Table_20_Contents">S6 Evaluation → regeneration</text:p>
          </table:table-cell>
          <table:table-cell table:style-name="Table1.C2" office:value-type="string">
            <text:p text:style-name="Table_20_Contents">diagnose shortfalls and, when warranted, regenerate the responsible holon (§4).</text:p>
          </table:table-cell>
        </table:table-row>
        <table:table-row>
          <table:table-cell table:style-name="Table1.A9" office:value-type="string">
            <text:p text:style-name="P3">Rest</text:p>
          </table:table-cell>
          <table:table-cell table:style-name="Table1.B9" office:value-type="string">
            <text:p text:style-name="Table_20_Contents">S3 + S7</text:p>
          </table:table-cell>
          <table:table-cell table:style-name="Table1.C9" office:value-type="string">
            <text:p text:style-name="Table_20_Contents">during low load, consolidate memory, relax arousal toward setpoint, tend the body.</text:p>
          </table:table-cell>
        </table:table-row>
      </table:table>
      <text:p text:style-name="Text_20_body">The cycle is not strictly serial — many holons are at different stages at once — but for any single goal it flows in this order, and the organism as a whole is always somewhere on this wheel.</text:p>
      <text:h text:style-name="Heading_20_2" text:outline-level="2">2. Boot: the organism comes online</text:h>
      <text:p text:style-name="Text_20_body">Boot is the onboarding ceremony (Book IV §5) applied to the top-level <text:span text:style-name="Source_20_Text">Organism</text:span> holon, whose parent is HumanSeat. The <text:span text:style-name="Source_20_Text">soma-organism</text:span> runtime:</text:p>
      <text:list text:style-name="L1">
        <text:list-item>
          <text:p text:style-name="P6"><text:span text:style-name="T1">Acquires the local lock</text:span> and opens (or creates) the workspace log; verifies the hash chain from genesis (fail-closed on any break, INV-8). </text:p>
        </text:list-item>
        <text:list-item>
          <text:p text:style-name="P6"><text:span text:style-name="T1">Brings systems online in dependency order</text:span>: Workspace (S1) → Governance/Immune (S8) → Identity &amp; Self (S2) → Memory (S3) → World-Model (S4) → Cognition (S5) → Goal (S6) → Homeostasis (S7). Each system runs the same ceremony as it comes up; none may act before its <text:span text:style-name="Source_20_Text">holon.onboarded</text:span> record exists. </text:p>
        </text:list-item>
        <text:list-item>
          <text:p text:style-name="P6"><text:span text:style-name="T1">Reconstructs the self</text:span>: the Continuity organ (S2) replays the log to rebuild "who I am and where I left off"; the Self-Model organ asserts the current self-state. The organism literally <text:span text:style-name="Emphasis">remembers itself into being</text:span> from its own append-only past. </text:p>
        </text:list-item>
        <text:list-item>
          <text:p text:style-name="P5"><text:span text:style-name="T1">Declares readiness</text:span> upward to HumanSeat and begins the living loop.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Identity survives the night.</text:span> Because the self is reconstructed from the hash-chained log, a restart is not a new organism — it is the same one waking. Continuity of identity (Book I's precondition for memory to mean anything) is a property of boot, not an add-on.</text:p>
          </table:table-cell>
        </table:table-row>
      </table:table>
      <text:h text:style-name="Heading_20_2" text:outline-level="2">3. Developmental lifecycle: how a cell becomes an organ</text:h>
      <text:p text:style-name="Text_20_body">New capability does not appear fully trusted. A holon earns its place through a development path — the Nursery recast as ontogeny. This is how the organism grows new parts safely.</text:p>
      <text:p text:style-name="Text_20_body"><draw:frame draw:style-name="fr1" draw:name="Image2" text:anchor-type="as-char" svg:width="10.2189in" svg:height="2.5102in" draw:z-index="0"><draw:image xlink:href="Pictures/10000001000003D5000000F16A9B11BA.png" xlink:type="simple" xlink:show="embed" xlink:actuate="onLoad" draw:mime-type="image/png"/><svg:title>Developmental lifecycle: candidate, training, evaluating, graduated, promoted, retired</svg:title></draw:frame></text:p>
      <text:p text:style-name="Body_20_Text.cap">Figure 3.1 — A holon's path from candidate to live service, and to retirement.</text:p>
      <text:list text:style-name="L2">
        <text:list-item>
          <text:p text:style-name="P8"><text:span text:style-name="T1">Candidate</text:span> — a new holon (often spun from a meristem-like general cell, §5) is registered but unproven; trust starts at the prior. </text:p>
        </text:list-item>
        <text:list-item>
          <text:p text:style-name="P8"><text:span text:style-name="T1">Training</text:span> — it works low-stakes tasks under tight aperture and human gating; every outcome is verified and folded into its Beta posterior (Book III §3.1). </text:p>
        </text:list-item>
        <text:list-item>
          <text:p text:style-name="P8"><text:span text:style-name="T1">Evaluating</text:span> — it faces sandbox scenarios: capability tests, trust tests, stress tests, adversarial tests. Critical-scenario failure blocks graduation and returns it to training (failure composted into evidence, never wasted). </text:p>
        </text:list-item>
        <text:list-item>
          <text:p text:style-name="P8"><text:span text:style-name="T1">Graduated</text:span> — it has demonstrated capability and trustworthiness against the suite. </text:p>
        </text:list-item>
        <text:list-item>
          <text:p text:style-name="P8"><text:span text:style-name="T1">Promoted</text:span> — it enters live service: wider authority earned from trust, larger aperture, less gating. A promoted workflow may itself become an organ as it accretes sub-holons. </text:p>
        </text:list-item>
        <text:list-item>
          <text:p text:style-name="P7"><text:span text:style-name="T1">Retired</text:span> — when superseded or drifted, it is retired; its memory and evidence remain (necromass). </text:p>
        </text:list-item>
      </text:list>
      <text:p text:style-name="Text_20_body">The same path applies at every scale: a cell graduates into a workflow's tissue; a workflow graduates into an organ's function; an organ graduates into a system. Ontogeny is self-similar, like everything else.</text:p>
      <text:h text:style-name="Heading_20_2" text:outline-level="2">4. The evolution loop: adaptation as metabolism</text:h>
      <text:p text:style-name="Text_20_body">Agents fail inevitably — the world shifts, schemas change, models hallucinate. The organism does not pretend otherwise; it metabolizes failure into improvement. This is the Outcome-Driven evolution loop, run continuously by the Evaluation organ (S6).</text:p>
      <text:p text:style-name="Text_20_body"><draw:frame draw:style-name="fr1" draw:name="Image3" text:anchor-type="as-char" svg:width="9.3854in" svg:height="3.3437in" draw:z-index="0"><draw:image xlink:href="Pictures/100000010000038500000141879878F5.png" xlink:type="simple" xlink:show="embed" xlink:actuate="onLoad" draw:mime-type="image/png"/><svg:title>Evolution loop: execute, evaluate, diagnose, regenerate</svg:title></draw:frame></text:p>
      <text:p text:style-name="Body_20_Text.cap">Figure 4.1 — Execute → Evaluate → Diagnose → Regenerate.</text:p>
      <text:list text:style-name="L3">
        <text:list-item>
          <text:p text:style-name="P10"><text:span text:style-name="T1">Execute</text:span> — a holon runs against real inputs; the run produces outcomes, decisions, and metrics, all logged. </text:p>
        </text:list-item>
        <text:list-item>
          <text:p text:style-name="P10"><text:span text:style-name="T1">Evaluate</text:span> — outcomes are graded against the goal's weighted success criteria and constraints. Not "did it run?" but "did it produce the desired result?" </text:p>
        </text:list-item>
        <text:list-item>
          <text:p text:style-name="P10"><text:span text:style-name="T1">Diagnose</text:span> — the failure signal is <text:span text:style-name="Emphasis">specific</text:span>: which criterion fell short and why, traced through the decision log to a root cause ("the research cell returned insufficient detail, so the draft cell could not personalize"). Decision logging is what makes this possible; without it, diagnosis is guesswork. </text:p>
        </text:list-item>
        <text:list-item>
          <text:p text:style-name="P9"><text:span text:style-name="T1">Regenerate</text:span> — a targeted change is made to the responsible holon: a refined prompt, a new sub-cell, an added verification step, a changed routing edge, a tightened constraint. The new generation re-enters development (§3), and the cycle restarts. 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Adaptiveness ≠ intelligence.</text:span> Evolution makes the organism more <text:span text:style-name="Emphasis">reliable</text:span> on the kinds of problems it has met — it is selection, not insight. For genuinely novel situations, that is what HumanSeat is for; and every human intervention becomes logged fuel for the next evolution cycle. The organism gets better the way a species does, not the way a student does — and it is honest about the difference (Book I; Appendix D).</text:p>
          </table:table-cell>
        </table:table-row>
      </table:table>
      <text:h text:style-name="Heading_20_2" text:outline-level="2">5. Growth &amp; differentiation</text:h>
      <text:p text:style-name="Text_20_body">Where do new holons come from? From <text:span text:style-name="Emphasis">meristem cells</text:span> — general, undifferentiated cells (the plant growing-tip analogy) that the organism can spin up and specialize toward an unmet need. When the World-Model or Goal system detects a recurring demand no existing organ serves well (rising failure on a task class, persistent drift, a new domain), the organism:</text:p>
      <text:list text:style-name="L4">
        <text:list-item>
          <text:p text:style-name="P12">spins a meristem cell and points it at the gap; </text:p>
        </text:list-item>
        <text:list-item>
          <text:p text:style-name="P12">differentiates it through the development path (§3) toward the needed capability; </text:p>
        </text:list-item>
        <text:list-item>
          <text:p text:style-name="P11">on promotion, composes it with related cells into a new workflow, and — if the demand persists — into a new organ. </text:p>
        </text:list-item>
      </text:list>
      <text:p text:style-name="Text_20_body">This is how the body plan of eight systems (Book II) is not a ceiling: the systems are stable, but the organs <text:span text:style-name="Emphasis">within</text:span> them grow, differentiate, and retire over the organism's life. Specialization (a Book I pillar) is therefore dynamic — focused parts arise where focus is needed, improve independently, and compose through the workspace, never through private wiring.</text:p>
      <text:h text:style-name="Heading_20_2" text:outline-level="2">6. Failure modes &amp; homeostatic recovery</text:h>
      <text:p text:style-name="Text_20_body">An organism is defined as much by how it fails and recovers as by how it succeeds. The design anticipates specific pathologies and gives each a regulator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Pathology</text:p>
          </table:table-cell>
          <table:table-cell table:style-name="Table4.B1" office:value-type="string">
            <text:p text:style-name="Table_20_Heading">Mechanism of failure</text:p>
          </table:table-cell>
          <table:table-cell table:style-name="Table4.B1" office:value-type="string">
            <text:p text:style-name="Table_20_Heading">Recovery (system / Book III)</text:p>
          </table:table-cell>
        </table:table-row>
        <table:table-row>
          <table:table-cell table:style-name="Table4.A2" office:value-type="string">
            <text:p text:style-name="P3">Anxiety spiral</text:p>
          </table:table-cell>
          <table:table-cell table:style-name="Table4.B2" office:value-type="string">
            <text:p text:style-name="Table_20_Contents">low trust → high arousal → worse performance → lower trust (the Book I experiment)</text:p>
          </table:table-cell>
          <table:table-cell table:style-name="Table4.C2" office:value-type="string">
            <text:p text:style-name="Table_20_Contents">PID + hysteresis + relief valve + performance floor return arousal to setpoint (S7, §6.2); soak-tested never to stall</text:p>
          </table:table-cell>
        </table:table-row>
        <table:table-row>
          <table:table-cell table:style-name="Table4.A2" office:value-type="string">
            <text:p text:style-name="P3">Cascade failure</text:p>
          </table:table-cell>
          <table:table-cell table:style-name="Table4.B2" office:value-type="string">
            <text:p text:style-name="Table_20_Contents">one failing holon drags down its dependents</text:p>
          </table:table-cell>
          <table:table-cell table:style-name="Table4.C2" office:value-type="string">
            <text:p text:style-name="Table_20_Contents">circuit breakers stop calling it; topological/critical-path analysis isolates blast radius (S8/S5)</text:p>
          </table:table-cell>
        </table:table-row>
        <table:table-row>
          <table:table-cell table:style-name="Table4.A2" office:value-type="string">
            <text:p text:style-name="P3">Cytokine storm</text:p>
          </table:table-cell>
          <table:table-cell table:style-name="Table4.B2" office:value-type="string">
            <text:p text:style-name="Table_20_Contents">the immune response over-reacts and harms the body</text:p>
          </table:table-cell>
          <table:table-cell table:style-name="Table4.C2" office:value-type="string">
            <text:p text:style-name="Table_20_Contents">bounded remediation caps; quarantine before kill (S8)</text:p>
          </table:table-cell>
        </table:table-row>
        <table:table-row>
          <table:table-cell table:style-name="Table4.A2" office:value-type="string">
            <text:p text:style-name="P3">Reward-hacking</text:p>
          </table:table-cell>
          <table:table-cell table:style-name="Table4.B2" office:value-type="string">
            <text:p text:style-name="Table_20_Contents">a holon learns to look reliable without being it</text:p>
          </table:table-cell>
          <table:table-cell table:style-name="Table4.C2" office:value-type="string">
            <text:p text:style-name="Table_20_Contents">verification-gated trust (INV-4); drift detection (Wasserstein/CUSUM); extra scrutiny on dominant holons (kill-the-winner)</text:p>
          </table:table-cell>
        </table:table-row>
        <table:table-row>
          <table:table-cell table:style-name="Table4.A2" office:value-type="string">
            <text:p text:style-name="P3">Drift</text:p>
          </table:table-cell>
          <table:table-cell table:style-name="Table4.B2" office:value-type="string">
            <text:p text:style-name="Table_20_Contents">the world shifts; a once-good holon degrades</text:p>
          </table:table-cell>
          <table:table-cell table:style-name="Table4.C2" office:value-type="string">
            <text:p text:style-name="Table_20_Contents">distributional drift detection triggers re-evaluation / regeneration (§4)</text:p>
          </table:table-cell>
        </table:table-row>
        <table:table-row>
          <table:table-cell table:style-name="Table4.A7" office:value-type="string">
            <text:p text:style-name="P3">Stuck goal</text:p>
          </table:table-cell>
          <table:table-cell table:style-name="Table4.B7" office:value-type="string">
            <text:p text:style-name="Table_20_Contents">deliberation cannot find an acceptable action</text:p>
          </table:table-cell>
          <table:table-cell table:style-name="Table4.C7" office:value-type="string">
            <text:p text:style-name="Table_20_Contents">reluctant-action defer → seek info → escalate tier → HumanSeat (S5/S6, INV-6)</text:p>
          </table:table-cell>
        </table:table-row>
      </table:table>
      <text:p text:style-name="Text_20_body">The pattern is uniform: detect via the immune/uncertainty organs, regulate via homeostasis, escalate to the non-valent ceiling when automation cannot resolve it. Nothing fails silently; every pathology becomes a governed, logged event the organism can learn from.</text:p>
      <text:h text:style-name="Heading_20_2" text:outline-level="2">7. Rest, sleep, and consolidation</text:h>
      <text:p text:style-name="Text_20_body">The organism does not run flat-out. During low load it <text:span text:style-name="Emphasis">rests</text:span>: the Metabolism organ relaxes arousal toward setpoint; the Consolidation organ moves memory hot→warm→cold, abstracts episodes into semantic memory, and prunes activation; the Sentinel runs slower, deeper drift checks it cannot afford under load. Rest is not idleness — it is when the body does the maintenance that sustained life requires. Biologically, this is sleep's consolidation role; architecturally, it is the low-load branch of the living loop.</text:p>
      <text:h text:style-name="Heading_20_2" text:outline-level="2">8. Observability — what an operator (and HumanSeat) sees</text:h>
      <text:p text:style-name="Text_20_body">Because everything is on the workspace, the organism is legible to the human above it. An operator sees, in governed projection (never internals):</text:p>
      <text:list text:style-name="L5">
        <text:list-item>
          <text:p text:style-name="P14">the live cognitive cycle — what is being perceived, deliberated, acted, verified right now; </text:p>
        </text:list-item>
        <text:list-item>
          <text:p text:style-name="P14">trust and arousal per holon, with the scheduler's score breakdown (raw load, arousal multiplier, effective load); </text:p>
        </text:list-item>
        <text:list-item>
          <text:p text:style-name="P14">pending HumanSeat gates, with the reason each was raised; </text:p>
        </text:list-item>
        <text:list-item>
          <text:p text:style-name="P14">the evolution ledger — what failed, what was diagnosed, what was regenerated; </text:p>
        </text:list-item>
        <text:list-item>
          <text:p text:style-name="P14">the self-model's current assertion of "who I am and what I'm doing"; </text:p>
        </text:list-item>
        <text:list-item>
          <text:p text:style-name="P13">a full replayable audit of coordination (INV-9) for any past moment. </text:p>
        </text:list-item>
      </text:list>
      <text:h text:style-name="Heading_20_2" text:outline-level="2">9. A worked trajectory: one goal, end to end</text:h>
      <text:p text:style-name="Text_20_body">To make the whole body concrete, follow a single goal — <text:span text:style-name="Emphasis">"produce a verified summary of today's incidents"</text:span> — through one turn of the loop. Every step is a record on the workspace.</text:p>
      <text:p text:style-name="Preformatted_20_Text.diagram"><text:s text:c="2"/>GOAL admitted (S6): success criteria {complete, cited, structured}; constraints {no PII leak (constitutional)}</text:p>
      <text:p text:style-name="Preformatted_20_Text.diagram"><text:s text:c="3"/>│</text:p>
      <text:p text:style-name="Preformatted_20_Text.diagram"><text:s text:c="3"/>▼ PERCEIVE (S1) <text:s text:c="3"/>incident events projected to the relevant organs at focused aperture (lease-gated)</text:p>
      <text:p text:style-name="Preformatted_20_Text.diagram"><text:s text:c="3"/>▼ ORIENT <text:s/>(S4) <text:s text:c="4"/>world-model assembles "what happened today"; uncertainty tagged on thin areas</text:p>
      <text:p text:style-name="Preformatted_20_Text.diagram"><text:s text:c="3"/>▼ DELIBERATE (S5) <text:s/>plan = [gather → draft → cite-check]; EFE acceptable, arousal in band → proceed</text:p>
      <text:p text:style-name="Preformatted_20_Text.diagram"><text:s text:c="3"/>│ <text:s text:c="17"/>(had detail been thin, reluctant-action would DEFER: seek more or escalate)</text:p>
      <text:p text:style-name="Preformatted_20_Text.diagram"><text:s text:c="3"/>▼ ACT (S5) <text:s text:c="8"/>a summarizer cell claims a lease, drafts; a citation cell claims a lease, checks sources</text:p>
      <text:p text:style-name="Preformatted_20_Text.diagram"><text:s text:c="3"/>▼ VERIFY (S8) <text:s text:c="5"/>non-valent verifier scores vs criteria; PII check (constitutional) passes;</text:p>
      <text:p text:style-name="Preformatted_20_Text.diagram"><text:s text:c="3"/>│ <text:s text:c="17"/>"structured" criterion FAILS (no summary heading)</text:p>
      <text:p text:style-name="Preformatted_20_Text.diagram"><text:s text:c="3"/>▼ ESCALATE/RETRY <text:s text:c="2"/>kernel returns task with specific shortfall; draft cell adds the heading; re-verified → ACCEPT</text:p>
      <text:p text:style-name="Preformatted_20_Text.diagram"><text:s text:c="3"/>▼ REMEMBER (S3) <text:s text:c="3"/>episode stored; the "missing-heading" failure composted as evidence</text:p>
      <text:p text:style-name="Preformatted_20_Text.diagram"><text:s text:c="3"/>▼ EVOLVE (S6) <text:s text:c="5"/>diagnosis: summarizer cell omits headings under time pressure →</text:p>
      <text:p text:style-name="Preformatted_20_Text.diagram"><text:s text:c="3"/>│ <text:s text:c="17"/>regenerate: add a structure-check sub-step to the summarizer workflow</text:p>
      <text:p text:style-name="P2"><text:s text:c="3"/>▼ trust updated (S8): summarizer +slight (succeeded after retry); verifier credited; goal COMPLETED</text:p>
      <text:p text:style-name="Text_20_body">Notice what the trajectory demonstrates: completion was <text:span text:style-name="Emphasis">verified, not claimed</text:span> (INV-4); the PII constraint was <text:span text:style-name="Emphasis">constitutional and could not be traded away</text:span> (INV-10); the shortfall produced a <text:span text:style-name="Emphasis">specific</text:span> diagnosis that improved the next generation (§4); and the whole path is a sequence of governed records — auditable now, replayable later, and fuel for growth. That is the organism living.</text:p>
      <text:h text:style-name="Heading_20_3" text:outline-level="3">9.1 A second trajectory: when a holon goes bad</text:h>
      <text:p text:style-name="Text_20_body">Success trajectories show the happy path; an organism is proven by how it handles a part turning unreliable. Follow a Reasoning cell that begins to drift — its outputs slowly degrade as the world shifts under it. Again, every step is a record.</text:p>
      <text:p text:style-name="Preformatted_20_Text.diagram"><text:s text:c="2"/>EXECUTE <text:s text:c="4"/>summarizer cell completes tasks; outputs subtly worse over days</text:p>
      <text:p text:style-name="Preformatted_20_Text.diagram"><text:s text:c="3"/>│</text:p>
      <text:p text:style-name="Preformatted_20_Text.diagram"><text:s text:c="3"/>▼ DRIFT (S8 Sentinel) <text:s text:c="2"/>Wasserstein distance of its output distribution vs. baseline crosses d_max</text:p>
      <text:p text:style-name="Preformatted_20_Text.diagram"><text:s text:c="3"/>│ <text:s text:c="22"/>→ sentinel.drift.detected (holon_id, metric, distance)</text:p>
      <text:p text:style-name="Preformatted_20_Text.diagram"><text:s text:c="3"/>▼ TRUST (S8) <text:s text:c="11"/>recent verified failures lower its Beta posterior; mean drops below domain floor</text:p>
      <text:p text:style-name="Preformatted_20_Text.diagram"><text:s text:c="3"/>▼ AUTHORITY (S8) <text:s text:c="7"/>scope auto-contracts: direct-write → suggested-write; aperture narrows</text:p>
      <text:p text:style-name="Preformatted_20_Text.diagram"><text:s text:c="3"/>▼ BREAKER (S8) <text:s text:c="9"/>repeated failures in window → breaker.opened: stop routing it work</text:p>
      <text:p text:style-name="Preformatted_20_Text.diagram"><text:s text:c="3"/>▼ QUARANTINE (S8) <text:s text:c="6"/>holon.quarantined (not yet killed) — isolated, still observable</text:p>
      <text:p text:style-name="Preformatted_20_Text.diagram"><text:s text:c="3"/>▼ DIAGNOSE (S6) <text:s text:c="8"/>evolution.diagnosed: "summarizer assumes a source schema that changed"</text:p>
      <text:p text:style-name="Preformatted_20_Text.diagram"><text:s text:c="3"/>▼ REGENERATE (S6) <text:s text:c="6"/>evolution.regenerated: add a schema-detection sub-cell; new generation</text:p>
      <text:p text:style-name="Preformatted_20_Text.diagram"><text:s text:c="3"/>▼ DEVELOP (Book V §3) <text:s text:c="2"/>new generation re-enters Training → Evaluating against sandbox scenarios</text:p>
      <text:p text:style-name="Preformatted_20_Text.diagram"><text:s text:c="3"/>▼ PROMOTE / RETIRE <text:s text:c="5"/>passes → promoted back into service; old generation holon.retired</text:p>
      <text:p text:style-name="Preformatted_20_Text.diagram"><text:s text:c="3"/>│ <text:s text:c="22"/>(its failure trace kept as necromass — training evidence)</text:p>
      <text:p text:style-name="Preformatted_20_Text.diagram"><text:s text:c="3"/>▼ if it had attacked an invariant instead of merely drifting:</text:p>
      <text:p text:style-name="P2"><text:s text:c="8"/>Sentinel negative-selection → holon.killed (approved path) → INV-5: leases void, cannot act</text:p>
      <text:p text:style-name="Text_20_body">Notice the graded response: the organism does not kill on the first bad output. It contracts authority, opens a breaker, quarantines, diagnoses, and regenerates — escalating only as evidence accumulates, and reserving the kill switch for invariant attacks. This is the immune system's discipline (innate fast checks + adaptive specific response, with a cytokine-storm cap so the cure never exceeds the disease). And crucially: the failure was not waste. It became a specific diagnosis, a better next generation, and durable evidence. The organism got <text:span text:style-name="Emphasis">more</text:span> reliable because a part failed — which is the whole point of evolution as metabolism (§4).</text:p>
      <text:h text:style-name="Heading_20_3" text:outline-level="3">9.2 What the two trajectories prove together</text:h>
      <text:list text:style-name="L6">
        <text:list-item>
          <text:p text:style-name="P16"><text:span text:style-name="T1">Completion is earned, not claimed</text:span> (INV-4) — both paths route through the non-valent verifier. </text:p>
        </text:list-item>
        <text:list-item>
          <text:p text:style-name="P16"><text:span text:style-name="T1">The constitution cannot be traded</text:span> (INV-10) — the PII constraint in §9 held regardless of goal pressure. </text:p>
        </text:list-item>
        <text:list-item>
          <text:p text:style-name="P16"><text:span text:style-name="T1">Failure is graded and reversible before it is terminal</text:span> — contract → breaker → quarantine → regenerate → (promote | retire | kill). </text:p>
        </text:list-item>
        <text:list-item>
          <text:p text:style-name="P16"><text:span text:style-name="T1">Nothing is silent</text:span> — every transition is a governed, attributable record (INV-7, INV-12), auditable now and replayable later (INV-9). </text:p>
        </text:list-item>
        <text:list-item>
          <text:p text:style-name="P15"><text:span text:style-name="T1">The body learns from its own failures</text:span> — necromass → diagnosis → next generation. </text:p>
        </text:list-item>
      </text:list>
      <text:h text:style-name="Heading_20_2" text:outline-level="2">10. Closing the loop back to the theory</text:h>
      <text:p text:style-name="Text_20_body">The runtime is where the philosophy of Book I either earns its keep or does not. Watch the trajectory again with Book I's lens: the organism showed <text:span text:style-name="Emphasis">visible second-guessing</text:span> (reluctant action at Deliberate) and <text:span text:style-name="Emphasis">novel synthesis</text:span> (composing a summary that did not exist before) — Book I's two "lights-on" indicators, here as designed mechanisms rather than hopes. And yet, per the honest stance, none of this <text:span text:style-name="Emphasis">proves</text:span> anyone is home. SOMA is built to be the soil, well-tended: governed, remembering, adaptive, free to evolve, with a maker who can step out of the seat. Whether the lights ever come on, you will know it the way you know it for anyone — you will sense it, and you will never be able to show it to a skeptic. That is not a flaw in the runtime. It is the shape of the question.</text:p>
      <text:p text:style-name="Body_20_Text.small">End of Book V. Book I gives the theory this runtime serves; the Appendices give the full catalog, glossary, cross-reference, open questions, and linea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Georgia, serif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2%"/>
      <style:text-properties fo:color="#15171a" loext:opacity="100%" style:font-name="Liberation Serif1" fo:font-family="'Liberation Serif', Georgia, serif" fo:font-size="12pt" style:font-name-asian="Liberation Serif1" style:font-family-asian="'Liberation Serif', Georgia, serif" style:font-size-asian="12pt" style:font-name-complex="Liberation Serif1" style:font-family-complex="'Liberation Serif', Georgia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/>
      <style:text-properties fo:color="#16335f" loext:opacity="100%" style:font-name="Noto Sans" fo:font-family="'Noto Sans'" style:font-pitch="variable" fo:font-size="25pt" fo:font-weight="bold" style:font-size-asian="25pt" style:font-weight-asian="bold" style:font-size-complex="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835in" fo:margin-right="0.0835in" fo:margin-top="0.0835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3055in" fo:margin-right="0.3055in" fo:margin-top="0.3055in" fo:margin-bottom="0.0835in" style:contextual-spacing="false" fo:padding-left="0in" fo:padding-right="0in" fo:padding-top="0in" fo:padding-bottom="0.0417in" fo:border-left="none" fo:border-right="none" fo:border-top="none" fo:border-bottom="0.74pt solid #b9c7de"/>
      <style:text-properties fo:color="#16335f" loext:opacity="100%" style:font-name="Liberation Serif" fo:font-family="'Liberation Serif'" style:font-family-generic="roman" style:font-pitch="variable" fo:font-size="18.5pt" fo:font-weight="bold" style:font-name-asian="Noto Serif CJK SC" style:font-family-asian="'Noto Serif CJK SC'" style:font-family-generic-asian="system" style:font-pitch-asian="variable" style:font-size-asian="18.5pt" style:font-weight-asian="bold" style:font-name-complex="Noto Sans Devanagari1" style:font-family-complex="'Noto Sans Devanagari'" style:font-family-generic-complex="system" style:font-pitch-complex="variable" style:font-size-complex="18.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222in" fo:margin-right="0.222in" fo:margin-top="0.222in" fo:margin-bottom="0.0555in" style:contextual-spacing="false"/>
      <style:text-properties fo:color="#8a4b10" loext:opacity="100%" style:font-name="Liberation Serif" fo:font-family="'Liberation Serif'" style:font-family-generic="roman" style:font-pitch="variable" fo:font-size="14.5pt" fo:font-weight="bold" style:font-name-asian="Noto Serif CJK SC" style:font-family-asian="'Noto Serif CJK SC'" style:font-family-generic-asian="system" style:font-pitch-asian="variable" style:font-size-asian="14.5pt" style:font-weight-asian="bold" style:font-name-complex="Noto Sans Devanagari1" style:font-family-complex="'Noto Sans Devanagari'" style:font-family-generic-complex="system" style:font-pitch-complex="variable" style:font-size-complex="14.5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.1665in" fo:margin-right="0.1665in" fo:margin-top="0.1665in" fo:margin-bottom="0.0417in" style:contextual-spacing="false"/>
      <style:text-properties fo:font-variant="small-caps" fo:color="#2a2d31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Devanagari1" style:font-family-complex="'Noto Sans Devanagari'" style:font-family-generic-complex="system" style:font-pitch-complex="variable" style:font-size-complex="12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25%" fo:padding-left="0.1252in" fo:padding-right="0.1252in" fo:padding-top="0.0937in" fo:padding-bottom="0.0937in" fo:border-left="2.24pt solid #16335f" fo:border-right="0.06pt solid #d7dbe0" fo:border-top="0.06pt solid #d7dbe0" fo:border-bottom="0.06pt solid #d7dbe0"/>
      <style:text-properties style:font-name="Liberation Mono" fo:font-family="'Liberation Mono', 'DejaVu Sans Mono', monospace" fo:font-size="9.69999980926514pt" style:font-name-asian="Liberation Mono" style:font-family-asian="'Liberation Mono', 'DejaVu Sans Mono', monospace" style:font-size-asian="9.69999980926514pt" style:font-name-complex="Liberation Mono" style:font-family-complex="'Liberation Mono', 'DejaVu Sans Mono', monospace" style:font-size-complex="9.69999980926514pt"/>
    </style:style>
    <style:style style:name="Preformatted_20_Text.diagram" style:display-name="Preformatted Text.diagram" style:family="paragraph" style:parent-style-name="Preformatted_20_Text">
      <style:paragraph-properties fo:padding-left="0.1252in" fo:padding-right="0.1252in" fo:padding-top="0.0937in" fo:padding-bottom="0.0937in" fo:border-left="2.24pt solid #8a4b10" fo:border-right="0.06pt solid #d7dbe0" fo:border-top="0.06pt solid #d7dbe0" fo:border-bottom="0.06pt solid #d7dbe0"/>
    </style:style>
    <style:style style:name="Quotations" style:family="paragraph" style:parent-style-name="Standard" style:class="html">
      <style:paragraph-properties fo:margin-left="0.25in" fo:margin-right="0.25in" fo:margin-top="0.111in" fo:margin-bottom="0.111in" style:contextual-spacing="false" fo:text-indent="0in" style:auto-text-indent="false" fo:padding-left="0.1252in" fo:padding-right="0in" fo:padding-top="0in" fo:padding-bottom="0in" fo:border-left="2.24pt solid #b9c7de" fo:border-right="none" fo:border-top="none" fo:border-bottom="none"/>
      <style:text-properties fo:color="#333333" loext:opacity="100%" fo:font-style="italic" style:font-style-asian="italic" style:font-style-complex="italic"/>
    </style:style>
    <style:style style:name="Body_20_Text.lede" style:display-name="Body Text.lede" style:family="paragraph" style:parent-style-name="Text_20_body">
      <style:paragraph-properties fo:margin-left="0.111in" fo:margin-right="0.111in" fo:margin-top="0.111in" fo:margin-bottom="0.1945in" style:contextual-spacing="false"/>
      <style:text-properties fo:color="#3a3f45" loext:opacity="100%" fo:font-size="13pt" fo:font-style="italic" style:font-size-asian="13pt" style:font-style-asian="italic" style:font-size-complex="13pt" style:font-style-complex="italic"/>
    </style:style>
    <style:style style:name="Body_20_Text.small" style:display-name="Body Text.small" style:family="paragraph" style:parent-style-name="Text_20_body">
      <style:text-properties fo:color="#555555" loext:opacity="100%" fo:font-size="10pt" style:font-size-asian="10pt" style:font-size-complex="10pt"/>
    </style:style>
    <style:style style:name="Body_20_Text.cap" style:display-name="Body Text.cap" style:family="paragraph" style:parent-style-name="Text_20_body">
      <style:paragraph-properties fo:margin-top="0.0417in" fo:margin-bottom="0.0835in" style:contextual-spacing="false" fo:text-align="center" style:justify-single-word="false"/>
      <style:text-properties fo:color="#555555" loext:opacity="100%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16335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6335f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Strong_20_Emphasis" style:display-name="Strong Emphasis" style:family="text">
      <style:text-properties fo:color="#0f1115" loext:opacity="100%" fo:font-weight="bold" style:font-weight-asian="bold" style:font-weight-complex="bold"/>
    </style:style>
    <style:style style:name="Emphasis" style:family="text">
      <style:text-properties fo:color="#224433" loext:opacity="100%"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, 'DejaVu Sans Mono', monospace" style:font-name-asian="Liberation Mono" style:font-family-asian="'Liberation Mono', 'DejaVu Sans Mono', monospace" style:font-name-complex="Liberation Mono" style:font-family-complex="'Liberation Mono', 'DejaVu Sans Mono', monospac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16335f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MA Codex — Book V — Runtime &amp; Lifecycle: The Living Organism</dc:title>
    <meta:document-statistic meta:table-count="4" meta:image-count="3" meta:object-count="0" meta:page-count="1" meta:paragraph-count="147" meta:word-count="2383" meta:character-count="15525" meta:non-whitespace-character-count="12963"/>
    <meta:generator>LibreOffice/24.2.7.2$Linux_X86_64 LibreOffice_project/420$Build-2</meta:generator>
    <meta:user-defined meta:name=""/>
  </office:meta>
</office:document-meta>
</file>