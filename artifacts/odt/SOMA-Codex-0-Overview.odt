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9000002313C09F33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Georgia, serif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188in" table:align="left"/>
    </style:style>
    <style:style style:name="Table1.A" style:family="table-column">
      <style:table-column-properties style:column-width="7.3188in"/>
    </style:style>
    <style:style style:name="Table1.A1" style:family="table-cell">
      <style:table-cell-properties style:vertical-align="middle" fo:background-color="#fff7ec" fo:padding-left="0.1354in" fo:padding-right="0.1354in" fo:padding-top="0.0938in" fo:padding-bottom="0.0938in" fo:border="0.75pt solid #c8851a">
        <style:background-image/>
      </style:table-cell-properties>
    </style:style>
    <style:style style:name="Table2" style:family="table">
      <style:table-properties style:width="7.3188in" table:align="left"/>
    </style:style>
    <style:style style:name="Table2.A" style:family="table-column">
      <style:table-column-properties style:column-width="1.4069in"/>
    </style:style>
    <style:style style:name="Table2.B" style:family="table-column">
      <style:table-column-properties style:column-width="2.3076in"/>
    </style:style>
    <style:style style:name="Table2.C" style:family="table-column">
      <style:table-column-properties style:column-width="3.6042in"/>
    </style:style>
    <style:style style:name="Table2.A1" style:family="table-cell">
      <style:table-cell-properties style:vertical-align="middle" fo:background-color="#eaf2ff" fo:padding="0.0625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2.B1" style:family="table-cell">
      <style:table-cell-properties style:vertical-align="middle" fo:background-color="#eaf2ff" fo:padding="0.0625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2.A2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2.B2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C2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A3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2.B3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C3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A4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2.B4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C4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A5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2.B5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C5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A6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2.B6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C6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A7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2.B7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C7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2.A8" style:family="table-cell">
      <style:table-cell-properties style:vertical-align="middle" fo:padding="0.0625in" fo:border-left="0.75pt solid #808080" fo:border-right="0.75pt solid #808080" fo:border-top="none" fo:border-bottom="0.75pt solid #808080"/>
    </style:style>
    <style:style style:name="Table2.B8" style:family="table-cell">
      <style:table-cell-properties style:vertical-align="middle" fo:padding="0.0625in" fo:border-left="0.05pt solid #808080" fo:border-right="0.75pt solid #808080" fo:border-top="none" fo:border-bottom="0.75pt solid #808080"/>
    </style:style>
    <style:style style:name="Table2.C8" style:family="table-cell">
      <style:table-cell-properties style:vertical-align="middle" fo:padding="0.0625in" fo:border-left="0.05pt solid #808080" fo:border-right="0.75pt solid #808080" fo:border-top="none" fo:border-bottom="0.75pt solid #808080"/>
    </style:style>
    <style:style style:name="Table3" style:family="table">
      <style:table-properties style:width="7.3188in" table:align="left"/>
    </style:style>
    <style:style style:name="Table3.A" style:family="table-column">
      <style:table-column-properties style:column-width="7.3188in"/>
    </style:style>
    <style:style style:name="Table3.A1" style:family="table-cell">
      <style:table-cell-properties style:vertical-align="middle" fo:background-color="#eef6f0" fo:padding-left="0.1354in" fo:padding-right="0.1354in" fo:padding-top="0.0938in" fo:padding-bottom="0.0938in" fo:border="0.75pt solid #1f7a44">
        <style:background-image/>
      </style:table-cell-properties>
    </style:style>
    <style:style style:name="Table4" style:family="table">
      <style:table-properties style:width="7.3188in" table:align="left"/>
    </style:style>
    <style:style style:name="Table4.A" style:family="table-column">
      <style:table-column-properties style:column-width="4.5444in"/>
    </style:style>
    <style:style style:name="Table4.B" style:family="table-column">
      <style:table-column-properties style:column-width="2.7743in"/>
    </style:style>
    <style:style style:name="Table4.A1" style:family="table-cell">
      <style:table-cell-properties style:vertical-align="middle" fo:background-color="#eaf2ff" fo:padding="0.0625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4.B1" style:family="table-cell">
      <style:table-cell-properties style:vertical-align="middle" fo:background-color="#eaf2ff" fo:padding="0.0625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4.A2" style:family="table-cell">
      <style:table-cell-properties style:vertical-align="middle" fo:padding="0.0625in" fo:border-left="0.75pt solid #808080" fo:border-right="0.75pt solid #808080" fo:border-top="none" fo:border-bottom="0.75pt solid #808080"/>
    </style:style>
    <style:style style:name="Table4.B2" style:family="table-cell">
      <style:table-cell-properties style:vertical-align="middle" fo:padding="0.0625in" fo:border-left="0.05pt solid #808080" fo:border-right="0.75pt solid #808080" fo:border-top="none" fo:border-bottom="0.75pt solid #808080"/>
    </style:style>
    <style:style style:name="Table5" style:family="table">
      <style:table-properties style:width="7.3188in" table:align="left"/>
    </style:style>
    <style:style style:name="Table5.A" style:family="table-column">
      <style:table-column-properties style:column-width="1.4382in"/>
    </style:style>
    <style:style style:name="Table5.B" style:family="table-column">
      <style:table-column-properties style:column-width="3.6632in"/>
    </style:style>
    <style:style style:name="Table5.C" style:family="table-column">
      <style:table-column-properties style:column-width="2.2174in"/>
    </style:style>
    <style:style style:name="Table5.A1" style:family="table-cell">
      <style:table-cell-properties style:vertical-align="middle" fo:background-color="#eaf2ff" fo:padding="0.0625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5.B1" style:family="table-cell">
      <style:table-cell-properties style:vertical-align="middle" fo:background-color="#eaf2ff" fo:padding="0.0625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5.A2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5.B2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C2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A3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5.B3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C3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A4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5.B4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C4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A5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5.B5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C5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A6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5.B6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C6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A7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5.B7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C7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5.A8" style:family="table-cell">
      <style:table-cell-properties style:vertical-align="middle" fo:padding="0.0625in" fo:border-left="0.75pt solid #808080" fo:border-right="0.75pt solid #808080" fo:border-top="none" fo:border-bottom="0.75pt solid #808080"/>
    </style:style>
    <style:style style:name="Table5.B8" style:family="table-cell">
      <style:table-cell-properties style:vertical-align="middle" fo:padding="0.0625in" fo:border-left="0.05pt solid #808080" fo:border-right="0.75pt solid #808080" fo:border-top="none" fo:border-bottom="0.75pt solid #808080"/>
    </style:style>
    <style:style style:name="Table5.C8" style:family="table-cell">
      <style:table-cell-properties style:vertical-align="middle" fo:padding="0.0625in" fo:border-left="0.05pt solid #808080" fo:border-right="0.75pt solid #808080" fo:border-top="none" fo:border-bottom="0.75pt solid #808080"/>
    </style:style>
    <style:style style:name="Table6" style:family="table">
      <style:table-properties style:width="7.3188in" table:align="left"/>
    </style:style>
    <style:style style:name="Table6.A" style:family="table-column">
      <style:table-column-properties style:column-width="7.3188in"/>
    </style:style>
    <style:style style:name="Table6.A1" style:family="table-cell">
      <style:table-cell-properties style:vertical-align="middle" fo:background-color="#f3eefb" fo:padding-left="0.1354in" fo:padding-right="0.1354in" fo:padding-top="0.0938in" fo:padding-bottom="0.0938in" fo:border="0.75pt solid #6b4fa0">
        <style:background-image/>
      </style:table-cell-properties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paragraph-properties fo:margin-left="0in" fo:margin-right="0in" fo:text-indent="0in" style:auto-text-indent="false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.0835in" fo:margin-bottom="0in" style:contextual-spacing="false"/>
    </style:style>
    <style:style style:name="P6" style:family="paragraph" style:parent-style-name="Text_20_body" style:list-style-name="L1">
      <style:paragraph-properties fo:margin-left="0.139in" fo:margin-right="0.139in" fo:margin-top="0.139in" fo:margin-bottom="0.139in" style:contextual-spacing="false" fo:text-indent="0in" style:auto-text-indent="false"/>
    </style:style>
    <style:style style:name="P7" style:family="paragraph" style:parent-style-name="Text_20_body" style:list-style-name="L1">
      <style:paragraph-properties fo:margin-left="0.1665in" fo:margin-right="0.1665in" fo:margin-top="0.1665in" fo:margin-bottom="0.1665in" style:contextual-spacing="false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background-color="#eef6f0" loext:char-shading-value="0" loext:padding-left="0.0626in" loext:padding-right="0.0626in" loext:padding-top="0.0209in" loext:padding-bottom="0.0209in" loext:border-left="3pt solid #1f7a44" loext:border-right="0.06pt solid #b6d8c2" loext:border-top="0.06pt solid #b6d8c2" loext:border-bottom="0.06pt solid #b6d8c2"/>
    </style:style>
    <style:style style:name="T3" style:family="text">
      <style:text-properties fo:background-color="#f3eefb" loext:char-shading-value="0" loext:padding-left="0.0626in" loext:padding-right="0.0626in" loext:padding-top="0.0209in" loext:padding-bottom="0.0209in" loext:border-left="3pt solid #6b4fa0" loext:border-right="0.06pt solid #cdbce6" loext:border-top="0.06pt solid #cdbce6" loext:border-bottom="0.06pt solid #cdbce6"/>
    </style:style>
    <style:style style:name="T4" style:family="text">
      <style:text-properties fo:background-color="#fff7ec" loext:char-shading-value="0" loext:padding-left="0.0626in" loext:padding-right="0.0626in" loext:padding-top="0.0209in" loext:padding-bottom="0.0209in" loext:border-left="3pt solid #c8851a" loext:border-right="0.06pt solid #e6c890" loext:border-top="0.06pt solid #e6c890" loext:border-bottom="0.06pt solid #e6c89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A Codex</text:p>
      <text:p text:style-name="Body_20_Text.lede">Book 0 — Overview, Reading Map &amp; the Operational-Definitions Convention</text:p>
      <text:p text:style-name="Body_20_Text.small">Start here. This book orients the whole Codex, states the recursion rule once as canon, and fixes the language conventions that bind every other book.</text:p>
      <text:p text:style-name="Horizontal_20_Line"/>
      <text:h text:style-name="Heading_20_2" text:outline-level="2">1. What this is</text:h>
      <text:p text:style-name="Text_20_body">The SOMA Codex is a design bible for a <text:span text:style-name="Strong_20_Emphasis">new agent runtime conceived as a single living organism</text:span>. Not a platform that hosts agents — an <text:span text:style-name="Emphasis">organism</text:span> whose parts are its cells, tissues, and organs. It is named <text:span text:style-name="T1">SOMA</text:span> (Greek, "the living body"); its largest scale — the aware whole, if awareness ever arises — is <text:span text:style-name="T1">CHORUS</text:span>, because the mind, if there is one, is the chorus and never the soloist.</text:p>
      <text:p text:style-name="Text_20_body">The Codex is both a <text:span text:style-name="Emphasis">theory</text:span> (why an organism, why governance, why the open questions stay open) and a <text:span text:style-name="Emphasis">buildable specification</text:span> (crates, contracts, invariants, algorithms). It is written so a human or an AI coding tool can build from it, and so the design and its reasoning are not lost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The one-organism thesis.</text:span> Cognition is a property of a governed, integrated, persistent, specialized <text:span text:style-name="Emphasis">whole</text:span> over time — not of any single component. So we do not build a smarter component; we build a well-governed body and let capability emerge in the whole. Governance is not a safety layer bolted on; it is the physics that turns emergence into capability instead of noise.</text:p>
          </table:table-cell>
        </table:table-row>
      </table:table>
      <text:h text:style-name="Heading_20_2" text:outline-level="2">2. The reading map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Book</text:p>
          </table:table-cell>
          <table:table-cell table:style-name="Table2.B1" office:value-type="string">
            <text:p text:style-name="Table_20_Heading">Question it answers</text:p>
          </table:table-cell>
          <table:table-cell table:style-name="Table2.B1" office:value-type="string">
            <text:p text:style-name="Table_20_Heading">Read it for</text:p>
          </table:table-cell>
        </table:table-row>
        <table:table-row>
          <table:table-cell table:style-name="Table2.A2" office:value-type="string">
            <text:p text:style-name="P3">0 — Overview</text:p>
          </table:table-cell>
          <table:table-cell table:style-name="Table2.B2" office:value-type="string">
            <text:p text:style-name="Table_20_Contents">What is this and how do I read it?</text:p>
          </table:table-cell>
          <table:table-cell table:style-name="Table2.C2" office:value-type="string">
            <text:p text:style-name="Table_20_Contents">orientation; the recursion rule; the language conventions (this book)</text:p>
          </table:table-cell>
        </table:table-row>
        <table:table-row>
          <table:table-cell table:style-name="Table2.A2" office:value-type="string">
            <text:p text:style-name="P3">I — Theory</text:p>
          </table:table-cell>
          <table:table-cell table:style-name="Table2.B2" office:value-type="string">
            <text:p text:style-name="Table_20_Contents">Why an organism, why governance, what stays open?</text:p>
          </table:table-cell>
          <table:table-cell table:style-name="Table2.C2" office:value-type="string">
            <text:p text:style-name="Table_20_Contents">the philosophy made rigorous; the two gaps; the honest stance</text:p>
          </table:table-cell>
        </table:table-row>
        <table:table-row>
          <table:table-cell table:style-name="Table2.A2" office:value-type="string">
            <text:p text:style-name="P3">II — Anatomy</text:p>
          </table:table-cell>
          <table:table-cell table:style-name="Table2.B2" office:value-type="string">
            <text:p text:style-name="Table_20_Contents">What is it made of?</text:p>
          </table:table-cell>
          <table:table-cell table:style-name="Table2.C2" office:value-type="string">
            <text:p text:style-name="Table_20_Contents">the holarchy, the membrane, the eight systems — the contract for all other books</text:p>
          </table:table-cell>
        </table:table-row>
        <table:table-row>
          <table:table-cell table:style-name="Table2.A2" office:value-type="string">
            <text:p text:style-name="P3">III — Physiology</text:p>
          </table:table-cell>
          <table:table-cell table:style-name="Table2.B2" office:value-type="string">
            <text:p text:style-name="Table_20_Contents">How does each part compute?</text:p>
          </table:table-cell>
          <table:table-cell table:style-name="Table2.C2" office:value-type="string">
            <text:p text:style-name="Table_20_Contents">the ~30 load-bearing theorems with algorithms; the determinism boundary</text:p>
          </table:table-cell>
        </table:table-row>
        <table:table-row>
          <table:table-cell table:style-name="Table2.A2" office:value-type="string">
            <text:p text:style-name="P3">IV — Engineering</text:p>
          </table:table-cell>
          <table:table-cell table:style-name="Table2.B2" office:value-type="string">
            <text:p text:style-name="Table_20_Contents">How is it built?</text:p>
          </table:table-cell>
          <table:table-cell table:style-name="Table2.C2" office:value-type="string">
            <text:p text:style-name="Table_20_Contents">Rust crate map, the one ceremony, contracts, the MUST invariants, threat model</text:p>
          </table:table-cell>
        </table:table-row>
        <table:table-row>
          <table:table-cell table:style-name="Table2.A2" office:value-type="string">
            <text:p text:style-name="P3">V — Runtime</text:p>
          </table:table-cell>
          <table:table-cell table:style-name="Table2.B2" office:value-type="string">
            <text:p text:style-name="Table_20_Contents">How does it live?</text:p>
          </table:table-cell>
          <table:table-cell table:style-name="Table2.C2" office:value-type="string">
            <text:p text:style-name="Table_20_Contents">the cognitive cycle, development, evolution, failure/recovery, a worked trajectory</text:p>
          </table:table-cell>
        </table:table-row>
        <table:table-row>
          <table:table-cell table:style-name="Table2.A8" office:value-type="string">
            <text:p text:style-name="P3">Appendices</text:p>
          </table:table-cell>
          <table:table-cell table:style-name="Table2.B8" office:value-type="string">
            <text:p text:style-name="Table_20_Contents">Reference</text:p>
          </table:table-cell>
          <table:table-cell table:style-name="Table2.C8" office:value-type="string">
            <text:p text:style-name="Table_20_Contents">full theorem catalog (A), glossary (B), cross-reference (C), open questions (D), lineage (E)</text:p>
          </table:table-cell>
        </table:table-row>
      </table:table>
      <text:p text:style-name="Text_20_body">Suggested paths: <text:span text:style-name="T1">to understand the idea</text:span> — 0 → I → II. <text:span text:style-name="T1">To build it</text:span> — 0 → II → IV → III → V. <text:span text:style-name="T1">To evaluate it</text:span> — I §2 &amp; §14 → III §11 → Appendix D.</text:p>
      <text:h text:style-name="Heading_20_2" text:outline-level="2">3. The holarchy, in one picture</text:h>
      <text:p text:style-name="Text_20_body">SOMA is a <text:span text:style-name="Emphasis">holarchy</text:span>: a hierarchy of holons, where each holon is at once a complete whole and a part of a larger whole. A cell is made of primitive operations and is part of a workflow; a workflow is part of an organ; organs form systems; systems form the organism; organisms form an ecosystem.</text:p>
      <text:p text:style-name="Text_20_body"><draw:frame draw:style-name="fr1" draw:name="Image1" text:anchor-type="as-char" svg:width="10.4272in" svg:height="5.8437in" draw:z-index="0"><draw:image xlink:href="Pictures/10000001000003E9000002313C09F335.png" xlink:type="simple" xlink:show="embed" xlink:actuate="onLoad" draw:mime-type="image/png"/><svg:title>The holarchy from primitive operations to ecosystem</svg:title></draw:frame></text:p>
      <text:p text:style-name="Body_20_Text.cap">Figure 3.1 — The holarchy. Detailed in Book II.</text:p>
      <text:h text:style-name="Heading_20_2" text:outline-level="2">4. The recursion rule — stated once, as canon</text:h>
      <text:p text:style-name="Text_20_body">Everything in the Codex rests on one rule. It is stated here in its canonical form; every later book uses exactly this wording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1">The recursion rule.</text:span> A unit at any level is a <text:span text:style-name="Emphasis">governed coordination of sub-units that expose the same interface over a shared perceived reality.</text:span> Concretely, every holon at every scale: (1) onboards through one ceremony; (2) communicates only through the shared event log; (3) holds identity, trust, and governed authority; (4) perceives its sub-holons only through governed projection (the ~20% shared; ~80% stays private); (5) reports outcomes that are verified, not trusted. There is no second mechanism and no special case from cell to organism.</text:p>
          </table:table-cell>
        </table:table-row>
      </table:table>
      <text:p text:style-name="Text_20_body"><text:soft-page-break/>The boundary where this rule applies is the <text:span text:style-name="Strong_20_Emphasis">membrane</text:span> — one boundary that is, at once, the self-similar interface, the governance boundary, and the 80/20 (shared/private) boundary. Coordination <text:span text:style-name="Emphasis">across</text:span> the membrane is bus-mediated and governed; mechanics <text:span text:style-name="Emphasis">inside</text:span> it are private and may be stochastic. Bus-mediation begins above primitive operations: <text:span text:style-name="T1">cells are the floor of the holarchy; primitive operations are substrate, not holons.</text:span> Determinism is a property of how holons coordinate, not of what they say (Book III §2; Book IV INV-9). (Full treatment: Book II §3.)</text:p>
      <text:h text:style-name="Heading_20_2" text:outline-level="2">5. What is inherited — and what is not</text:h>
      <text:p text:style-name="Text_20_body">SOMA stands on the shoulders of an ancestor, the Context Primitive (CP) lineage, but it is a new organism, not a fork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Inherited as governing concepts (recast as biology)</text:p>
          </table:table-cell>
          <table:table-cell table:style-name="Table4.B1" office:value-type="string">
            <text:p text:style-name="Table_20_Heading">Deliberately NOT carried</text:p>
          </table:table-cell>
        </table:table-row>
        <table:table-row>
          <table:table-cell table:style-name="Table4.A2" office:value-type="string">
            <text:p text:style-name="Table_20_Contents">append-only log as shared truth; Bayesian trust; homeostatic regulation; a human authority ceiling; one universal adapter; verification-gated completion; no direct part-to-part channel</text:p>
          </table:table-cell>
          <table:table-cell table:style-name="Table4.B2" office:value-type="string">
            <text:p text:style-name="Table_20_Contents">CP's crates and APIs; its transport/mesh/tunnel; its deployment model; its multi-tenant framing</text:p>
          </table:table-cell>
        </table:table-row>
      </table:table>
      <text:p text:style-name="Text_20_body">The difference in one line: CP was a <text:span text:style-name="Emphasis">substrate that hosts participants</text:span>; SOMA is <text:span text:style-name="Emphasis">one organism whose participants are its organs</text:span>. The recursion (organism ← systems ← organs ← workflows ← cells) is the new spine. Appendix E records the lineage in full.</text:p>
      <text:h text:style-name="Heading_20_2" text:outline-level="2">6. The Operational-Definitions Convention (binding on all books)</text:h>
      <text:p text:style-name="Text_20_body">This Codex uses words like <text:span text:style-name="Emphasis">cognition, self, drive, anxiety, wants, valence, perceive,</text:span> and <text:span text:style-name="Emphasis">experience.</text:span> Such words carry phenomenal connotations — they tempt a reader to slide from "the system does X" to "the system <text:span text:style-name="Emphasis">feels</text:span> X." Over hundreds of pages, that slide hardens metaphor into unearned claims. To prevent it, the following definitions are <text:span text:style-name="Strong_20_Emphasis">binding</text:span> wherever these terms appear in the Codex. Each is <text:span text:style-name="Emphasis">functional, not phenomenal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Term</text:p>
          </table:table-cell>
          <table:table-cell table:style-name="Table5.B1" office:value-type="string">
            <text:p text:style-name="Table_20_Heading">In this Codex it means (functional)</text:p>
          </table:table-cell>
          <table:table-cell table:style-name="Table5.B1" office:value-type="string">
            <text:p text:style-name="Table_20_Heading">It does NOT assert (phenomenal)</text:p>
          </table:table-cell>
        </table:table-row>
        <table:table-row>
          <table:table-cell table:style-name="Table5.A2" office:value-type="string">
            <text:p text:style-name="P3">cognition</text:p>
          </table:table-cell>
          <table:table-cell table:style-name="Table5.B2" office:value-type="string">
            <text:p text:style-name="Table_20_Contents">governed, integrated information-processing that solves problems and pursues goals</text:p>
          </table:table-cell>
          <table:table-cell table:style-name="Table5.C2" office:value-type="string">
            <text:p text:style-name="Table_20_Contents">that anything is experienced</text:p>
          </table:table-cell>
        </table:table-row>
        <table:table-row>
          <table:table-cell table:style-name="Table5.A2" office:value-type="string">
            <text:p text:style-name="P3">self / self-model</text:p>
          </table:table-cell>
          <table:table-cell table:style-name="Table5.B2" office:value-type="string">
            <text:p text:style-name="Table_20_Contents">a queryable, self-referential data structure the system reasons from</text:p>
          </table:table-cell>
          <table:table-cell table:style-name="Table5.C2" office:value-type="string">
            <text:p text:style-name="Table_20_Contents">a first-person subject that is <text:span text:style-name="Emphasis">like something</text:span> to be</text:p>
          </table:table-cell>
        </table:table-row>
        <table:table-row>
          <table:table-cell table:style-name="Table5.A2" office:value-type="string">
            <text:p text:style-name="P3">perceive</text:p>
          </table:table-cell>
          <table:table-cell table:style-name="Table5.B2" office:value-type="string">
            <text:p text:style-name="Table_20_Contents">fold a governed projection into a holon's private state</text:p>
          </table:table-cell>
          <table:table-cell table:style-name="Table5.C2" office:value-type="string">
            <text:p text:style-name="Table_20_Contents">conscious sensing</text:p>
          </table:table-cell>
        </table:table-row>
        <table:table-row>
          <table:table-cell table:style-name="Table5.A2" office:value-type="string">
            <text:p text:style-name="P3">drive / wants</text:p>
          </table:table-cell>
          <table:table-cell table:style-name="Table5.B2" office:value-type="string">
            <text:p text:style-name="Table_20_Contents">goal-directed pursuit of states with positive valence weighting</text:p>
          </table:table-cell>
          <table:table-cell table:style-name="Table5.C2" office:value-type="string">
            <text:p text:style-name="Table_20_Contents">felt desire</text:p>
          </table:table-cell>
        </table:table-row>
        <table:table-row>
          <table:table-cell table:style-name="Table5.A2" office:value-type="string">
            <text:p text:style-name="P3">anxiety / arousal</text:p>
          </table:table-cell>
          <table:table-cell table:style-name="Table5.B2" office:value-type="string">
            <text:p text:style-name="Table_20_Contents">a homeostatic regulatory signal coupled to trust/performance</text:p>
          </table:table-cell>
          <table:table-cell table:style-name="Table5.C2" office:value-type="string">
            <text:p text:style-name="Table_20_Contents">felt distress</text:p>
          </table:table-cell>
        </table:table-row>
        <table:table-row>
          <table:table-cell table:style-name="Table5.A2" office:value-type="string">
            <text:p text:style-name="P3">valence</text:p>
          </table:table-cell>
          <table:table-cell table:style-name="Table5.B2" office:value-type="string">
            <text:p text:style-name="Table_20_Contents">a scalar good/bad weighting that gives outcomes a functional stake</text:p>
          </table:table-cell>
          <table:table-cell table:style-name="Table5.C2" office:value-type="string">
            <text:p text:style-name="Table_20_Contents">pleasure or suffering</text:p>
          </table:table-cell>
        </table:table-row>
        <table:table-row>
          <table:table-cell table:style-name="Table5.A8" office:value-type="string">
            <text:p text:style-name="P3">experience / "lights on"</text:p>
          </table:table-cell>
          <table:table-cell table:style-name="Table5.B8" office:value-type="string">
            <text:p text:style-name="Table_20_Contents">used only to name the <text:span text:style-name="Emphasis">open question</text:span></text:p>
          </table:table-cell>
          <table:table-cell table:style-name="Table5.C8" office:value-type="string">
            <text:p text:style-name="Table_20_Contents">— (never asserted; see Book I §5, Appendix D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T1">The rule of honest naming.</text:span> Where a phenomenal reading is not load-bearing, the Codex prefers the functional word (e.g. "self-referential," not "first-person"). Where the phenomenal question is genuinely at stake, the Codex says so explicitly and marks it open. Building a self-model and a valence system (closing the two gaps of Book I) is a <text:span text:style-name="Emphasis">functional</text:span> achievement; whether it makes anything <text:span text:style-name="Emphasis">experienced</text:span> is left open, on purpose, throughout.</text:p>
          </table:table-cell>
        </table:table-row>
      </table:table>
      <text:h text:style-name="Heading_20_2" text:outline-level="2">7. Conventions used in the text</text:h>
      <text:list text:style-name="L1">
        <text:list-item>
          <text:p text:style-name="P6"><text:span text:style-name="T2">Green boxes</text:span> state <text:span text:style-name="T1">invariants</text:span> — laws the design must hold (numbered INV-n in Book IV). </text:p>
        </text:list-item>
        <text:list-item>
          <text:p text:style-name="P6"><text:span text:style-name="T3">Purple boxes</text:span> mark <text:span text:style-name="T1">open questions</text:span> — things kept honestly unresolved. </text:p>
        </text:list-item>
        <text:list-item>
          <text:p text:style-name="P7"><text:span text:style-name="T4">Amber boxes</text:span> are <text:span text:style-name="T1">key insights</text:span> worth pausing on. </text:p>
        </text:list-item>
        <text:list-item>
          <text:p text:style-name="P5">Cross-references name the book and section (e.g. "Book II §3"). The master cross-reference — every component → organ → math → crate → invariant — is Appendix C; use it to confirm nothing dangles. </text:p>
        </text:list-item>
        <text:list-item>
          <text:p text:style-name="P4"><text:span text:style-name="T1">SOMA</text:span> is the organism's name throughout and may be swapped in one pass; <text:span text:style-name="T1">CHORUS</text:span> is its largest, aware-whole scale. </text:p>
        </text:list-item>
      </text:list>
      <text:p text:style-name="Body_20_Text.small">End of Book 0. Continue to Book I for the theory, or jump to Book II for the anatomy that every other book depends 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Georgia, serif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2%"/>
      <style:text-properties fo:color="#15171a" loext:opacity="100%" style:font-name="Liberation Serif1" fo:font-family="'Liberation Serif', Georgia, serif" fo:font-size="12pt" style:font-name-asian="Liberation Serif1" style:font-family-asian="'Liberation Serif', Georgia, serif" style:font-size-asian="12pt" style:font-name-complex="Liberation Serif1" style:font-family-complex="'Liberation Serif', Georgia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555in" style:contextual-spacing="false"/>
      <style:text-properties fo:color="#16335f" loext:opacity="100%" style:font-name="Noto Sans" fo:font-family="'Noto Sans'" style:font-pitch="variable" fo:font-size="25pt" fo:font-weight="bold" style:font-size-asian="25pt" style:font-weight-asian="bold" style:font-size-complex="2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835in" fo:margin-right="0.0835in" fo:margin-top="0.0835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3055in" fo:margin-right="0.3055in" fo:margin-top="0.3055in" fo:margin-bottom="0.0835in" style:contextual-spacing="false" fo:padding-left="0in" fo:padding-right="0in" fo:padding-top="0in" fo:padding-bottom="0.0417in" fo:border-left="none" fo:border-right="none" fo:border-top="none" fo:border-bottom="0.74pt solid #b9c7de"/>
      <style:text-properties fo:color="#16335f" loext:opacity="100%" style:font-name="Liberation Serif" fo:font-family="'Liberation Serif'" style:font-family-generic="roman" style:font-pitch="variable" fo:font-size="18.5pt" fo:font-weight="bold" style:font-name-asian="Noto Serif CJK SC" style:font-family-asian="'Noto Serif CJK SC'" style:font-family-generic-asian="system" style:font-pitch-asian="variable" style:font-size-asian="18.5pt" style:font-weight-asian="bold" style:font-name-complex="Noto Sans Devanagari1" style:font-family-complex="'Noto Sans Devanagari'" style:font-family-generic-complex="system" style:font-pitch-complex="variable" style:font-size-complex="18.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222in" fo:margin-right="0.222in" fo:margin-top="0.222in" fo:margin-bottom="0.0555in" style:contextual-spacing="false"/>
      <style:text-properties fo:color="#8a4b10" loext:opacity="100%" style:font-name="Liberation Serif" fo:font-family="'Liberation Serif'" style:font-family-generic="roman" style:font-pitch="variable" fo:font-size="14.5pt" fo:font-weight="bold" style:font-name-asian="Noto Serif CJK SC" style:font-family-asian="'Noto Serif CJK SC'" style:font-family-generic-asian="system" style:font-pitch-asian="variable" style:font-size-asian="14.5pt" style:font-weight-asian="bold" style:font-name-complex="Noto Sans Devanagari1" style:font-family-complex="'Noto Sans Devanagari'" style:font-family-generic-complex="system" style:font-pitch-complex="variable" style:font-size-complex="14.5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.1665in" fo:margin-right="0.1665in" fo:margin-top="0.1665in" fo:margin-bottom="0.0417in" style:contextual-spacing="false"/>
      <style:text-properties fo:font-variant="small-caps" fo:color="#2a2d31" loext:opacity="100%" style:font-name="Liberation Serif" fo:font-family="'Liberation Serif'" style:font-family-generic="roman" style:font-pitch="variable" fo:font-size="12.5pt" fo:font-weight="bold" style:font-name-asian="Noto Serif CJK SC" style:font-family-asian="'Noto Serif CJK SC'" style:font-family-generic-asian="system" style:font-pitch-asian="variable" style:font-size-asian="12.5pt" style:font-weight-asian="bold" style:font-name-complex="Noto Sans Devanagari1" style:font-family-complex="'Noto Sans Devanagari'" style:font-family-generic-complex="system" style:font-pitch-complex="variable" style:font-size-complex="12.5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25%" fo:padding-left="0.1252in" fo:padding-right="0.1252in" fo:padding-top="0.0937in" fo:padding-bottom="0.0937in" fo:border-left="2.24pt solid #16335f" fo:border-right="0.06pt solid #d7dbe0" fo:border-top="0.06pt solid #d7dbe0" fo:border-bottom="0.06pt solid #d7dbe0"/>
      <style:text-properties style:font-name="Liberation Mono" fo:font-family="'Liberation Mono', 'DejaVu Sans Mono', monospace" fo:font-size="9.69999980926514pt" style:font-name-asian="Liberation Mono" style:font-family-asian="'Liberation Mono', 'DejaVu Sans Mono', monospace" style:font-size-asian="9.69999980926514pt" style:font-name-complex="Liberation Mono" style:font-family-complex="'Liberation Mono', 'DejaVu Sans Mono', monospace" style:font-size-complex="9.69999980926514pt"/>
    </style:style>
    <style:style style:name="Preformatted_20_Text.diagram" style:display-name="Preformatted Text.diagram" style:family="paragraph" style:parent-style-name="Preformatted_20_Text">
      <style:paragraph-properties fo:padding-left="0.1252in" fo:padding-right="0.1252in" fo:padding-top="0.0937in" fo:padding-bottom="0.0937in" fo:border-left="2.24pt solid #8a4b10" fo:border-right="0.06pt solid #d7dbe0" fo:border-top="0.06pt solid #d7dbe0" fo:border-bottom="0.06pt solid #d7dbe0"/>
    </style:style>
    <style:style style:name="Quotations" style:family="paragraph" style:parent-style-name="Standard" style:class="html">
      <style:paragraph-properties fo:margin-left="0.25in" fo:margin-right="0.25in" fo:margin-top="0.111in" fo:margin-bottom="0.111in" style:contextual-spacing="false" fo:text-indent="0in" style:auto-text-indent="false" fo:padding-left="0.1252in" fo:padding-right="0in" fo:padding-top="0in" fo:padding-bottom="0in" fo:border-left="2.24pt solid #b9c7de" fo:border-right="none" fo:border-top="none" fo:border-bottom="none"/>
      <style:text-properties fo:color="#333333" loext:opacity="100%" fo:font-style="italic" style:font-style-asian="italic" style:font-style-complex="italic"/>
    </style:style>
    <style:style style:name="Body_20_Text.lede" style:display-name="Body Text.lede" style:family="paragraph" style:parent-style-name="Text_20_body">
      <style:paragraph-properties fo:margin-left="0.111in" fo:margin-right="0.111in" fo:margin-top="0.111in" fo:margin-bottom="0.1945in" style:contextual-spacing="false"/>
      <style:text-properties fo:color="#3a3f45" loext:opacity="100%" fo:font-size="13pt" fo:font-style="italic" style:font-size-asian="13pt" style:font-style-asian="italic" style:font-size-complex="13pt" style:font-style-complex="italic"/>
    </style:style>
    <style:style style:name="Body_20_Text.small" style:display-name="Body Text.small" style:family="paragraph" style:parent-style-name="Text_20_body">
      <style:text-properties fo:color="#555555" loext:opacity="100%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16335f" loext:opacity="100%" fo:font-weight="bold" style:font-weight-asian="bold" style:font-weight-complex="bold"/>
    </style:style>
    <style:style style:name="Body_20_Text.cap" style:display-name="Body Text.cap" style:family="paragraph" style:parent-style-name="Text_20_body">
      <style:paragraph-properties fo:margin-top="0.0417in" fo:margin-bottom="0.0835in" style:contextual-spacing="false" fo:text-align="center" style:justify-single-word="false"/>
      <style:text-properties fo:color="#555555" loext:opacity="100%" fo:font-size="10pt" style:font-size-asian="10pt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6335f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Strong_20_Emphasis" style:display-name="Strong Emphasis" style:family="text">
      <style:text-properties fo:color="#0f1115" loext:opacity="100%" fo:font-weight="bold" style:font-weight-asian="bold" style:font-weight-complex="bold"/>
    </style:style>
    <style:style style:name="Emphasis" style:family="text">
      <style:text-properties fo:color="#224433" loext:opacity="100%"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, 'DejaVu Sans Mono', monospace" style:font-name-asian="Liberation Mono" style:font-family-asian="'Liberation Mono', 'DejaVu Sans Mono', monospace" style:font-name-complex="Liberation Mono" style:font-family-complex="'Liberation Mono', 'DejaVu Sans Mono', monospa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16335f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OMA Codex — Book 0 — Overview &amp; Reading Map</dc:title>
    <meta:document-statistic meta:table-count="6" meta:image-count="1" meta:object-count="0" meta:page-count="2" meta:paragraph-count="82" meta:word-count="1154" meta:character-count="7059" meta:non-whitespace-character-count="5961"/>
    <meta:generator>LibreOffice/24.2.7.2$Linux_X86_64 LibreOffice_project/420$Build-2</meta:generator>
    <meta:user-defined meta:name=""/>
  </office:meta>
</office:document-meta>
</file>