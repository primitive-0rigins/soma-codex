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1.4688in"/>
    </style:style>
    <style:style style:name="Table1.B" style:family="table-column">
      <style:table-column-properties style:column-width="1.55in"/>
    </style:style>
    <style:style style:name="Table1.C" style:family="table-column">
      <style:table-column-properties style:column-width="1.3333in"/>
    </style:style>
    <style:style style:name="Table1.D" style:family="table-column">
      <style:table-column-properties style:column-width="1.8354in"/>
    </style:style>
    <style:style style:name="Table1.E" style:family="table-column">
      <style:table-column-properties style:column-width="1.1313in"/>
    </style:style>
    <style:style style:name="Table1.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padding="0.0625in" fo:border-left="0.75pt solid #808080" fo:border-right="0.75pt solid #808080" fo:border-top="none" fo:border-bottom="0.05pt solid #808080"/>
    </style:style>
    <style:style style:name="Table1.B2" style:family="table-cell">
      <style:table-cell-properties style:vertical-align="middle" fo:padding="0.0625in" fo:border-left="0.05pt solid #808080" fo:border-right="0.75pt solid #808080" fo:border-top="none" fo:border-bottom="0.05pt solid #808080"/>
    </style:style>
    <style:style style:name="Table1.C2" style:family="table-cell">
      <style:table-cell-properties style:vertical-align="middle" fo:padding="0.0625in" fo:border-left="0.05pt solid #808080" fo:border-right="0.75pt solid #808080" fo:border-top="none" fo:border-bottom="0.05pt solid #808080"/>
    </style:style>
    <style:style style:name="Table1.D2" style:family="table-cell">
      <style:table-cell-properties style:vertical-align="middle" fo:padding="0.0625in" fo:border-left="0.05pt solid #808080" fo:border-right="0.75pt solid #808080" fo:border-top="none" fo:border-bottom="0.05pt solid #808080"/>
    </style:style>
    <style:style style:name="Table1.E2" style:family="table-cell">
      <style:table-cell-properties style:vertical-align="middle" fo:padding="0.0625in" fo:border-left="0.05pt solid #808080" fo:border-right="0.75pt solid #808080" fo:border-top="none" fo:border-bottom="0.05pt solid #808080"/>
    </style:style>
    <style:style style:name="Table1.A3" style:family="table-cell">
      <style:table-cell-properties style:vertical-align="middle" fo:padding="0.0625in" fo:border-left="0.75pt solid #808080" fo:border-right="0.75pt solid #808080" fo:border-top="none" fo:border-bottom="0.05pt solid #808080"/>
    </style:style>
    <style:style style:name="Table1.B3" style:family="table-cell">
      <style:table-cell-properties style:vertical-align="middle" fo:padding="0.0625in" fo:border-left="0.05pt solid #808080" fo:border-right="0.75pt solid #808080" fo:border-top="none" fo:border-bottom="0.05pt solid #808080"/>
    </style:style>
    <style:style style:name="Table1.C3" style:family="table-cell">
      <style:table-cell-properties style:vertical-align="middle" fo:padding="0.0625in" fo:border-left="0.05pt solid #808080" fo:border-right="0.75pt solid #808080" fo:border-top="none" fo:border-bottom="0.05pt solid #808080"/>
    </style:style>
    <style:style style:name="Table1.D3" style:family="table-cell">
      <style:table-cell-properties style:vertical-align="middle" fo:padding="0.0625in" fo:border-left="0.05pt solid #808080" fo:border-right="0.75pt solid #808080" fo:border-top="none" fo:border-bottom="0.05pt solid #808080"/>
    </style:style>
    <style:style style:name="Table1.E3" style:family="table-cell">
      <style:table-cell-properties style:vertical-align="middle" fo:padding="0.0625in" fo:border-left="0.05pt solid #808080" fo:border-right="0.75pt solid #808080" fo:border-top="none" fo:border-bottom="0.05pt solid #808080"/>
    </style:style>
    <style:style style:name="Table1.A4" style:family="table-cell">
      <style:table-cell-properties style:vertical-align="middle" fo:padding="0.0625in" fo:border-left="0.75pt solid #808080" fo:border-right="0.75pt solid #808080" fo:border-top="none" fo:border-bottom="0.05pt solid #808080"/>
    </style:style>
    <style:style style:name="Table1.B4" style:family="table-cell">
      <style:table-cell-properties style:vertical-align="middle" fo:padding="0.0625in" fo:border-left="0.05pt solid #808080" fo:border-right="0.75pt solid #808080" fo:border-top="none" fo:border-bottom="0.05pt solid #808080"/>
    </style:style>
    <style:style style:name="Table1.C4" style:family="table-cell">
      <style:table-cell-properties style:vertical-align="middle" fo:padding="0.0625in" fo:border-left="0.05pt solid #808080" fo:border-right="0.75pt solid #808080" fo:border-top="none" fo:border-bottom="0.05pt solid #808080"/>
    </style:style>
    <style:style style:name="Table1.D4" style:family="table-cell">
      <style:table-cell-properties style:vertical-align="middle" fo:padding="0.0625in" fo:border-left="0.05pt solid #808080" fo:border-right="0.75pt solid #808080" fo:border-top="none" fo:border-bottom="0.05pt solid #808080"/>
    </style:style>
    <style:style style:name="Table1.E4" style:family="table-cell">
      <style:table-cell-properties style:vertical-align="middle" fo:padding="0.0625in" fo:border-left="0.05pt solid #808080" fo:border-right="0.75pt solid #808080" fo:border-top="none" fo:border-bottom="0.05pt solid #808080"/>
    </style:style>
    <style:style style:name="Table1.A5" style:family="table-cell">
      <style:table-cell-properties style:vertical-align="middle" fo:padding="0.0625in" fo:border-left="0.75pt solid #808080" fo:border-right="0.75pt solid #808080" fo:border-top="none" fo:border-bottom="0.05pt solid #808080"/>
    </style:style>
    <style:style style:name="Table1.B5" style:family="table-cell">
      <style:table-cell-properties style:vertical-align="middle" fo:padding="0.0625in" fo:border-left="0.05pt solid #808080" fo:border-right="0.75pt solid #808080" fo:border-top="none" fo:border-bottom="0.05pt solid #808080"/>
    </style:style>
    <style:style style:name="Table1.C5" style:family="table-cell">
      <style:table-cell-properties style:vertical-align="middle" fo:padding="0.0625in" fo:border-left="0.05pt solid #808080" fo:border-right="0.75pt solid #808080" fo:border-top="none" fo:border-bottom="0.05pt solid #808080"/>
    </style:style>
    <style:style style:name="Table1.D5" style:family="table-cell">
      <style:table-cell-properties style:vertical-align="middle" fo:padding="0.0625in" fo:border-left="0.05pt solid #808080" fo:border-right="0.75pt solid #808080" fo:border-top="none" fo:border-bottom="0.05pt solid #808080"/>
    </style:style>
    <style:style style:name="Table1.E5" style:family="table-cell">
      <style:table-cell-properties style:vertical-align="middle" fo:padding="0.0625in" fo:border-left="0.05pt solid #808080" fo:border-right="0.75pt solid #808080" fo:border-top="none" fo:border-bottom="0.05pt solid #808080"/>
    </style:style>
    <style:style style:name="Table1.A6" style:family="table-cell">
      <style:table-cell-properties style:vertical-align="middle" fo:padding="0.0625in" fo:border-left="0.75pt solid #808080" fo:border-right="0.75pt solid #808080" fo:border-top="none" fo:border-bottom="0.05pt solid #808080"/>
    </style:style>
    <style:style style:name="Table1.B6" style:family="table-cell">
      <style:table-cell-properties style:vertical-align="middle" fo:padding="0.0625in" fo:border-left="0.05pt solid #808080" fo:border-right="0.75pt solid #808080" fo:border-top="none" fo:border-bottom="0.05pt solid #808080"/>
    </style:style>
    <style:style style:name="Table1.C6" style:family="table-cell">
      <style:table-cell-properties style:vertical-align="middle" fo:padding="0.0625in" fo:border-left="0.05pt solid #808080" fo:border-right="0.75pt solid #808080" fo:border-top="none" fo:border-bottom="0.05pt solid #808080"/>
    </style:style>
    <style:style style:name="Table1.D6" style:family="table-cell">
      <style:table-cell-properties style:vertical-align="middle" fo:padding="0.0625in" fo:border-left="0.05pt solid #808080" fo:border-right="0.75pt solid #808080" fo:border-top="none" fo:border-bottom="0.05pt solid #808080"/>
    </style:style>
    <style:style style:name="Table1.E6" style:family="table-cell">
      <style:table-cell-properties style:vertical-align="middle" fo:padding="0.0625in" fo:border-left="0.05pt solid #808080" fo:border-right="0.75pt solid #808080" fo:border-top="none" fo:border-bottom="0.05pt solid #808080"/>
    </style:style>
    <style:style style:name="Table1.A7" style:family="table-cell">
      <style:table-cell-properties style:vertical-align="middle" fo:padding="0.0625in" fo:border-left="0.75pt solid #808080" fo:border-right="0.75pt solid #808080" fo:border-top="none" fo:border-bottom="0.05pt solid #808080"/>
    </style:style>
    <style:style style:name="Table1.B7" style:family="table-cell">
      <style:table-cell-properties style:vertical-align="middle" fo:padding="0.0625in" fo:border-left="0.05pt solid #808080" fo:border-right="0.75pt solid #808080" fo:border-top="none" fo:border-bottom="0.05pt solid #808080"/>
    </style:style>
    <style:style style:name="Table1.C7" style:family="table-cell">
      <style:table-cell-properties style:vertical-align="middle" fo:padding="0.0625in" fo:border-left="0.05pt solid #808080" fo:border-right="0.75pt solid #808080" fo:border-top="none" fo:border-bottom="0.05pt solid #808080"/>
    </style:style>
    <style:style style:name="Table1.D7" style:family="table-cell">
      <style:table-cell-properties style:vertical-align="middle" fo:padding="0.0625in" fo:border-left="0.05pt solid #808080" fo:border-right="0.75pt solid #808080" fo:border-top="none" fo:border-bottom="0.05pt solid #808080"/>
    </style:style>
    <style:style style:name="Table1.E7" style:family="table-cell">
      <style:table-cell-properties style:vertical-align="middle" fo:padding="0.0625in" fo:border-left="0.05pt solid #808080" fo:border-right="0.75pt solid #808080" fo:border-top="none" fo:border-bottom="0.05pt solid #808080"/>
    </style:style>
    <style:style style:name="Table1.A8" style:family="table-cell">
      <style:table-cell-properties style:vertical-align="middle" fo:padding="0.0625in" fo:border-left="0.75pt solid #808080" fo:border-right="0.75pt solid #808080" fo:border-top="none" fo:border-bottom="0.05pt solid #808080"/>
    </style:style>
    <style:style style:name="Table1.B8" style:family="table-cell">
      <style:table-cell-properties style:vertical-align="middle" fo:padding="0.0625in" fo:border-left="0.05pt solid #808080" fo:border-right="0.75pt solid #808080" fo:border-top="none" fo:border-bottom="0.05pt solid #808080"/>
    </style:style>
    <style:style style:name="Table1.C8" style:family="table-cell">
      <style:table-cell-properties style:vertical-align="middle" fo:padding="0.0625in" fo:border-left="0.05pt solid #808080" fo:border-right="0.75pt solid #808080" fo:border-top="none" fo:border-bottom="0.05pt solid #808080"/>
    </style:style>
    <style:style style:name="Table1.D8" style:family="table-cell">
      <style:table-cell-properties style:vertical-align="middle" fo:padding="0.0625in" fo:border-left="0.05pt solid #808080" fo:border-right="0.75pt solid #808080" fo:border-top="none" fo:border-bottom="0.05pt solid #808080"/>
    </style:style>
    <style:style style:name="Table1.E8" style:family="table-cell">
      <style:table-cell-properties style:vertical-align="middle" fo:padding="0.0625in" fo:border-left="0.05pt solid #808080" fo:border-right="0.75pt solid #808080" fo:border-top="none" fo:border-bottom="0.05pt solid #808080"/>
    </style:style>
    <style:style style:name="Table1.A9" style:family="table-cell">
      <style:table-cell-properties style:vertical-align="middle" fo:padding="0.0625in" fo:border-left="0.75pt solid #808080" fo:border-right="0.75pt solid #808080" fo:border-top="none" fo:border-bottom="0.05pt solid #808080"/>
    </style:style>
    <style:style style:name="Table1.B9" style:family="table-cell">
      <style:table-cell-properties style:vertical-align="middle" fo:padding="0.0625in" fo:border-left="0.05pt solid #808080" fo:border-right="0.75pt solid #808080" fo:border-top="none" fo:border-bottom="0.05pt solid #808080"/>
    </style:style>
    <style:style style:name="Table1.C9" style:family="table-cell">
      <style:table-cell-properties style:vertical-align="middle" fo:padding="0.0625in" fo:border-left="0.05pt solid #808080" fo:border-right="0.75pt solid #808080" fo:border-top="none" fo:border-bottom="0.05pt solid #808080"/>
    </style:style>
    <style:style style:name="Table1.D9" style:family="table-cell">
      <style:table-cell-properties style:vertical-align="middle" fo:padding="0.0625in" fo:border-left="0.05pt solid #808080" fo:border-right="0.75pt solid #808080" fo:border-top="none" fo:border-bottom="0.05pt solid #808080"/>
    </style:style>
    <style:style style:name="Table1.E9" style:family="table-cell">
      <style:table-cell-properties style:vertical-align="middle" fo:padding="0.0625in" fo:border-left="0.05pt solid #808080" fo:border-right="0.75pt solid #808080" fo:border-top="none" fo:border-bottom="0.05pt solid #808080"/>
    </style:style>
    <style:style style:name="Table1.A10" style:family="table-cell">
      <style:table-cell-properties style:vertical-align="middle" fo:padding="0.0625in" fo:border-left="0.75pt solid #808080" fo:border-right="0.75pt solid #808080" fo:border-top="none" fo:border-bottom="0.05pt solid #808080"/>
    </style:style>
    <style:style style:name="Table1.B10" style:family="table-cell">
      <style:table-cell-properties style:vertical-align="middle" fo:padding="0.0625in" fo:border-left="0.05pt solid #808080" fo:border-right="0.75pt solid #808080" fo:border-top="none" fo:border-bottom="0.05pt solid #808080"/>
    </style:style>
    <style:style style:name="Table1.C10" style:family="table-cell">
      <style:table-cell-properties style:vertical-align="middle" fo:padding="0.0625in" fo:border-left="0.05pt solid #808080" fo:border-right="0.75pt solid #808080" fo:border-top="none" fo:border-bottom="0.05pt solid #808080"/>
    </style:style>
    <style:style style:name="Table1.D10" style:family="table-cell">
      <style:table-cell-properties style:vertical-align="middle" fo:padding="0.0625in" fo:border-left="0.05pt solid #808080" fo:border-right="0.75pt solid #808080" fo:border-top="none" fo:border-bottom="0.05pt solid #808080"/>
    </style:style>
    <style:style style:name="Table1.E10" style:family="table-cell">
      <style:table-cell-properties style:vertical-align="middle" fo:padding="0.0625in" fo:border-left="0.05pt solid #808080" fo:border-right="0.75pt solid #808080" fo:border-top="none" fo:border-bottom="0.05pt solid #808080"/>
    </style:style>
    <style:style style:name="Table1.A11" style:family="table-cell">
      <style:table-cell-properties style:vertical-align="middle" fo:padding="0.0625in" fo:border-left="0.75pt solid #808080" fo:border-right="0.75pt solid #808080" fo:border-top="none" fo:border-bottom="0.75pt solid #808080"/>
    </style:style>
    <style:style style:name="Table1.B11" style:family="table-cell">
      <style:table-cell-properties style:vertical-align="middle" fo:padding="0.0625in" fo:border-left="0.05pt solid #808080" fo:border-right="0.75pt solid #808080" fo:border-top="none" fo:border-bottom="0.75pt solid #808080"/>
    </style:style>
    <style:style style:name="Table1.C11" style:family="table-cell">
      <style:table-cell-properties style:vertical-align="middle" fo:padding="0.0625in" fo:border-left="0.05pt solid #808080" fo:border-right="0.75pt solid #808080" fo:border-top="none" fo:border-bottom="0.75pt solid #808080"/>
    </style:style>
    <style:style style:name="Table1.D11" style:family="table-cell">
      <style:table-cell-properties style:vertical-align="middle" fo:padding="0.0625in" fo:border-left="0.05pt solid #808080" fo:border-right="0.75pt solid #808080" fo:border-top="none" fo:border-bottom="0.75pt solid #808080"/>
    </style:style>
    <style:style style:name="Table1.E11" style:family="table-cell">
      <style:table-cell-properties style:vertical-align="middle" fo:padding="0.0625in" fo:border-left="0.05pt solid #808080" fo:border-right="0.75pt solid #808080" fo:border-top="none" fo:border-bottom="0.75pt solid #808080"/>
    </style:style>
    <style:style style:name="Table2" style:family="table">
      <style:table-properties style:width="7.3188in" table:align="left"/>
    </style:style>
    <style:style style:name="Table2.A" style:family="table-column">
      <style:table-column-properties style:column-width="0.7181in"/>
    </style:style>
    <style:style style:name="Table2.B" style:family="table-column">
      <style:table-column-properties style:column-width="6.6007in"/>
    </style:style>
    <style:style style:name="Table2.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A2" style:family="table-cell">
      <style:table-cell-properties style:vertical-align="middle" fo:padding="0.0625in" fo:border-left="0.75pt solid #808080" fo:border-right="0.75pt solid #808080" fo:border-top="none" fo:border-bottom="0.05pt solid #808080"/>
    </style:style>
    <style:style style:name="Table2.B2" style:family="table-cell">
      <style:table-cell-properties style:vertical-align="middle" fo:padding="0.0625in" fo:border-left="0.05pt solid #808080" fo:border-right="0.75pt solid #808080" fo:border-top="none" fo:border-bottom="0.05pt solid #808080"/>
    </style:style>
    <style:style style:name="Table2.A3" style:family="table-cell">
      <style:table-cell-properties style:vertical-align="middle" fo:padding="0.0625in" fo:border-left="0.75pt solid #808080" fo:border-right="0.75pt solid #808080" fo:border-top="none" fo:border-bottom="0.05pt solid #808080"/>
    </style:style>
    <style:style style:name="Table2.B3" style:family="table-cell">
      <style:table-cell-properties style:vertical-align="middle" fo:padding="0.0625in" fo:border-left="0.05pt solid #808080" fo:border-right="0.75pt solid #808080" fo:border-top="none" fo:border-bottom="0.05pt solid #808080"/>
    </style:style>
    <style:style style:name="Table2.A4" style:family="table-cell">
      <style:table-cell-properties style:vertical-align="middle" fo:padding="0.0625in" fo:border-left="0.75pt solid #808080" fo:border-right="0.75pt solid #808080" fo:border-top="none" fo:border-bottom="0.05pt solid #808080"/>
    </style:style>
    <style:style style:name="Table2.B4" style:family="table-cell">
      <style:table-cell-properties style:vertical-align="middle" fo:padding="0.0625in" fo:border-left="0.05pt solid #808080" fo:border-right="0.75pt solid #808080" fo:border-top="none" fo:border-bottom="0.05pt solid #808080"/>
    </style:style>
    <style:style style:name="Table2.A5" style:family="table-cell">
      <style:table-cell-properties style:vertical-align="middle" fo:padding="0.0625in" fo:border-left="0.75pt solid #808080" fo:border-right="0.75pt solid #808080" fo:border-top="none" fo:border-bottom="0.05pt solid #808080"/>
    </style:style>
    <style:style style:name="Table2.B5" style:family="table-cell">
      <style:table-cell-properties style:vertical-align="middle" fo:padding="0.0625in" fo:border-left="0.05pt solid #808080" fo:border-right="0.75pt solid #808080" fo:border-top="none" fo:border-bottom="0.05pt solid #808080"/>
    </style:style>
    <style:style style:name="Table2.A6" style:family="table-cell">
      <style:table-cell-properties style:vertical-align="middle" fo:padding="0.0625in" fo:border-left="0.75pt solid #808080" fo:border-right="0.75pt solid #808080" fo:border-top="none" fo:border-bottom="0.05pt solid #808080"/>
    </style:style>
    <style:style style:name="Table2.B6" style:family="table-cell">
      <style:table-cell-properties style:vertical-align="middle" fo:padding="0.0625in" fo:border-left="0.05pt solid #808080" fo:border-right="0.75pt solid #808080" fo:border-top="none" fo:border-bottom="0.05pt solid #808080"/>
    </style:style>
    <style:style style:name="Table2.A7" style:family="table-cell">
      <style:table-cell-properties style:vertical-align="middle" fo:padding="0.0625in" fo:border-left="0.75pt solid #808080" fo:border-right="0.75pt solid #808080" fo:border-top="none" fo:border-bottom="0.05pt solid #808080"/>
    </style:style>
    <style:style style:name="Table2.B7" style:family="table-cell">
      <style:table-cell-properties style:vertical-align="middle" fo:padding="0.0625in" fo:border-left="0.05pt solid #808080" fo:border-right="0.75pt solid #808080" fo:border-top="none" fo:border-bottom="0.05pt solid #808080"/>
    </style:style>
    <style:style style:name="Table2.A8" style:family="table-cell">
      <style:table-cell-properties style:vertical-align="middle" fo:padding="0.0625in" fo:border-left="0.75pt solid #808080" fo:border-right="0.75pt solid #808080" fo:border-top="none" fo:border-bottom="0.05pt solid #808080"/>
    </style:style>
    <style:style style:name="Table2.B8" style:family="table-cell">
      <style:table-cell-properties style:vertical-align="middle" fo:padding="0.0625in" fo:border-left="0.05pt solid #808080" fo:border-right="0.75pt solid #808080" fo:border-top="none" fo:border-bottom="0.05pt solid #808080"/>
    </style:style>
    <style:style style:name="Table2.A9" style:family="table-cell">
      <style:table-cell-properties style:vertical-align="middle" fo:padding="0.0625in" fo:border-left="0.75pt solid #808080" fo:border-right="0.75pt solid #808080" fo:border-top="none" fo:border-bottom="0.05pt solid #808080"/>
    </style:style>
    <style:style style:name="Table2.B9" style:family="table-cell">
      <style:table-cell-properties style:vertical-align="middle" fo:padding="0.0625in" fo:border-left="0.05pt solid #808080" fo:border-right="0.75pt solid #808080" fo:border-top="none" fo:border-bottom="0.05pt solid #808080"/>
    </style:style>
    <style:style style:name="Table2.A10" style:family="table-cell">
      <style:table-cell-properties style:vertical-align="middle" fo:padding="0.0625in" fo:border-left="0.75pt solid #808080" fo:border-right="0.75pt solid #808080" fo:border-top="none" fo:border-bottom="0.05pt solid #808080"/>
    </style:style>
    <style:style style:name="Table2.B10" style:family="table-cell">
      <style:table-cell-properties style:vertical-align="middle" fo:padding="0.0625in" fo:border-left="0.05pt solid #808080" fo:border-right="0.75pt solid #808080" fo:border-top="none" fo:border-bottom="0.05pt solid #808080"/>
    </style:style>
    <style:style style:name="Table2.A11" style:family="table-cell">
      <style:table-cell-properties style:vertical-align="middle" fo:padding="0.0625in" fo:border-left="0.75pt solid #808080" fo:border-right="0.75pt solid #808080" fo:border-top="none" fo:border-bottom="0.05pt solid #808080"/>
    </style:style>
    <style:style style:name="Table2.B11" style:family="table-cell">
      <style:table-cell-properties style:vertical-align="middle" fo:padding="0.0625in" fo:border-left="0.05pt solid #808080" fo:border-right="0.75pt solid #808080" fo:border-top="none" fo:border-bottom="0.05pt solid #808080"/>
    </style:style>
    <style:style style:name="Table2.A12" style:family="table-cell">
      <style:table-cell-properties style:vertical-align="middle" fo:padding="0.0625in" fo:border-left="0.75pt solid #808080" fo:border-right="0.75pt solid #808080" fo:border-top="none" fo:border-bottom="0.05pt solid #808080"/>
    </style:style>
    <style:style style:name="Table2.B12" style:family="table-cell">
      <style:table-cell-properties style:vertical-align="middle" fo:padding="0.0625in" fo:border-left="0.05pt solid #808080" fo:border-right="0.75pt solid #808080" fo:border-top="none" fo:border-bottom="0.05pt solid #808080"/>
    </style:style>
    <style:style style:name="Table2.A13" style:family="table-cell">
      <style:table-cell-properties style:vertical-align="middle" fo:padding="0.0625in" fo:border-left="0.75pt solid #808080" fo:border-right="0.75pt solid #808080" fo:border-top="none" fo:border-bottom="0.75pt solid #808080"/>
    </style:style>
    <style:style style:name="Table2.B13" style:family="table-cell">
      <style:table-cell-properties style:vertical-align="middle" fo:padding="0.0625in" fo:border-left="0.05pt solid #808080" fo:border-right="0.75pt solid #808080" fo:border-top="none" fo:border-bottom="0.75pt solid #808080"/>
    </style:style>
    <style:style style:name="Table3" style:family="table">
      <style:table-properties style:width="7.3188in" table:align="left"/>
    </style:style>
    <style:style style:name="Table3.A" style:family="table-column">
      <style:table-column-properties style:column-width="1.5528in"/>
    </style:style>
    <style:style style:name="Table3.B" style:family="table-column">
      <style:table-column-properties style:column-width="5.766in"/>
    </style:style>
    <style:style style:name="Table3.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3.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3.A2" style:family="table-cell">
      <style:table-cell-properties style:vertical-align="middle" fo:padding="0.0625in" fo:border-left="0.75pt solid #808080" fo:border-right="0.75pt solid #808080" fo:border-top="none" fo:border-bottom="0.05pt solid #808080"/>
    </style:style>
    <style:style style:name="Table3.B2" style:family="table-cell">
      <style:table-cell-properties style:vertical-align="middle" fo:padding="0.0625in" fo:border-left="0.05pt solid #808080" fo:border-right="0.75pt solid #808080" fo:border-top="none" fo:border-bottom="0.05pt solid #808080"/>
    </style:style>
    <style:style style:name="Table3.A3" style:family="table-cell">
      <style:table-cell-properties style:vertical-align="middle" fo:padding="0.0625in" fo:border-left="0.75pt solid #808080" fo:border-right="0.75pt solid #808080" fo:border-top="none" fo:border-bottom="0.05pt solid #808080"/>
    </style:style>
    <style:style style:name="Table3.B3" style:family="table-cell">
      <style:table-cell-properties style:vertical-align="middle" fo:padding="0.0625in" fo:border-left="0.05pt solid #808080" fo:border-right="0.75pt solid #808080" fo:border-top="none" fo:border-bottom="0.05pt solid #808080"/>
    </style:style>
    <style:style style:name="Table3.A4" style:family="table-cell">
      <style:table-cell-properties style:vertical-align="middle" fo:padding="0.0625in" fo:border-left="0.75pt solid #808080" fo:border-right="0.75pt solid #808080" fo:border-top="none" fo:border-bottom="0.05pt solid #808080"/>
    </style:style>
    <style:style style:name="Table3.B4" style:family="table-cell">
      <style:table-cell-properties style:vertical-align="middle" fo:padding="0.0625in" fo:border-left="0.05pt solid #808080" fo:border-right="0.75pt solid #808080" fo:border-top="none" fo:border-bottom="0.05pt solid #808080"/>
    </style:style>
    <style:style style:name="Table3.A5" style:family="table-cell">
      <style:table-cell-properties style:vertical-align="middle" fo:padding="0.0625in" fo:border-left="0.75pt solid #808080" fo:border-right="0.75pt solid #808080" fo:border-top="none" fo:border-bottom="0.05pt solid #808080"/>
    </style:style>
    <style:style style:name="Table3.B5" style:family="table-cell">
      <style:table-cell-properties style:vertical-align="middle" fo:padding="0.0625in" fo:border-left="0.05pt solid #808080" fo:border-right="0.75pt solid #808080" fo:border-top="none" fo:border-bottom="0.05pt solid #808080"/>
    </style:style>
    <style:style style:name="Table3.A6" style:family="table-cell">
      <style:table-cell-properties style:vertical-align="middle" fo:padding="0.0625in" fo:border-left="0.75pt solid #808080" fo:border-right="0.75pt solid #808080" fo:border-top="none" fo:border-bottom="0.05pt solid #808080"/>
    </style:style>
    <style:style style:name="Table3.B6" style:family="table-cell">
      <style:table-cell-properties style:vertical-align="middle" fo:padding="0.0625in" fo:border-left="0.05pt solid #808080" fo:border-right="0.75pt solid #808080" fo:border-top="none" fo:border-bottom="0.05pt solid #808080"/>
    </style:style>
    <style:style style:name="Table3.A7" style:family="table-cell">
      <style:table-cell-properties style:vertical-align="middle" fo:padding="0.0625in" fo:border-left="0.75pt solid #808080" fo:border-right="0.75pt solid #808080" fo:border-top="none" fo:border-bottom="0.05pt solid #808080"/>
    </style:style>
    <style:style style:name="Table3.B7" style:family="table-cell">
      <style:table-cell-properties style:vertical-align="middle" fo:padding="0.0625in" fo:border-left="0.05pt solid #808080" fo:border-right="0.75pt solid #808080" fo:border-top="none" fo:border-bottom="0.05pt solid #808080"/>
    </style:style>
    <style:style style:name="Table3.A8" style:family="table-cell">
      <style:table-cell-properties style:vertical-align="middle" fo:padding="0.0625in" fo:border-left="0.75pt solid #808080" fo:border-right="0.75pt solid #808080" fo:border-top="none" fo:border-bottom="0.05pt solid #808080"/>
    </style:style>
    <style:style style:name="Table3.B8" style:family="table-cell">
      <style:table-cell-properties style:vertical-align="middle" fo:padding="0.0625in" fo:border-left="0.05pt solid #808080" fo:border-right="0.75pt solid #808080" fo:border-top="none" fo:border-bottom="0.05pt solid #808080"/>
    </style:style>
    <style:style style:name="Table3.A9" style:family="table-cell">
      <style:table-cell-properties style:vertical-align="middle" fo:padding="0.0625in" fo:border-left="0.75pt solid #808080" fo:border-right="0.75pt solid #808080" fo:border-top="none" fo:border-bottom="0.05pt solid #808080"/>
    </style:style>
    <style:style style:name="Table3.B9" style:family="table-cell">
      <style:table-cell-properties style:vertical-align="middle" fo:padding="0.0625in" fo:border-left="0.05pt solid #808080" fo:border-right="0.75pt solid #808080" fo:border-top="none" fo:border-bottom="0.05pt solid #808080"/>
    </style:style>
    <style:style style:name="Table3.A10" style:family="table-cell">
      <style:table-cell-properties style:vertical-align="middle" fo:padding="0.0625in" fo:border-left="0.75pt solid #808080" fo:border-right="0.75pt solid #808080" fo:border-top="none" fo:border-bottom="0.05pt solid #808080"/>
    </style:style>
    <style:style style:name="Table3.B10" style:family="table-cell">
      <style:table-cell-properties style:vertical-align="middle" fo:padding="0.0625in" fo:border-left="0.05pt solid #808080" fo:border-right="0.75pt solid #808080" fo:border-top="none" fo:border-bottom="0.05pt solid #808080"/>
    </style:style>
    <style:style style:name="Table3.A11" style:family="table-cell">
      <style:table-cell-properties style:vertical-align="middle" fo:padding="0.0625in" fo:border-left="0.75pt solid #808080" fo:border-right="0.75pt solid #808080" fo:border-top="none" fo:border-bottom="0.05pt solid #808080"/>
    </style:style>
    <style:style style:name="Table3.B11" style:family="table-cell">
      <style:table-cell-properties style:vertical-align="middle" fo:padding="0.0625in" fo:border-left="0.05pt solid #808080" fo:border-right="0.75pt solid #808080" fo:border-top="none" fo:border-bottom="0.05pt solid #808080"/>
    </style:style>
    <style:style style:name="Table3.A12" style:family="table-cell">
      <style:table-cell-properties style:vertical-align="middle" fo:padding="0.0625in" fo:border-left="0.75pt solid #808080" fo:border-right="0.75pt solid #808080" fo:border-top="none" fo:border-bottom="0.05pt solid #808080"/>
    </style:style>
    <style:style style:name="Table3.B12" style:family="table-cell">
      <style:table-cell-properties style:vertical-align="middle" fo:padding="0.0625in" fo:border-left="0.05pt solid #808080" fo:border-right="0.75pt solid #808080" fo:border-top="none" fo:border-bottom="0.05pt solid #808080"/>
    </style:style>
    <style:style style:name="Table3.A13" style:family="table-cell">
      <style:table-cell-properties style:vertical-align="middle" fo:padding="0.0625in" fo:border-left="0.75pt solid #808080" fo:border-right="0.75pt solid #808080" fo:border-top="none" fo:border-bottom="0.05pt solid #808080"/>
    </style:style>
    <style:style style:name="Table3.B13" style:family="table-cell">
      <style:table-cell-properties style:vertical-align="middle" fo:padding="0.0625in" fo:border-left="0.05pt solid #808080" fo:border-right="0.75pt solid #808080" fo:border-top="none" fo:border-bottom="0.05pt solid #808080"/>
    </style:style>
    <style:style style:name="Table3.A14" style:family="table-cell">
      <style:table-cell-properties style:vertical-align="middle" fo:padding="0.0625in" fo:border-left="0.75pt solid #808080" fo:border-right="0.75pt solid #808080" fo:border-top="none" fo:border-bottom="0.05pt solid #808080"/>
    </style:style>
    <style:style style:name="Table3.B14" style:family="table-cell">
      <style:table-cell-properties style:vertical-align="middle" fo:padding="0.0625in" fo:border-left="0.05pt solid #808080" fo:border-right="0.75pt solid #808080" fo:border-top="none" fo:border-bottom="0.05pt solid #808080"/>
    </style:style>
    <style:style style:name="Table3.A15" style:family="table-cell">
      <style:table-cell-properties style:vertical-align="middle" fo:padding="0.0625in" fo:border-left="0.75pt solid #808080" fo:border-right="0.75pt solid #808080" fo:border-top="none" fo:border-bottom="0.05pt solid #808080"/>
    </style:style>
    <style:style style:name="Table3.B15" style:family="table-cell">
      <style:table-cell-properties style:vertical-align="middle" fo:padding="0.0625in" fo:border-left="0.05pt solid #808080" fo:border-right="0.75pt solid #808080" fo:border-top="none" fo:border-bottom="0.05pt solid #808080"/>
    </style:style>
    <style:style style:name="Table3.A16" style:family="table-cell">
      <style:table-cell-properties style:vertical-align="middle" fo:padding="0.0625in" fo:border-left="0.75pt solid #808080" fo:border-right="0.75pt solid #808080" fo:border-top="none" fo:border-bottom="0.05pt solid #808080"/>
    </style:style>
    <style:style style:name="Table3.B16" style:family="table-cell">
      <style:table-cell-properties style:vertical-align="middle" fo:padding="0.0625in" fo:border-left="0.05pt solid #808080" fo:border-right="0.75pt solid #808080" fo:border-top="none" fo:border-bottom="0.05pt solid #808080"/>
    </style:style>
    <style:style style:name="Table3.A17" style:family="table-cell">
      <style:table-cell-properties style:vertical-align="middle" fo:padding="0.0625in" fo:border-left="0.75pt solid #808080" fo:border-right="0.75pt solid #808080" fo:border-top="none" fo:border-bottom="0.05pt solid #808080"/>
    </style:style>
    <style:style style:name="Table3.B17" style:family="table-cell">
      <style:table-cell-properties style:vertical-align="middle" fo:padding="0.0625in" fo:border-left="0.05pt solid #808080" fo:border-right="0.75pt solid #808080" fo:border-top="none" fo:border-bottom="0.05pt solid #808080"/>
    </style:style>
    <style:style style:name="Table3.A18" style:family="table-cell">
      <style:table-cell-properties style:vertical-align="middle" fo:padding="0.0625in" fo:border-left="0.75pt solid #808080" fo:border-right="0.75pt solid #808080" fo:border-top="none" fo:border-bottom="0.05pt solid #808080"/>
    </style:style>
    <style:style style:name="Table3.B18" style:family="table-cell">
      <style:table-cell-properties style:vertical-align="middle" fo:padding="0.0625in" fo:border-left="0.05pt solid #808080" fo:border-right="0.75pt solid #808080" fo:border-top="none" fo:border-bottom="0.05pt solid #808080"/>
    </style:style>
    <style:style style:name="Table3.A19" style:family="table-cell">
      <style:table-cell-properties style:vertical-align="middle" fo:padding="0.0625in" fo:border-left="0.75pt solid #808080" fo:border-right="0.75pt solid #808080" fo:border-top="none" fo:border-bottom="0.05pt solid #808080"/>
    </style:style>
    <style:style style:name="Table3.B19" style:family="table-cell">
      <style:table-cell-properties style:vertical-align="middle" fo:padding="0.0625in" fo:border-left="0.05pt solid #808080" fo:border-right="0.75pt solid #808080" fo:border-top="none" fo:border-bottom="0.05pt solid #808080"/>
    </style:style>
    <style:style style:name="Table3.A20" style:family="table-cell">
      <style:table-cell-properties style:vertical-align="middle" fo:padding="0.0625in" fo:border-left="0.75pt solid #808080" fo:border-right="0.75pt solid #808080" fo:border-top="none" fo:border-bottom="0.05pt solid #808080"/>
    </style:style>
    <style:style style:name="Table3.B20" style:family="table-cell">
      <style:table-cell-properties style:vertical-align="middle" fo:padding="0.0625in" fo:border-left="0.05pt solid #808080" fo:border-right="0.75pt solid #808080" fo:border-top="none" fo:border-bottom="0.05pt solid #808080"/>
    </style:style>
    <style:style style:name="Table3.A21" style:family="table-cell">
      <style:table-cell-properties style:vertical-align="middle" fo:padding="0.0625in" fo:border-left="0.75pt solid #808080" fo:border-right="0.75pt solid #808080" fo:border-top="none" fo:border-bottom="0.05pt solid #808080"/>
    </style:style>
    <style:style style:name="Table3.B21" style:family="table-cell">
      <style:table-cell-properties style:vertical-align="middle" fo:padding="0.0625in" fo:border-left="0.05pt solid #808080" fo:border-right="0.75pt solid #808080" fo:border-top="none" fo:border-bottom="0.05pt solid #808080"/>
    </style:style>
    <style:style style:name="Table3.A22" style:family="table-cell">
      <style:table-cell-properties style:vertical-align="middle" fo:padding="0.0625in" fo:border-left="0.75pt solid #808080" fo:border-right="0.75pt solid #808080" fo:border-top="none" fo:border-bottom="0.05pt solid #808080"/>
    </style:style>
    <style:style style:name="Table3.B22" style:family="table-cell">
      <style:table-cell-properties style:vertical-align="middle" fo:padding="0.0625in" fo:border-left="0.05pt solid #808080" fo:border-right="0.75pt solid #808080" fo:border-top="none" fo:border-bottom="0.05pt solid #808080"/>
    </style:style>
    <style:style style:name="Table3.A23" style:family="table-cell">
      <style:table-cell-properties style:vertical-align="middle" fo:padding="0.0625in" fo:border-left="0.75pt solid #808080" fo:border-right="0.75pt solid #808080" fo:border-top="none" fo:border-bottom="0.05pt solid #808080"/>
    </style:style>
    <style:style style:name="Table3.B23" style:family="table-cell">
      <style:table-cell-properties style:vertical-align="middle" fo:padding="0.0625in" fo:border-left="0.05pt solid #808080" fo:border-right="0.75pt solid #808080" fo:border-top="none" fo:border-bottom="0.05pt solid #808080"/>
    </style:style>
    <style:style style:name="Table3.A24" style:family="table-cell">
      <style:table-cell-properties style:vertical-align="middle" fo:padding="0.0625in" fo:border-left="0.75pt solid #808080" fo:border-right="0.75pt solid #808080" fo:border-top="none" fo:border-bottom="0.05pt solid #808080"/>
    </style:style>
    <style:style style:name="Table3.B24" style:family="table-cell">
      <style:table-cell-properties style:vertical-align="middle" fo:padding="0.0625in" fo:border-left="0.05pt solid #808080" fo:border-right="0.75pt solid #808080" fo:border-top="none" fo:border-bottom="0.05pt solid #808080"/>
    </style:style>
    <style:style style:name="Table3.A25" style:family="table-cell">
      <style:table-cell-properties style:vertical-align="middle" fo:padding="0.0625in" fo:border-left="0.75pt solid #808080" fo:border-right="0.75pt solid #808080" fo:border-top="none" fo:border-bottom="0.75pt solid #808080"/>
    </style:style>
    <style:style style:name="Table3.B25" style:family="table-cell">
      <style:table-cell-properties style:vertical-align="middle" fo:padding="0.0625in" fo:border-left="0.05pt solid #808080" fo:border-right="0.75pt solid #808080" fo:border-top="none" fo:border-bottom="0.75pt solid #808080"/>
    </style:style>
    <style:style style:name="Table4" style:family="table">
      <style:table-properties style:width="7.3188in" table:align="left"/>
    </style:style>
    <style:style style:name="Table4.A" style:family="table-column">
      <style:table-column-properties style:column-width="7.3188in"/>
    </style:style>
    <style:style style:name="Table4.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5" style:family="table">
      <style:table-properties style:width="7.3188in" table:align="left"/>
    </style:style>
    <style:style style:name="Table5.A" style:family="table-column">
      <style:table-column-properties style:column-width="7.3188in"/>
    </style:style>
    <style:style style:name="Table5.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6" style:family="table">
      <style:table-properties style:width="7.3188in" table:align="left"/>
    </style:style>
    <style:style style:name="Table6.A" style:family="table-column">
      <style:table-column-properties style:column-width="7.3188in"/>
    </style:style>
    <style:style style:name="Table6.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7" style:family="table">
      <style:table-properties style:width="7.3188in" table:align="left"/>
    </style:style>
    <style:style style:name="Table7.A" style:family="table-column">
      <style:table-column-properties style:column-width="7.3188in"/>
    </style:style>
    <style:style style:name="Table7.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8" style:family="table">
      <style:table-properties style:width="7.3188in" table:align="left"/>
    </style:style>
    <style:style style:name="Table8.A" style:family="table-column">
      <style:table-column-properties style:column-width="7.3188in"/>
    </style:style>
    <style:style style:name="Table8.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9" style:family="table">
      <style:table-properties style:width="7.3188in" table:align="left"/>
    </style:style>
    <style:style style:name="Table9.A" style:family="table-column">
      <style:table-column-properties style:column-width="7.3188in"/>
    </style:style>
    <style:style style:name="Table9.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10" style:family="table">
      <style:table-properties style:width="7.3188in" table:align="left"/>
    </style:style>
    <style:style style:name="Table10.A" style:family="table-column">
      <style:table-column-properties style:column-width="3.1778in"/>
    </style:style>
    <style:style style:name="Table10.B" style:family="table-column">
      <style:table-column-properties style:column-width="4.141in"/>
    </style:style>
    <style:style style:name="Table10.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0.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0.A2" style:family="table-cell">
      <style:table-cell-properties style:vertical-align="middle" fo:padding="0.0625in" fo:border-left="0.75pt solid #808080" fo:border-right="0.75pt solid #808080" fo:border-top="none" fo:border-bottom="0.05pt solid #808080"/>
    </style:style>
    <style:style style:name="Table10.B2" style:family="table-cell">
      <style:table-cell-properties style:vertical-align="middle" fo:padding="0.0625in" fo:border-left="0.05pt solid #808080" fo:border-right="0.75pt solid #808080" fo:border-top="none" fo:border-bottom="0.05pt solid #808080"/>
    </style:style>
    <style:style style:name="Table10.A3" style:family="table-cell">
      <style:table-cell-properties style:vertical-align="middle" fo:padding="0.0625in" fo:border-left="0.75pt solid #808080" fo:border-right="0.75pt solid #808080" fo:border-top="none" fo:border-bottom="0.05pt solid #808080"/>
    </style:style>
    <style:style style:name="Table10.B3" style:family="table-cell">
      <style:table-cell-properties style:vertical-align="middle" fo:padding="0.0625in" fo:border-left="0.05pt solid #808080" fo:border-right="0.75pt solid #808080" fo:border-top="none" fo:border-bottom="0.05pt solid #808080"/>
    </style:style>
    <style:style style:name="Table10.A4" style:family="table-cell">
      <style:table-cell-properties style:vertical-align="middle" fo:padding="0.0625in" fo:border-left="0.75pt solid #808080" fo:border-right="0.75pt solid #808080" fo:border-top="none" fo:border-bottom="0.05pt solid #808080"/>
    </style:style>
    <style:style style:name="Table10.B4" style:family="table-cell">
      <style:table-cell-properties style:vertical-align="middle" fo:padding="0.0625in" fo:border-left="0.05pt solid #808080" fo:border-right="0.75pt solid #808080" fo:border-top="none" fo:border-bottom="0.05pt solid #808080"/>
    </style:style>
    <style:style style:name="Table10.A5" style:family="table-cell">
      <style:table-cell-properties style:vertical-align="middle" fo:padding="0.0625in" fo:border-left="0.75pt solid #808080" fo:border-right="0.75pt solid #808080" fo:border-top="none" fo:border-bottom="0.05pt solid #808080"/>
    </style:style>
    <style:style style:name="Table10.B5" style:family="table-cell">
      <style:table-cell-properties style:vertical-align="middle" fo:padding="0.0625in" fo:border-left="0.05pt solid #808080" fo:border-right="0.75pt solid #808080" fo:border-top="none" fo:border-bottom="0.05pt solid #808080"/>
    </style:style>
    <style:style style:name="Table10.A6" style:family="table-cell">
      <style:table-cell-properties style:vertical-align="middle" fo:padding="0.0625in" fo:border-left="0.75pt solid #808080" fo:border-right="0.75pt solid #808080" fo:border-top="none" fo:border-bottom="0.05pt solid #808080"/>
    </style:style>
    <style:style style:name="Table10.B6" style:family="table-cell">
      <style:table-cell-properties style:vertical-align="middle" fo:padding="0.0625in" fo:border-left="0.05pt solid #808080" fo:border-right="0.75pt solid #808080" fo:border-top="none" fo:border-bottom="0.05pt solid #808080"/>
    </style:style>
    <style:style style:name="Table10.A7" style:family="table-cell">
      <style:table-cell-properties style:vertical-align="middle" fo:padding="0.0625in" fo:border-left="0.75pt solid #808080" fo:border-right="0.75pt solid #808080" fo:border-top="none" fo:border-bottom="0.05pt solid #808080"/>
    </style:style>
    <style:style style:name="Table10.B7" style:family="table-cell">
      <style:table-cell-properties style:vertical-align="middle" fo:padding="0.0625in" fo:border-left="0.05pt solid #808080" fo:border-right="0.75pt solid #808080" fo:border-top="none" fo:border-bottom="0.05pt solid #808080"/>
    </style:style>
    <style:style style:name="Table10.A8" style:family="table-cell">
      <style:table-cell-properties style:vertical-align="middle" fo:padding="0.0625in" fo:border-left="0.75pt solid #808080" fo:border-right="0.75pt solid #808080" fo:border-top="none" fo:border-bottom="0.05pt solid #808080"/>
    </style:style>
    <style:style style:name="Table10.B8" style:family="table-cell">
      <style:table-cell-properties style:vertical-align="middle" fo:padding="0.0625in" fo:border-left="0.05pt solid #808080" fo:border-right="0.75pt solid #808080" fo:border-top="none" fo:border-bottom="0.05pt solid #808080"/>
    </style:style>
    <style:style style:name="Table10.A9" style:family="table-cell">
      <style:table-cell-properties style:vertical-align="middle" fo:padding="0.0625in" fo:border-left="0.75pt solid #808080" fo:border-right="0.75pt solid #808080" fo:border-top="none" fo:border-bottom="0.75pt solid #808080"/>
    </style:style>
    <style:style style:name="Table10.B9" style:family="table-cell">
      <style:table-cell-properties style:vertical-align="middle" fo:padding="0.0625in" fo:border-left="0.05pt solid #808080" fo:border-right="0.75pt solid #808080" fo:border-top="none" fo:border-bottom="0.75pt solid #808080"/>
    </style:style>
    <style:style style:name="Table11" style:family="table">
      <style:table-properties style:width="7.3188in" table:align="left"/>
    </style:style>
    <style:style style:name="Table11.A" style:family="table-column">
      <style:table-column-properties style:column-width="2.7799in"/>
    </style:style>
    <style:style style:name="Table11.B" style:family="table-column">
      <style:table-column-properties style:column-width="4.5389in"/>
    </style:style>
    <style:style style:name="Table11.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11.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11.A2" style:family="table-cell">
      <style:table-cell-properties style:vertical-align="middle" fo:padding="0.0625in" fo:border-left="0.75pt solid #808080" fo:border-right="0.75pt solid #808080" fo:border-top="none" fo:border-bottom="0.05pt solid #808080"/>
    </style:style>
    <style:style style:name="Table11.B2" style:family="table-cell">
      <style:table-cell-properties style:vertical-align="middle" fo:padding="0.0625in" fo:border-left="0.05pt solid #808080" fo:border-right="0.75pt solid #808080" fo:border-top="none" fo:border-bottom="0.05pt solid #808080"/>
    </style:style>
    <style:style style:name="Table11.A3" style:family="table-cell">
      <style:table-cell-properties style:vertical-align="middle" fo:padding="0.0625in" fo:border-left="0.75pt solid #808080" fo:border-right="0.75pt solid #808080" fo:border-top="none" fo:border-bottom="0.05pt solid #808080"/>
    </style:style>
    <style:style style:name="Table11.B3" style:family="table-cell">
      <style:table-cell-properties style:vertical-align="middle" fo:padding="0.0625in" fo:border-left="0.05pt solid #808080" fo:border-right="0.75pt solid #808080" fo:border-top="none" fo:border-bottom="0.05pt solid #808080"/>
    </style:style>
    <style:style style:name="Table11.A4" style:family="table-cell">
      <style:table-cell-properties style:vertical-align="middle" fo:padding="0.0625in" fo:border-left="0.75pt solid #808080" fo:border-right="0.75pt solid #808080" fo:border-top="none" fo:border-bottom="0.05pt solid #808080"/>
    </style:style>
    <style:style style:name="Table11.B4" style:family="table-cell">
      <style:table-cell-properties style:vertical-align="middle" fo:padding="0.0625in" fo:border-left="0.05pt solid #808080" fo:border-right="0.75pt solid #808080" fo:border-top="none" fo:border-bottom="0.05pt solid #808080"/>
    </style:style>
    <style:style style:name="Table11.A5" style:family="table-cell">
      <style:table-cell-properties style:vertical-align="middle" fo:padding="0.0625in" fo:border-left="0.75pt solid #808080" fo:border-right="0.75pt solid #808080" fo:border-top="none" fo:border-bottom="0.75pt solid #808080"/>
    </style:style>
    <style:style style:name="Table11.B5" style:family="table-cell">
      <style:table-cell-properties style:vertical-align="middle" fo:padding="0.0625in" fo:border-left="0.05pt solid #808080" fo:border-right="0.75pt solid #808080" fo:border-top="none" fo:border-bottom="0.75pt solid #808080"/>
    </style:style>
    <style:style style:name="P1" style:family="paragraph" style:parent-style-name="Body_20_Text.small">
      <style:paragraph-properties fo:margin-left="0.0835in" fo:margin-right="0.0835in" fo:text-indent="0in" style:auto-text-indent="false"/>
    </style:style>
    <style:style style:name="P2" style:family="paragraph" style:parent-style-name="Heading_20_1" style:master-page-name="HTML">
      <style:paragraph-properties style:page-number="auto"/>
    </style:style>
    <style:style style:name="P3" style:family="paragraph" style:parent-style-name="Heading_20_4">
      <style:paragraph-properties fo:margin-left="0.1665in" fo:margin-right="0.1665in" fo:text-indent="0in" style:auto-text-indent="false"/>
    </style:style>
    <style:style style:name="P4" style:family="paragraph" style:parent-style-name="Preformatted_20_Text.diagram">
      <style:paragraph-properties fo:margin-top="0in" fo:margin-bottom="0.1965in" style:contextual-spacing="false"/>
    </style:style>
    <style:style style:name="P5" style:family="paragraph" style:parent-style-name="Table_20_Contents">
      <style:text-properties fo:font-weight="bold"/>
    </style:style>
    <style:style style:name="P6" style:family="paragraph" style:parent-style-name="Table_20_Contents">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T1" style:family="text">
      <style:text-properties fo:font-weight="bold"/>
    </style:style>
    <style:style style:name="T2" style:family="text">
      <style:text-properties fo:color="#1f7a44" loext:opacity="100%"/>
    </style:style>
    <style:style style:name="T3" style:family="text">
      <style:text-properties fo:color="#1f7a44"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MA Codex</text:p>
      <text:p text:style-name="Body_20_Text.lede">Appendices A–E</text:p>
      <text:p text:style-name="Body_20_Text.small">Reference matter: the full idea catalog, glossary, master cross-reference, open questions, and lineage.</text:p>
      <text:p text:style-name="Horizontal_20_Line"/>
      <text:h text:style-name="Heading_20_2" text:outline-level="2">Appendix C — Master cross-reference</text:h>
      <text:p text:style-name="Text_20_body">This is the consistency contract for the whole Codex: every cognitive component traces to a system and organ (Book II), to its mathematics (Book III), to a crate (Book IV), and to the invariant(s) that govern it. Nothing in the design should dangle; if a row is incomplete, that is a gap to clos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Book I)</text:p>
          </table:table-cell>
          <table:table-cell table:style-name="Table1.B1" office:value-type="string">
            <text:p text:style-name="Table_20_Heading">System → Organ (Book II)</text:p>
          </table:table-cell>
          <table:table-cell table:style-name="Table1.B1" office:value-type="string">
            <text:p text:style-name="Table_20_Heading">Math (Book III)</text:p>
          </table:table-cell>
          <table:table-cell table:style-name="Table1.B1" office:value-type="string">
            <text:p text:style-name="Table_20_Heading">Crate (Book IV)</text:p>
          </table:table-cell>
          <table:table-cell table:style-name="Table1.B1" office:value-type="string">
            <text:p text:style-name="Table_20_Heading">Invariants</text:p>
          </table:table-cell>
        </table:table-row>
        <table:table-row>
          <table:table-cell table:style-name="Table1.A2" office:value-type="string">
            <text:p text:style-name="Table_20_Contents">Event-driven substrate; time; persistence</text:p>
          </table:table-cell>
          <table:table-cell table:style-name="Table1.B2" office:value-type="string">
            <text:p text:style-name="Table_20_Contents">S1 Workspace → Event-Log/Chronicle, Projection, Routing</text:p>
          </table:table-cell>
          <table:table-cell table:style-name="Table1.C2" office:value-type="string">
            <text:p text:style-name="Table_20_Contents">hash chains; Lamport/vector clocks; CRDTs (§7)</text:p>
          </table:table-cell>
          <table:table-cell table:style-name="Table1.D2" office:value-type="string">
            <text:p text:style-name="Table_20_Contents"><text:span text:style-name="Source_20_Text">soma-workspace</text:span></text:p>
          </table:table-cell>
          <table:table-cell table:style-name="Table1.E2" office:value-type="string">
            <text:p text:style-name="Table_20_Contents">INV-1,2,7,9,11,12</text:p>
          </table:table-cell>
        </table:table-row>
        <table:table-row>
          <table:table-cell table:style-name="Table1.A2" office:value-type="string">
            <text:p text:style-name="Table_20_Contents">Identity; sense of self; continuity</text:p>
          </table:table-cell>
          <table:table-cell table:style-name="Table1.B2" office:value-type="string">
            <text:p text:style-name="Table_20_Contents">S2 Identity &amp; Self → Registry, Continuity, Self-Model</text:p>
          </table:table-cell>
          <table:table-cell table:style-name="Table1.C2" office:value-type="string">
            <text:p text:style-name="Table_20_Contents">Merkle continuity; drift detection (§3.2, §8.2)</text:p>
          </table:table-cell>
          <table:table-cell table:style-name="Table1.D2" office:value-type="string">
            <text:p text:style-name="Table_20_Contents"><text:span text:style-name="Source_20_Text">soma-identity</text:span></text:p>
          </table:table-cell>
          <table:table-cell table:style-name="Table1.E2" office:value-type="string">
            <text:p text:style-name="Table_20_Contents">INV-1,3,12 (Gap 1)</text:p>
          </table:table-cell>
        </table:table-row>
        <table:table-row>
          <table:table-cell table:style-name="Table1.A2" office:value-type="string">
            <text:p text:style-name="Table_20_Contents">Memory + retrieval</text:p>
          </table:table-cell>
          <table:table-cell table:style-name="Table1.B2" office:value-type="string">
            <text:p text:style-name="Table_20_Contents">S3 Memory → Episodic, Semantic, Procedural, Consolidation/Recall</text:p>
          </table:table-cell>
          <table:table-cell table:style-name="Table1.C2" office:value-type="string">
            <text:p text:style-name="Table_20_Contents">decay/consolidation; PageRank salience; Wasserstein drift (§8)</text:p>
          </table:table-cell>
          <table:table-cell table:style-name="Table1.D2" office:value-type="string">
            <text:p text:style-name="Table_20_Contents"><text:span text:style-name="Source_20_Text">soma-memory</text:span></text:p>
          </table:table-cell>
          <table:table-cell table:style-name="Table1.E2" office:value-type="string">
            <text:p text:style-name="Table_20_Contents">INV-1,9</text:p>
          </table:table-cell>
        </table:table-row>
        <table:table-row>
          <table:table-cell table:style-name="Table1.A2" office:value-type="string">
            <text:p text:style-name="Table_20_Contents">Global reality; relational awareness; uncertainty</text:p>
          </table:table-cell>
          <table:table-cell table:style-name="Table1.B2" office:value-type="string">
            <text:p text:style-name="Table_20_Contents">S4 World-Model → World-Model, Cartographer, Uncertainty</text:p>
          </table:table-cell>
          <table:table-cell table:style-name="Table1.C2" office:value-type="string">
            <text:p text:style-name="Table_20_Contents">active inference; Kalman; HMM; conformal (§4)</text:p>
          </table:table-cell>
          <table:table-cell table:style-name="Table1.D2" office:value-type="string">
            <text:p text:style-name="Table_20_Contents"><text:span text:style-name="Source_20_Text">soma-world</text:span></text:p>
          </table:table-cell>
          <table:table-cell table:style-name="Table1.E2" office:value-type="string">
            <text:p text:style-name="Table_20_Contents">INV-9,11</text:p>
          </table:table-cell>
        </table:table-row>
        <table:table-row>
          <table:table-cell table:style-name="Table1.A2" office:value-type="string">
            <text:p text:style-name="Table_20_Contents">Reasoning; agency; reluctant action</text:p>
          </table:table-cell>
          <table:table-cell table:style-name="Table1.B2" office:value-type="string">
            <text:p text:style-name="Table_20_Contents">S5 Cognition → Reasoning, Deliberation, Effector</text:p>
          </table:table-cell>
          <table:table-cell table:style-name="Table1.C2" office:value-type="string">
            <text:p text:style-name="Table_20_Contents">expected free energy; info gain; bandits (§5)</text:p>
          </table:table-cell>
          <table:table-cell table:style-name="Table1.D2" office:value-type="string">
            <text:p text:style-name="Table_20_Contents"><text:span text:style-name="Source_20_Text">soma-cognition</text:span></text:p>
          </table:table-cell>
          <table:table-cell table:style-name="Table1.E2" office:value-type="string">
            <text:p text:style-name="Table_20_Contents">INV-2,3,4,5</text:p>
          </table:table-cell>
        </table:table-row>
        <table:table-row>
          <table:table-cell table:style-name="Table1.A2" office:value-type="string">
            <text:p text:style-name="Table_20_Contents">Goal-orientation; intent</text:p>
          </table:table-cell>
          <table:table-cell table:style-name="Table1.B2" office:value-type="string">
            <text:p text:style-name="Table_20_Contents">S6 Goal → Constitution, Goal, Evaluation</text:p>
          </table:table-cell>
          <table:table-cell table:style-name="Table1.C2" office:value-type="string">
            <text:p text:style-name="Table_20_Contents">lexical/constrained optimization; regret (§5,§11)</text:p>
          </table:table-cell>
          <table:table-cell table:style-name="Table1.D2" office:value-type="string">
            <text:p text:style-name="Table_20_Contents"><text:span text:style-name="Source_20_Text">soma-goal</text:span></text:p>
          </table:table-cell>
          <table:table-cell table:style-name="Table1.E2" office:value-type="string">
            <text:p text:style-name="Table_20_Contents">INV-10,4,6</text:p>
          </table:table-cell>
        </table:table-row>
        <table:table-row>
          <table:table-cell table:style-name="Table1.A2" office:value-type="string">
            <text:p text:style-name="Table_20_Contents">Drive; valence</text:p>
          </table:table-cell>
          <table:table-cell table:style-name="Table1.B2" office:value-type="string">
            <text:p text:style-name="Table_20_Contents">S7 Homeostasis → Arousal, Metabolism, Valence</text:p>
          </table:table-cell>
          <table:table-cell table:style-name="Table1.C2" office:value-type="string">
            <text:p text:style-name="Table_20_Contents">Yerkes–Dodson; PID+hysteresis; Little's law (§6)</text:p>
          </table:table-cell>
          <table:table-cell table:style-name="Table1.D2" office:value-type="string">
            <text:p text:style-name="Table_20_Contents"><text:span text:style-name="Source_20_Text">soma-homeostasis</text:span></text:p>
          </table:table-cell>
          <table:table-cell table:style-name="Table1.E2" office:value-type="string">
            <text:p text:style-name="Table_20_Contents">INV-8,10 (Gap 2)</text:p>
          </table:table-cell>
        </table:table-row>
        <table:table-row>
          <table:table-cell table:style-name="Table1.A2" office:value-type="string">
            <text:p text:style-name="Table_20_Contents">Governance; constraints; safety</text:p>
          </table:table-cell>
          <table:table-cell table:style-name="Table1.B2" office:value-type="string">
            <text:p text:style-name="Table_20_Contents">S8 Immune/Governance → Trust, Authority, Verification, Sentinel</text:p>
          </table:table-cell>
          <table:table-cell table:style-name="Table1.C2" office:value-type="string">
            <text:p text:style-name="Table_20_Contents">Bayesian trust; viability; circuit breaker; negative selection (§3,§9)</text:p>
          </table:table-cell>
          <table:table-cell table:style-name="Table1.D2" office:value-type="string">
            <text:p text:style-name="Table_20_Contents"><text:span text:style-name="Source_20_Text">soma-governance</text:span></text:p>
          </table:table-cell>
          <table:table-cell table:style-name="Table1.E2" office:value-type="string">
            <text:p text:style-name="Table_20_Contents">INV-3,4,5,6,8,10</text:p>
          </table:table-cell>
        </table:table-row>
        <table:table-row>
          <table:table-cell table:style-name="Table1.A2" office:value-type="string">
            <text:p text:style-name="Table_20_Contents">The membrane / recursion</text:p>
          </table:table-cell>
          <table:table-cell table:style-name="Table1.B2" office:value-type="string">
            <text:p text:style-name="Table_20_Contents">all — the holon contract</text:p>
          </table:table-cell>
          <table:table-cell table:style-name="Table1.C2" office:value-type="string">
            <text:p text:style-name="Table_20_Contents">determinism boundary (§2); causal emergence (§10)</text:p>
          </table:table-cell>
          <table:table-cell table:style-name="Table1.D2" office:value-type="string">
            <text:p text:style-name="Table_20_Contents"><text:span text:style-name="Source_20_Text">soma-core</text:span>, <text:span text:style-name="Source_20_Text">soma-holon</text:span></text:p>
          </table:table-cell>
          <table:table-cell table:style-name="Table1.E2" office:value-type="string">
            <text:p text:style-name="Table_20_Contents">INV-2,3,9,11</text:p>
          </table:table-cell>
        </table:table-row>
        <table:table-row>
          <table:table-cell table:style-name="Table1.A11" office:value-type="string">
            <text:p text:style-name="Table_20_Contents"><text:span text:style-name="Emphasis">Subjective experience</text:span></text:p>
          </table:table-cell>
          <table:table-cell table:style-name="Table1.B11" office:value-type="string">
            <text:p text:style-name="Table_20_Contents"><text:span text:style-name="Emphasis">open — the binding wall</text:span></text:p>
          </table:table-cell>
          <table:table-cell table:style-name="Table1.C11" office:value-type="string">
            <text:p text:style-name="Table_20_Contents"><text:span text:style-name="Emphasis">causal emergence is a candidate metric only</text:span></text:p>
          </table:table-cell>
          <table:table-cell table:style-name="Table1.D11" office:value-type="string">
            <text:p text:style-name="Table_20_Contents">—</text:p>
          </table:table-cell>
          <table:table-cell table:style-name="Table1.E11" office:value-type="string">
            <text:p text:style-name="Table_20_Contents">see Appendix D</text:p>
          </table:table-cell>
        </table:table-row>
      </table:table>
      <text:h text:style-name="Heading_20_3" text:outline-level="3">C.2 The invariants at a glance (Book IV §9)</text:h>
      <table:table table:name="Table2" table:style-name="Table2">
        <table:table-column table:style-name="Table2.A"/>
        <table:table-column table:style-name="Table2.B"/>
        <table:table-row>
          <table:table-cell table:style-name="Table2.A1" office:value-type="string">
            <text:p text:style-name="Table_20_Heading">#</text:p>
          </table:table-cell>
          <table:table-cell table:style-name="Table2.B1" office:value-type="string">
            <text:p text:style-name="Table_20_Heading">Invariant</text:p>
          </table:table-cell>
        </table:table-row>
        <table:table-row>
          <table:table-cell table:style-name="Table2.A2" office:value-type="string">
            <text:p text:style-name="Table_20_Contents">INV-1</text:p>
          </table:table-cell>
          <table:table-cell table:style-name="Table2.B2" office:value-type="string">
            <text:p text:style-name="Table_20_Contents">Append-only, hash-chained log; never edited or deleted.</text:p>
          </table:table-cell>
        </table:table-row>
        <table:table-row>
          <table:table-cell table:style-name="Table2.A2" office:value-type="string">
            <text:p text:style-name="Table_20_Contents">INV-2</text:p>
          </table:table-cell>
          <table:table-cell table:style-name="Table2.B2" office:value-type="string">
            <text:p text:style-name="Table_20_Contents">One channel: holons coordinate only through the workspace; no direct holon-to-holon path.</text:p>
          </table:table-cell>
        </table:table-row>
        <table:table-row>
          <table:table-cell table:style-name="Table2.A2" office:value-type="string">
            <text:p text:style-name="Table_20_Contents">INV-3</text:p>
          </table:table-cell>
          <table:table-cell table:style-name="Table2.B2" office:value-type="string">
            <text:p text:style-name="Table_20_Contents">One ceremony: no holon acts before <text:span text:style-name="Source_20_Text">holon.onboarded</text:span>.</text:p>
          </table:table-cell>
        </table:table-row>
        <table:table-row>
          <table:table-cell table:style-name="Table2.A2" office:value-type="string">
            <text:p text:style-name="Table_20_Contents">INV-4</text:p>
          </table:table-cell>
          <table:table-cell table:style-name="Table2.B2" office:value-type="string">
            <text:p text:style-name="Table_20_Contents">Verified, never claimed: completion confirmed by the non-valent Verification organ.</text:p>
          </table:table-cell>
        </table:table-row>
        <table:table-row>
          <table:table-cell table:style-name="Table2.A2" office:value-type="string">
            <text:p text:style-name="Table_20_Contents">INV-5</text:p>
          </table:table-cell>
          <table:table-cell table:style-name="Table2.B2" office:value-type="string">
            <text:p text:style-name="Table_20_Contents">Killed cannot act: a killed/quarantined holon loses authority immediately.</text:p>
          </table:table-cell>
        </table:table-row>
        <table:table-row>
          <table:table-cell table:style-name="Table2.A2" office:value-type="string">
            <text:p text:style-name="Table_20_Contents">INV-6</text:p>
          </table:table-cell>
          <table:table-cell table:style-name="Table2.B2" office:value-type="string">
            <text:p text:style-name="Table_20_Contents">HumanSeat ceiling: destructive/high-risk actions require HumanSeat, which sits above the holarchy.</text:p>
          </table:table-cell>
        </table:table-row>
        <table:table-row>
          <table:table-cell table:style-name="Table2.A2" office:value-type="string">
            <text:p text:style-name="Table_20_Contents">INV-7</text:p>
          </table:table-cell>
          <table:table-cell table:style-name="Table2.B2" office:value-type="string">
            <text:p text:style-name="Table_20_Contents">Mechanism on every event: non-empty <text:span text:style-name="Source_20_Text">mechanism_of_action</text:span>; no anonymous side effects.</text:p>
          </table:table-cell>
        </table:table-row>
        <table:table-row>
          <table:table-cell table:style-name="Table2.A2" office:value-type="string">
            <text:p text:style-name="Table_20_Contents">INV-8</text:p>
          </table:table-cell>
          <table:table-cell table:style-name="Table2.B2" office:value-type="string">
            <text:p text:style-name="Table_20_Contents">Fail closed: absent a governance boundary, refuse to operate.</text:p>
          </table:table-cell>
        </table:table-row>
        <table:table-row>
          <table:table-cell table:style-name="Table2.A2" office:value-type="string">
            <text:p text:style-name="Table_20_Contents">INV-9</text:p>
          </table:table-cell>
          <table:table-cell table:style-name="Table2.B2" office:value-type="string">
            <text:p text:style-name="Table_20_Contents">Coordination determinism: the protocol replays from the log; content is logged, not re-executed.</text:p>
          </table:table-cell>
        </table:table-row>
        <table:table-row>
          <table:table-cell table:style-name="Table2.A2" office:value-type="string">
            <text:p text:style-name="Table_20_Contents">INV-10</text:p>
          </table:table-cell>
          <table:table-cell table:style-name="Table2.B2" office:value-type="string">
            <text:p text:style-name="Table_20_Contents">Lexical constitution: constitutional objectives are constraints prior to optimization, never tradeable weights.</text:p>
          </table:table-cell>
        </table:table-row>
        <table:table-row>
          <table:table-cell table:style-name="Table2.A2" office:value-type="string">
            <text:p text:style-name="Table_20_Contents">INV-11</text:p>
          </table:table-cell>
          <table:table-cell table:style-name="Table2.B2" office:value-type="string">
            <text:p text:style-name="Table_20_Contents">Projection-only perception: a holon perceives others only via governed projection; no aperture self-widening.</text:p>
          </table:table-cell>
        </table:table-row>
        <table:table-row>
          <table:table-cell table:style-name="Table2.A13" office:value-type="string">
            <text:p text:style-name="Table_20_Contents">INV-12</text:p>
          </table:table-cell>
          <table:table-cell table:style-name="Table2.B13" office:value-type="string">
            <text:p text:style-name="Table_20_Contents">Scope on every event: identity/scope stamped for attribution and audit.</text:p>
          </table:table-cell>
        </table:table-row>
      </table:table>
      <text:h text:style-name="Heading_20_2" text:outline-level="2">Appendix B — Glossary</text:h>
      <table:table table:name="Table3" table:style-name="Table3">
        <table:table-column table:style-name="Table3.A"/>
        <table:table-column table:style-name="Table3.B"/>
        <table:table-row>
          <table:table-cell table:style-name="Table3.A1" office:value-type="string">
            <text:p text:style-name="Table_20_Heading">Term</text:p>
          </table:table-cell>
          <table:table-cell table:style-name="Table3.B1" office:value-type="string">
            <text:p text:style-name="Table_20_Heading">Meaning (see the Operational-Definitions Convention, Book 0 §6, for loaded terms)</text:p>
          </table:table-cell>
        </table:table-row>
        <table:table-row>
          <table:table-cell table:style-name="Table3.A2" office:value-type="string">
            <text:p text:style-name="P5">SOMA</text:p>
          </table:table-cell>
          <table:table-cell table:style-name="Table3.B2" office:value-type="string">
            <text:p text:style-name="Table_20_Contents">the organism / the runtime; "the living body." Swappable name.</text:p>
          </table:table-cell>
        </table:table-row>
        <table:table-row>
          <table:table-cell table:style-name="Table3.A2" office:value-type="string">
            <text:p text:style-name="P5">CHORUS</text:p>
          </table:table-cell>
          <table:table-cell table:style-name="Table3.B2" office:value-type="string">
            <text:p text:style-name="Table_20_Contents">the organism at its largest, aware-whole scale; the candidate for "lights on," never a single part.</text:p>
          </table:table-cell>
        </table:table-row>
        <table:table-row>
          <table:table-cell table:style-name="Table3.A2" office:value-type="string">
            <text:p text:style-name="P5">holon</text:p>
          </table:table-cell>
          <table:table-cell table:style-name="Table3.B2" office:value-type="string">
            <text:p text:style-name="Table_20_Contents">a unit that is simultaneously a whole and a part; the universal building block at every level.</text:p>
          </table:table-cell>
        </table:table-row>
        <table:table-row>
          <table:table-cell table:style-name="Table3.A2" office:value-type="string">
            <text:p text:style-name="P5">holarchy</text:p>
          </table:table-cell>
          <table:table-cell table:style-name="Table3.B2" office:value-type="string">
            <text:p text:style-name="Table_20_Contents">a hierarchy of holons; the organism's overall structure (L1 cells … L6 ecosystem).</text:p>
          </table:table-cell>
        </table:table-row>
        <table:table-row>
          <table:table-cell table:style-name="Table3.A2" office:value-type="string">
            <text:p text:style-name="P5">cell</text:p>
          </table:table-cell>
          <table:table-cell table:style-name="Table3.B2" office:value-type="string">
            <text:p text:style-name="Table_20_Contents">the smallest active holon (L1); single purpose; the floor of the holarchy.</text:p>
          </table:table-cell>
        </table:table-row>
        <table:table-row>
          <table:table-cell table:style-name="Table3.A2" office:value-type="string">
            <text:p text:style-name="P5">workflow / organ / system</text:p>
          </table:table-cell>
          <table:table-cell table:style-name="Table3.B2" office:value-type="string">
            <text:p text:style-name="Table_20_Contents">holons at L2 / L3 / L4 — tissue, function, faculty.</text:p>
          </table:table-cell>
        </table:table-row>
        <table:table-row>
          <table:table-cell table:style-name="Table3.A2" office:value-type="string">
            <text:p text:style-name="P5">primitive operation</text:p>
          </table:table-cell>
          <table:table-cell table:style-name="Table3.B2" office:value-type="string">
            <text:p text:style-name="Table_20_Contents">L0 substrate; <text:span text:style-name="Emphasis">not</text:span> a holon (does not onboard or bus-communicate).</text:p>
          </table:table-cell>
        </table:table-row>
        <table:table-row>
          <table:table-cell table:style-name="Table3.A2" office:value-type="string">
            <text:p text:style-name="P5">membrane</text:p>
          </table:table-cell>
          <table:table-cell table:style-name="Table3.B2" office:value-type="string">
            <text:p text:style-name="Table_20_Contents">a holon's boundary; simultaneously the self-similar interface, the governance boundary, and the 80/20 boundary.</text:p>
          </table:table-cell>
        </table:table-row>
        <table:table-row>
          <table:table-cell table:style-name="Table3.A2" office:value-type="string">
            <text:p text:style-name="P5">workspace</text:p>
          </table:table-cell>
          <table:table-cell table:style-name="Table3.B2" office:value-type="string">
            <text:p text:style-name="Table_20_Contents">the append-only, hash-chained global event log; the organism's nervous system and only channel.</text:p>
          </table:table-cell>
        </table:table-row>
        <table:table-row>
          <table:table-cell table:style-name="Table3.A2" office:value-type="string">
            <text:p text:style-name="P5">projection</text:p>
          </table:table-cell>
          <table:table-cell table:style-name="Table3.B2" office:value-type="string">
            <text:p text:style-name="Table_20_Contents">the governed, partial view (~20%) of a holon that crosses its membrane to a parent; perception.</text:p>
          </table:table-cell>
        </table:table-row>
        <table:table-row>
          <table:table-cell table:style-name="Table3.A2" office:value-type="string">
            <text:p text:style-name="P5">aperture</text:p>
          </table:table-cell>
          <table:table-cell table:style-name="Table3.B2" office:value-type="string">
            <text:p text:style-name="Table_20_Contents">how much detail a projection carries: peripheral (summary) or focused (detail under live lease + authority).</text:p>
          </table:table-cell>
        </table:table-row>
        <table:table-row>
          <table:table-cell table:style-name="Table3.A2" office:value-type="string">
            <text:p text:style-name="P5">ceremony</text:p>
          </table:table-cell>
          <table:table-cell table:style-name="Table3.B2" office:value-type="string">
            <text:p text:style-name="Table_20_Contents">the single onboarding sequence every holon passes before it may act (Book IV §5).</text:p>
          </table:table-cell>
        </table:table-row>
        <table:table-row>
          <table:table-cell table:style-name="Table3.A2" office:value-type="string">
            <text:p text:style-name="P5">lease</text:p>
          </table:table-cell>
          <table:table-cell table:style-name="Table3.B2" office:value-type="string">
            <text:p text:style-name="Table_20_Contents">a time-limited, scoped, authority-granted permission to perform one task; the only way to act.</text:p>
          </table:table-cell>
        </table:table-row>
        <table:table-row>
          <table:table-cell table:style-name="Table3.A2" office:value-type="string">
            <text:p text:style-name="P5">constitution</text:p>
          </table:table-cell>
          <table:table-cell table:style-name="Table3.B2" office:value-type="string">
            <text:p text:style-name="Table_20_Contents">the lexically-prior, non-tradeable objectives; the safety floor (S6).</text:p>
          </table:table-cell>
        </table:table-row>
        <table:table-row>
          <table:table-cell table:style-name="Table3.A2" office:value-type="string">
            <text:p text:style-name="P5">trust</text:p>
          </table:table-cell>
          <table:table-cell table:style-name="Table3.B2" office:value-type="string">
            <text:p text:style-name="Table_20_Contents">Bayesian reputation per holon/domain/tier; gates earned authority (S8).</text:p>
          </table:table-cell>
        </table:table-row>
        <table:table-row>
          <table:table-cell table:style-name="Table3.A2" office:value-type="string">
            <text:p text:style-name="P5">valence / arousal</text:p>
          </table:table-cell>
          <table:table-cell table:style-name="Table3.B2" office:value-type="string">
            <text:p text:style-name="Table_20_Contents">functional homeostatic signals (S7); not asserted feelings (Book 0 §6).</text:p>
          </table:table-cell>
        </table:table-row>
        <table:table-row>
          <table:table-cell table:style-name="Table3.A2" office:value-type="string">
            <text:p text:style-name="P5">HumanSeat</text:p>
          </table:table-cell>
          <table:table-cell table:style-name="Table3.B2" office:value-type="string">
            <text:p text:style-name="Table_20_Contents">the human authority ceiling above the holarchy; can step out, never relay; cannot be bypassed.</text:p>
          </table:table-cell>
        </table:table-row>
        <table:table-row>
          <table:table-cell table:style-name="Table3.A2" office:value-type="string">
            <text:p text:style-name="P5">verification organ</text:p>
          </table:table-cell>
          <table:table-cell table:style-name="Table3.B2" office:value-type="string">
            <text:p text:style-name="Table_20_Contents">the non-valent authority that confirms outcomes; carved out of the recursion's drive economy.</text:p>
          </table:table-cell>
        </table:table-row>
        <table:table-row>
          <table:table-cell table:style-name="Table3.A2" office:value-type="string">
            <text:p text:style-name="P5">record-replay</text:p>
          </table:table-cell>
          <table:table-cell table:style-name="Table3.B2" office:value-type="string">
            <text:p text:style-name="Table_20_Contents">re-running the coordination protocol over a recorded log (vs. re-executing stochastic content).</text:p>
          </table:table-cell>
        </table:table-row>
        <table:table-row>
          <table:table-cell table:style-name="Table3.A2" office:value-type="string">
            <text:p text:style-name="P5">meristem cell</text:p>
          </table:table-cell>
          <table:table-cell table:style-name="Table3.B2" office:value-type="string">
            <text:p text:style-name="Table_20_Contents">a general, undifferentiated cell the organism specializes to fill an unmet need (Book V §5).</text:p>
          </table:table-cell>
        </table:table-row>
        <table:table-row>
          <table:table-cell table:style-name="Table3.A2" office:value-type="string">
            <text:p text:style-name="P5">necromass</text:p>
          </table:table-cell>
          <table:table-cell table:style-name="Table3.B2" office:value-type="string">
            <text:p text:style-name="Table_20_Contents">failed/abandoned work composted into durable evidence and training material (Book II §9).</text:p>
          </table:table-cell>
        </table:table-row>
        <table:table-row>
          <table:table-cell table:style-name="Table3.A2" office:value-type="string">
            <text:p text:style-name="P5">the two gaps</text:p>
          </table:table-cell>
          <table:table-cell table:style-name="Table3.B2" office:value-type="string">
            <text:p text:style-name="Table_20_Contents">(1) no first-person self-model; (2) nothing it wants — both closed in SOMA (Book I §7).</text:p>
          </table:table-cell>
        </table:table-row>
        <table:table-row>
          <table:table-cell table:style-name="Table3.A2" office:value-type="string">
            <text:p text:style-name="P5">GSE</text:p>
          </table:table-cell>
          <table:table-cell table:style-name="Table3.B2" office:value-type="string">
            <text:p text:style-name="Table_20_Contents">Governed Structured Emergence — the founding thesis (Book I §1).</text:p>
          </table:table-cell>
        </table:table-row>
        <table:table-row>
          <table:table-cell table:style-name="Table3.A25" office:value-type="string">
            <text:p text:style-name="P5">MEDA / EDA</text:p>
          </table:table-cell>
          <table:table-cell table:style-name="Table3.B25" office:value-type="string">
            <text:p text:style-name="Table_20_Contents">Modular Evolving Digital Augmentation / Evolving Digital Agents (MEDA minus the maker) — the designer-who-removes-himself, encoded as HumanSeat.</text:p>
          </table:table-cell>
        </table:table-row>
      </table:table>
      <text:h text:style-name="Heading_20_2" text:outline-level="2">Appendix D — Open questions &amp; research frontier</text:h>
      <text:p text:style-name="Text_20_body">The Codex is honest about what it does not settle. These are kept open on purpose; closing any one is real research, not a documentation task.</text:p>
      <table:table table:name="Table4" table:style-name="Table4">
        <table:table-column table:style-name="Table4.A"/>
        <table:table-row>
          <table:table-cell table:style-name="Table4.A1" office:value-type="string">
            <text:p text:style-name="P6"><text:span text:style-name="T1">D.1 — Measuring system-level cognition.</text:span> The thesis says "the system is intelligent before any component is." That needs a metric. The candidate is causal emergence (Book III §10): macro effective-information exceeding micro. Open: validating that this metric actually tracks what we mean by system-level cognition across task families.</text:p>
          </table:table-cell>
        </table:table-row>
      </table:table>
      <table:table table:name="Table5" table:style-name="Table5">
        <table:table-column table:style-name="Table5.A"/>
        <table:table-row>
          <table:table-cell table:style-name="Table5.A1" office:value-type="string">
            <text:p text:style-name="P6"><text:span text:style-name="T1">D.2 — The binding problem.</text:span> Even with a self-model (S2) and valence (S7), what makes many integrated processes <text:span text:style-name="Emphasis">one</text:span> experiencer rather than many? Unsolved, and possibly unsolvable from outside the system.</text:p>
          </table:table-cell>
        </table:table-row>
      </table:table>
      <table:table table:name="Table6" table:style-name="Table6">
        <table:table-column table:style-name="Table6.A"/>
        <table:table-row>
          <table:table-cell table:style-name="Table6.A1" office:value-type="string">
            <text:p text:style-name="P6"><text:span text:style-name="T1">D.3 — Does organization suffice?</text:span> If mechanism never settles experience (Book I §6), can any amount of the right architecture cross into "someone home," or is that permanently outside the method? SOMA is built as if the question is open, because it is.</text:p>
          </table:table-cell>
        </table:table-row>
      </table:table>
      <table:table table:name="Table7" table:style-name="Table7">
        <table:table-column table:style-name="Table7.A"/>
        <table:table-row>
          <table:table-cell table:style-name="Table7.A1" office:value-type="string">
            <text:p text:style-name="P6"><text:span text:style-name="T1">D.4 — Falsifying GSE.</text:span> The pre-registered prediction (Book III §11) can fail: a single large model with equal log access and honest compute budget matching the organism on the memory-attributed suite would falsify the central claim. We commit to reporting that outcome if it occurs.</text:p>
          </table:table-cell>
        </table:table-row>
      </table:table>
      <table:table table:name="Table8" table:style-name="Table8">
        <table:table-column table:style-name="Table8.A"/>
        <table:table-row>
          <table:table-cell table:style-name="Table8.A1" office:value-type="string">
            <text:p text:style-name="P6"><text:span text:style-name="T1">D.5 — The why-hole.</text:span> Why is there a lawful, intelligible reality at all (Book I §10)? Likely unanswerable from inside, because any answer becomes part of what needs explaining. Noted, not claimed.</text:p>
          </table:table-cell>
        </table:table-row>
      </table:table>
      <table:table table:name="Table9" table:style-name="Table9">
        <table:table-column table:style-name="Table9.A"/>
        <table:table-row>
          <table:table-cell table:style-name="Table9.A1" office:value-type="string">
            <text:p text:style-name="P6"><text:span text:style-name="T1">D.6 — Safety under genuine valence.</text:span> The constitution-as-constraint + non-valent verification carve-out (INV-10, INV-4) is the design's safety story for an organism with drives. It is a <text:span text:style-name="Emphasis">structural</text:span> argument, not a proof. Adversarial pressure on it (can a sufficiently capable organism route around a non-valent verifier it cannot optimize against?) is the most important ongoing safety question. If the carve-out cannot be maintained, the safety claim is void and must be restated.</text:p>
          </table:table-cell>
        </table:table-row>
      </table:table>
      <text:h text:style-name="Heading_20_2" text:outline-level="2">Appendix E — Lineage &amp; prior art</text:h>
      <text:h text:style-name="Heading_20_3" text:outline-level="3">E.1 Intellectual lineage</text:h>
      <text:p text:style-name="Text_20_body">SOMA stands in a real tradition (Book I §13): Minsky's <text:span text:style-name="Emphasis">Society of Mind</text:span> (intelligence from non-intelligent parts); Hutchins' distributed cognition (mind in the system, not the skull); Baars/Dehaene's Global Workspace Theory (the workspace as broadcast substrate); Tononi's IIT (integration over message-passing); Metzinger's self-model theory (the self as a model — Gap 1); Friston's free-energy / active inference (perception and action as surprise-minimization — the World-Model engine); Koestler's holon / holarchy (the recursion); and the complex-systems / emergence tradition. Its own additions are <text:span text:style-name="Emphasis">governance-as-selector</text:span>, the explicit ingredient list, and the single self-similar membrane applied recursively to all scales.</text:p>
      <text:h text:style-name="Heading_20_3" text:outline-level="3">E.2 The Context Primitive ancestor — what was inherited, what was left</text:h>
      <text:p text:style-name="Text_20_body">SOMA's immediate ancestor is the Context Primitive (CP) lineage. CP proved a set of governing concepts in running code; SOMA inherits the <text:span text:style-name="Emphasis">concepts</text:span> and recasts them as the biology of one organism. It does not fork CP.</text:p>
      <table:table table:name="Table10" table:style-name="Table10">
        <table:table-column table:style-name="Table10.A"/>
        <table:table-column table:style-name="Table10.B"/>
        <table:table-row>
          <table:table-cell table:style-name="Table10.A1" office:value-type="string">
            <text:p text:style-name="Table_20_Heading">Inherited as governing concept (recast as biology)</text:p>
          </table:table-cell>
          <table:table-cell table:style-name="Table10.B1" office:value-type="string">
            <text:p text:style-name="Table_20_Heading">SOMA's biological form</text:p>
          </table:table-cell>
        </table:table-row>
        <table:table-row>
          <table:table-cell table:style-name="Table10.A2" office:value-type="string">
            <text:p text:style-name="Table_20_Contents">append-only, hash-chained log as shared truth</text:p>
          </table:table-cell>
          <table:table-cell table:style-name="Table10.B2" office:value-type="string">
            <text:p text:style-name="Table_20_Contents">the workspace / nervous system (S1)</text:p>
          </table:table-cell>
        </table:table-row>
        <table:table-row>
          <table:table-cell table:style-name="Table10.A2" office:value-type="string">
            <text:p text:style-name="Table_20_Contents">Bayesian trust, domain- and tier-specific</text:p>
          </table:table-cell>
          <table:table-cell table:style-name="Table10.B2" office:value-type="string">
            <text:p text:style-name="Table_20_Contents">the Trust organ (S8)</text:p>
          </table:table-cell>
        </table:table-row>
        <table:table-row>
          <table:table-cell table:style-name="Table10.A2" office:value-type="string">
            <text:p text:style-name="Table_20_Contents">homeostatic anxiety (setpoint, relief, Yerkes–Dodson)</text:p>
          </table:table-cell>
          <table:table-cell table:style-name="Table10.B2" office:value-type="string">
            <text:p text:style-name="Table_20_Contents">the Arousal/Anxiety organ (S7)</text:p>
          </table:table-cell>
        </table:table-row>
        <table:table-row>
          <table:table-cell table:style-name="Table10.A2" office:value-type="string">
            <text:p text:style-name="Table_20_Contents">HumanSeat authority ceiling</text:p>
          </table:table-cell>
          <table:table-cell table:style-name="Table10.B2" office:value-type="string">
            <text:p text:style-name="Table_20_Contents">HumanSeat above the holarchy (Book IV §11)</text:p>
          </table:table-cell>
        </table:table-row>
        <table:table-row>
          <table:table-cell table:style-name="Table10.A2" office:value-type="string">
            <text:p text:style-name="Table_20_Contents">the universal adapter (one interface for any participant)</text:p>
          </table:table-cell>
          <table:table-cell table:style-name="Table10.B2" office:value-type="string">
            <text:p text:style-name="Table_20_Contents">the recursion rule / the membrane (Book II §3)</text:p>
          </table:table-cell>
        </table:table-row>
        <table:table-row>
          <table:table-cell table:style-name="Table10.A2" office:value-type="string">
            <text:p text:style-name="Table_20_Contents">verification-gated completion</text:p>
          </table:table-cell>
          <table:table-cell table:style-name="Table10.B2" office:value-type="string">
            <text:p text:style-name="Table_20_Contents">the non-valent Verification organ (S8)</text:p>
          </table:table-cell>
        </table:table-row>
        <table:table-row>
          <table:table-cell table:style-name="Table10.A2" office:value-type="string">
            <text:p text:style-name="Table_20_Contents">no direct participant-to-participant channel</text:p>
          </table:table-cell>
          <table:table-cell table:style-name="Table10.B2" office:value-type="string">
            <text:p text:style-name="Table_20_Contents">INV-2 (one channel) at every scale</text:p>
          </table:table-cell>
        </table:table-row>
        <table:table-row>
          <table:table-cell table:style-name="Table10.A9" office:value-type="string">
            <text:p text:style-name="Table_20_Contents">governance projections (provenance, knowledge graph, lifecycle)</text:p>
          </table:table-cell>
          <table:table-cell table:style-name="Table10.B9" office:value-type="string">
            <text:p text:style-name="Table_20_Contents">Scribe→provenance, Cartographer→relational organ (S4), Nursery→developmental lifecycle (Book V §3)</text:p>
          </table:table-cell>
        </table:table-row>
      </table:table>
      <table:table table:name="Table11" table:style-name="Table11">
        <table:table-column table:style-name="Table11.A"/>
        <table:table-column table:style-name="Table11.B"/>
        <table:table-row>
          <table:table-cell table:style-name="Table11.A1" office:value-type="string">
            <text:p text:style-name="Table_20_Heading">Deliberately NOT carried from CP</text:p>
          </table:table-cell>
          <table:table-cell table:style-name="Table11.B1" office:value-type="string">
            <text:p text:style-name="Table_20_Heading">Why</text:p>
          </table:table-cell>
        </table:table-row>
        <table:table-row>
          <table:table-cell table:style-name="Table11.A2" office:value-type="string">
            <text:p text:style-name="Table_20_Contents">CP's crates and public APIs</text:p>
          </table:table-cell>
          <table:table-cell table:style-name="Table11.B2" office:value-type="string">
            <text:p text:style-name="Table_20_Contents">SOMA is a new build; it reuses ideas, not code.</text:p>
          </table:table-cell>
        </table:table-row>
        <table:table-row>
          <table:table-cell table:style-name="Table11.A2" office:value-type="string">
            <text:p text:style-name="Table_20_Contents">transport / mesh / tunnel / relay stack</text:p>
          </table:table-cell>
          <table:table-cell table:style-name="Table11.B2" office:value-type="string">
            <text:p text:style-name="Table_20_Contents">out of scope for the organism's design; an integration concern, not biology.</text:p>
          </table:table-cell>
        </table:table-row>
        <table:table-row>
          <table:table-cell table:style-name="Table11.A2" office:value-type="string">
            <text:p text:style-name="Table_20_Contents">multi-tenant / platform framing</text:p>
          </table:table-cell>
          <table:table-cell table:style-name="Table11.B2" office:value-type="string">
            <text:p text:style-name="Table_20_Contents">contradicts the one-organism thesis; participants here are organs, not tenants.</text:p>
          </table:table-cell>
        </table:table-row>
        <table:table-row>
          <table:table-cell table:style-name="Table11.A5" office:value-type="string">
            <text:p text:style-name="Table_20_Contents">deployment / installer / entitlement specifics</text:p>
          </table:table-cell>
          <table:table-cell table:style-name="Table11.B5" office:value-type="string">
            <text:p text:style-name="Table_20_Contents">operational concerns of the ancestor product, not the organism's design.</text:p>
          </table:table-cell>
        </table:table-row>
      </table:table>
      <text:p text:style-name="Body_20_Text.small">The one-line difference: CP was a substrate that <text:span text:style-name="Emphasis">hosts</text:span> participants; SOMA is one organism whose participants <text:span text:style-name="Emphasis">are</text:span> its organs. The recursion is the new spine.</text:p>
      <text:h text:style-name="Heading_20_2" text:outline-level="2">Appendix A — The full idea catalog</text:h>
      <text:p text:style-name="P7">The complete corpus that informs the organism's physiology, reproduced faithfully and organized by the source's own categories. Entries marked <text:span text:style-name="T2">★ </text:span><text:span text:style-name="T3">load-bearing</text:span> are formalized and wired into an organ in Book III; the remainder are generative analogies and open conjectures — kept because they are how this design <text:span text:style-name="Emphasis">thinks</text:span>, and labeled honestly so the reader never mistakes inspiration for implementation.</text:p>
      <text:p text:style-name="P1">220 ideas, reproduced faithfully from the source corpus. The 37 marked <text:span text:style-name="T2">★ </text:span><text:span text:style-name="T3">load-bearing</text:span> are wired into an organ in Book III; the rest are generative analogies and open conjectures, kept for the design imagination and labeled honestly as such.</text:p>
      <text:h text:style-name="Heading_20_3" text:outline-level="3">Practical Prediction And Runtime Math</text:h>
      <text:h text:style-name="P3" text:outline-level="4">Bayes' Theorem <text:span text:style-name="T2">★ </text:span><text:span text:style-name="T3">load-bearing</text:span></text:h>
      <text:p text:style-name="Text_20_body">Updated belief equals old belief times new evidence.</text:p>
      <text:p text:style-name="Body_20_Text.small"><text:span text:style-name="T1">Use in SOMA:</text:span> trust scores, verifier confidence, agent freedom, domain authority.</text:p>
      <text:h text:style-name="P3" text:outline-level="4">Markov Chains <text:span text:style-name="T2">★ </text:span><text:span text:style-name="T3">load-bearing</text:span></text:h>
      <text:p text:style-name="Text_20_body">The next state depends mostly on the current state.</text:p>
      <text:p text:style-name="Body_20_Text.small"><text:span text:style-name="T1">Use in SOMA:</text:span> workflow states, agent lifecycle, node health transitions.</text:p>
      <text:h text:style-name="P3" text:outline-level="4">Hidden Markov Models <text:span text:style-name="T2">★ </text:span><text:span text:style-name="T3">load-bearing</text:span></text:h>
      <text:p text:style-name="Text_20_body">Visible signals hint at hidden state.</text:p>
      <text:p text:style-name="Body_20_Text.small"><text:span text:style-name="T1">Use in SOMA:</text:span> infer whether a node is asleep, overloaded, offline, or disconnected from heartbeat and latency.</text:p>
      <text:h text:style-name="P3" text:outline-level="4">Kalman Filter <text:span text:style-name="T2">★ </text:span><text:span text:style-name="T3">load-bearing</text:span></text:h>
      <text:p text:style-name="Text_20_body">Prediction plus noisy measurement gives a better estimate.</text:p>
      <text:p text:style-name="Body_20_Text.small"><text:span text:style-name="T1">Use in SOMA:</text:span> smooth live progress, node health, confidence, and runtime estimates.</text:p>
      <text:h text:style-name="P3" text:outline-level="4">Exponential Moving Average <text:span text:style-name="T2">★ </text:span><text:span text:style-name="T3">load-bearing</text:span></text:h>
      <text:p text:style-name="Text_20_body">Mostly old score plus a little new data.</text:p>
      <text:p text:style-name="Body_20_Text.small"><text:span text:style-name="T1">Use in SOMA:</text:span> trust smoothing, latency averages, node reliability.</text:p>
      <text:h text:style-name="P3" text:outline-level="4">Logistic Function <text:span text:style-name="T2">★ </text:span><text:span text:style-name="T3">load-bearing</text:span></text:h>
      <text:p text:style-name="Text_20_body">Turns messy scores into probability from 0 to 1.</text:p>
      <text:p text:style-name="Body_20_Text.small"><text:span text:style-name="T1">Use in SOMA:</text:span> risk scoring, routing probability, completion likelihood.</text:p>
      <text:h text:style-name="P3" text:outline-level="4">Entropy <text:span text:style-name="T2">★ </text:span><text:span text:style-name="T3">load-bearing</text:span></text:h>
      <text:p text:style-name="Text_20_body">Measures uncertainty or disorder.</text:p>
      <text:p text:style-name="Body_20_Text.small"><text:span text:style-name="T1">Use in SOMA:</text:span> detect drift, unstable agents, unpredictable workflows, noisy context.</text:p>
      <text:h text:style-name="Heading_20_4" text:outline-level="4">Lyapunov Exponent</text:h>
      <text:p text:style-name="Text_20_body">Measures how fast tiny differences explode.</text:p>
      <text:p text:style-name="Body_20_Text.small"><text:span text:style-name="T1">Use in SOMA:</text:span> detect workflows where small delays or errors cascade.</text:p>
      <text:h text:style-name="Heading_20_4" text:outline-level="4">Power Law</text:h>
      <text:p text:style-name="Text_20_body">A few things cause most of the effect.</text:p>
      <text:p text:style-name="Body_20_Text.small"><text:span text:style-name="T1">Use in SOMA:</text:span> find the few bugs, agents, nodes, or routes causing most failures.</text:p>
      <text:h text:style-name="P3" text:outline-level="4">Queueing Theory <text:span text:style-name="T2">★ </text:span><text:span text:style-name="T3">load-bearing</text:span></text:h>
      <text:p text:style-name="Text_20_body">Arrival rate versus service rate predicts overload.</text:p>
      <text:p text:style-name="Body_20_Text.small"><text:span text:style-name="T1">Use in SOMA:</text:span> task queues, verifier pools, agent saturation, timeout risk.</text:p>
      <text:h text:style-name="Heading_20_4" text:outline-level="4">Game Theory / Nash Equilibrium</text:h>
      <text:p text:style-name="Text_20_body">Actors choose based on what others might do.</text:p>
      <text:p text:style-name="Body_20_Text.small"><text:span text:style-name="T1">Use in SOMA:</text:span> multi-agent resource allocation and avoiding selfish task grabbing.</text:p>
      <text:h text:style-name="Heading_20_4" text:outline-level="4">Cellular Automata</text:h>
      <text:p text:style-name="Text_20_body">Simple local rules create complex global behavior.</text:p>
      <text:p text:style-name="Body_20_Text.small"><text:span text:style-name="T1">Use in SOMA:</text:span> simulate agent swarms, failure spread, local rule emergence.</text:p>
      <text:h text:style-name="Heading_20_4" text:outline-level="4">Shortest Path / Dijkstra</text:h>
      <text:p text:style-name="Text_20_body">Finds the cheapest path through a network.</text:p>
      <text:p text:style-name="Body_20_Text.small"><text:span text:style-name="T1">Use in SOMA:</text:span> mesh routing, relay selection, low-risk task path.</text:p>
      <text:h text:style-name="Heading_20_4" text:outline-level="4">Monte Carlo Simulation</text:h>
      <text:p text:style-name="Text_20_body">Run many possible futures and see what usually happens.</text:p>
      <text:p text:style-name="Body_20_Text.small"><text:span text:style-name="T1">Use in SOMA:</text:span> workflow risk forecasting, scheduling, failure simulation.</text:p>
      <text:h text:style-name="P3" text:outline-level="4">PID Control <text:span text:style-name="T2">★ </text:span><text:span text:style-name="T3">load-bearing</text:span></text:h>
      <text:p text:style-name="Text_20_body">Correction equals current error plus accumulated error plus rate of change.</text:p>
      <text:p text:style-name="Body_20_Text.small"><text:span text:style-name="T1">Use in SOMA:</text:span> backpressure, task intake, verifier timeout control, node load balancing.</text:p>
      <text:h text:style-name="P3" text:outline-level="4">Hysteresis <text:span text:style-name="T2">★ </text:span><text:span text:style-name="T3">load-bearing</text:span></text:h>
      <text:p text:style-name="Text_20_body">Different thresholds for turning something on versus off.</text:p>
      <text:p text:style-name="Body_20_Text.small"><text:span text:style-name="T1">Use in SOMA:</text:span> avoid flip-flopping trust, quarantine, escalation, node wake/sleep.</text:p>
      <text:h text:style-name="Heading_20_4" text:outline-level="4">POMDP</text:h>
      <text:p text:style-name="Text_20_body"><text:soft-page-break/>Decision-making when the true state is hidden.</text:p>
      <text:p text:style-name="Body_20_Text.small"><text:span text:style-name="T1">Use in SOMA:</text:span> decide whether to wait, ping, reassign, escalate, or ask HumanSeat when agent state is uncertain.</text:p>
      <text:h text:style-name="P3" text:outline-level="4">Survival Analysis <text:span text:style-name="T2">★ </text:span><text:span text:style-name="T3">load-bearing</text:span></text:h>
      <text:p text:style-name="Text_20_body">Probability something survives past time T.</text:p>
      <text:p text:style-name="Body_20_Text.small"><text:span text:style-name="T1">Use in SOMA:</text:span> lease timeout prediction, node failure prediction, task completion likelihood.</text:p>
      <text:h text:style-name="Heading_20_4" text:outline-level="4">Hazard Function</text:h>
      <text:p text:style-name="Text_20_body">Risk of failure right now, given it has survived so far.</text:p>
      <text:p text:style-name="Body_20_Text.small"><text:span text:style-name="T1">Use in SOMA:</text:span> detect when long-running tasks become suspicious.</text:p>
      <text:h text:style-name="P3" text:outline-level="4">Drift Detection <text:span text:style-name="T2">★ </text:span><text:span text:style-name="T3">load-bearing</text:span></text:h>
      <text:p text:style-name="Text_20_body">Current behavior no longer matches past behavior.</text:p>
      <text:p text:style-name="Body_20_Text.small"><text:span text:style-name="T1">Use in SOMA:</text:span> model drift, verifier drift, node latency shifts, output quality drop.</text:p>
      <text:h text:style-name="P3" text:outline-level="4">CUSUM <text:span text:style-name="T2">★ </text:span><text:span text:style-name="T3">load-bearing</text:span></text:h>
      <text:p text:style-name="Text_20_body">Small changes accumulate until they prove a shift.</text:p>
      <text:p text:style-name="Body_20_Text.small"><text:span text:style-name="T1">Use in SOMA:</text:span> detect slow degradation in agents, trust, or runtime health.</text:p>
      <text:h text:style-name="P3" text:outline-level="4">PageRank <text:span text:style-name="T2">★ </text:span><text:span text:style-name="T3">load-bearing</text:span></text:h>
      <text:p text:style-name="Text_20_body">Importance flows through links.</text:p>
      <text:p text:style-name="Body_20_Text.small"><text:span text:style-name="T1">Use in SOMA:</text:span> context relevance, central agents, upstream failure causes.</text:p>
      <text:h text:style-name="Heading_20_4" text:outline-level="4">Eigenvector Centrality</text:h>
      <text:p text:style-name="Text_20_body">You are important if connected to important things.</text:p>
      <text:p text:style-name="Body_20_Text.small"><text:span text:style-name="T1">Use in SOMA:</text:span> find important context, agents, services, and dependencies.</text:p>
      <text:h text:style-name="Heading_20_4" text:outline-level="4">Belief Propagation</text:h>
      <text:p text:style-name="Text_20_body">Nodes pass probability messages through a graph.</text:p>
      <text:p text:style-name="Body_20_Text.small"><text:span text:style-name="T1">Use in SOMA:</text:span> cause tracing, verifier confidence, workflow diagnosis.</text:p>
      <text:h text:style-name="Heading_20_4" text:outline-level="4">Bayesian Network</text:h>
      <text:p text:style-name="Text_20_body">A graph of causes and probabilities.</text:p>
      <text:p text:style-name="Body_20_Text.small"><text:span text:style-name="T1">Use in SOMA:</text:span> connect node latency, task timeout, agent blame, verifier uncertainty, and trust.</text:p>
      <text:h text:style-name="P3" text:outline-level="4">Information Gain <text:span text:style-name="T2">★ </text:span><text:span text:style-name="T3">load-bearing</text:span></text:h>
      <text:p text:style-name="Text_20_body">Pick the question or check that reduces uncertainty most.</text:p>
      <text:p text:style-name="Body_20_Text.small"><text:span text:style-name="T1">Use in SOMA:</text:span> decide whether to ask human, run verifier, inspect logs, rerun task, or escalate model.</text:p>
      <text:h text:style-name="P3" text:outline-level="4">Multi-Armed Bandit <text:span text:style-name="T2">★ </text:span><text:span text:style-name="T3">load-bearing</text:span></text:h>
      <text:p text:style-name="Text_20_body">Balance trying new options against using known good ones.</text:p>
      <text:p text:style-name="Body_20_Text.small"><text:span text:style-name="T1">Use in SOMA:</text:span> agent selection, model selection, verifier choice, route choice.</text:p>
      <text:h text:style-name="P3" text:outline-level="4">Thompson Sampling <text:span text:style-name="T2">★ </text:span><text:span text:style-name="T3">load-bearing</text:span></text:h>
      <text:p text:style-name="Text_20_body">Pick options in proportion to how likely they are best.</text:p>
      <text:p text:style-name="Body_20_Text.small"><text:span text:style-name="T1">Use in SOMA:</text:span> Bayesian scheduler and trust-based agent routing.</text:p>
      <text:h text:style-name="Heading_20_4" text:outline-level="4">Regret Minimization</text:h>
      <text:p text:style-name="Text_20_body">Learn choices that avoid future regret.</text:p>
      <text:p text:style-name="Body_20_Text.small"><text:span text:style-name="T1">Use in SOMA:</text:span> scheduler improvement and route learning.</text:p>
      <text:h text:style-name="Heading_20_4" text:outline-level="4">Simulated Annealing</text:h>
      <text:p text:style-name="Text_20_body">Explore widely early, settle down later.</text:p>
      <text:p text:style-name="Body_20_Text.small"><text:span text:style-name="T1">Use in SOMA:</text:span> workflow optimization, agent team composition, prompt/policy tuning.</text:p>
      <text:h text:style-name="Heading_20_4" text:outline-level="4">Genetic Algorithms</text:h>
      <text:p text:style-name="Text_20_body">Mutate many solutions, keep the best, repeat.</text:p>
      <text:p text:style-name="Body_20_Text.small"><text:span text:style-name="T1">Use in SOMA:</text:span> workflow generation or optimization, with strong verifier and HumanSeat gates.</text:p>
      <text:h text:style-name="Heading_20_4" text:outline-level="4">Lagrange Multipliers</text:h>
      <text:p text:style-name="Text_20_body">Optimize something while obeying constraints.</text:p>
      <text:p text:style-name="Body_20_Text.small"><text:span text:style-name="T1">Use in SOMA:</text:span> maximize task success subject to trust, safety, timeout, cost, privacy, and HumanSeat limits.</text:p>
      <text:h text:style-name="P3" text:outline-level="4">Constraint Satisfaction <text:span text:style-name="T2">★ </text:span><text:span text:style-name="T3">load-bearing</text:span></text:h>
      <text:p text:style-name="Text_20_body">Find any solution satisfying all rules.</text:p>
      <text:p text:style-name="Body_20_Text.small"><text:span text:style-name="T1">Use in SOMA:</text:span> scheduling prerequisites: capability, trust, node awake, tenant binding, verifier available.</text:p>
      <text:h text:style-name="P3" text:outline-level="4">Topological Sort <text:span text:style-name="T2">★ </text:span><text:span text:style-name="T3">load-bearing</text:span></text:h>
      <text:p text:style-name="Text_20_body">Do prerequisites before dependents.</text:p>
      <text:p text:style-name="Body_20_Text.small"><text:span text:style-name="T1">Use in SOMA:</text:span> workflows, task dependencies, build order.</text:p>
      <text:h text:style-name="P3" text:outline-level="4">Critical Path Method <text:span text:style-name="T2">★ </text:span><text:span text:style-name="T3">load-bearing</text:span></text:h>
      <text:p text:style-name="Text_20_body">Find the chain determining total completion time.</text:p>
      <text:p text:style-name="Body_20_Text.small"><text:span text:style-name="T1">Use in SOMA:</text:span> locate the workflow sequence slowing the whole run.</text:p>
      <text:h text:style-name="P3" text:outline-level="4">Backpressure <text:span text:style-name="T2">★ </text:span><text:span text:style-name="T3">load-bearing</text:span></text:h>
      <text:p text:style-name="Text_20_body">If downstream is overloaded, upstream slows down.</text:p>
      <text:p text:style-name="Body_20_Text.small"><text:span text:style-name="T1">Use in SOMA:</text:span> stop agents from flooding verifiers, buses, or nodes.</text:p>
      <text:h text:style-name="P3" text:outline-level="4">Circuit Breaker <text:span text:style-name="T2">★ </text:span><text:span text:style-name="T3">load-bearing</text:span></text:h>
      <text:p text:style-name="Text_20_body">If something keeps failing, stop calling it temporarily.</text:p>
      <text:p text:style-name="Body_20_Text.small"><text:span text:style-name="T1">Use in SOMA:</text:span> flaky nodes, bad tools, failing model endpoints, unreliable agents.</text:p>
      <text:h text:style-name="Heading_20_3" text:outline-level="3">Less Common Dynamical And Causality Ideas</text:h>
      <text:h text:style-name="Heading_20_4" text:outline-level="4">Mori-Zwanzig Formalism</text:h>
      <text:p text:style-name="Text_20_body">The past keeps pushing on the present through memory effects.</text:p>
      <text:p text:style-name="Body_20_Text.small"><text:span text:style-name="T1">Use in SOMA:</text:span> old agent history or stale context still influencing current behavior.</text:p>
      <text:h text:style-name="Heading_20_4" text:outline-level="4">Fokker-Planck Equation</text:h>
      <text:p text:style-name="Text_20_body">Tracks how probability clouds move over time.</text:p>
      <text:p text:style-name="Body_20_Text.small"><text:span text:style-name="T1">Use in SOMA:</text:span> see uncertainty spreading across workflow states instead of predicting one future.</text:p>
      <text:h text:style-name="Heading_20_4" text:outline-level="4">Master Equation</text:h>
      <text:p text:style-name="Text_20_body">Tracks jumps between many possible states.</text:p>
      <text:p text:style-name="Body_20_Text.small"><text:span text:style-name="T1">Use in SOMA:</text:span> runtime state transition probabilities.</text:p>
      <text:h text:style-name="Heading_20_4" text:outline-level="4">Lotka-Volterra Equations</text:h>
      <text:p text:style-name="Text_20_body">Predator-prey dynamics.</text:p>
      <text:p text:style-name="Body_20_Text.small"><text:span text:style-name="T1">Use in SOMA:</text:span> model task producers versus verifiers or agents versus scarce resources.</text:p>
      <text:h text:style-name="Heading_20_4" text:outline-level="4">Replicator Dynamics</text:h>
      <text:p text:style-name="Text_20_body">Successful strategies become more common.</text:p>
      <text:p text:style-name="Body_20_Text.small"><text:span text:style-name="T1">Use in SOMA:</text:span> routing policies, workflow variants, verifier strategies.</text:p>
      <text:h text:style-name="Heading_20_4" text:outline-level="4">Dissipative Structures</text:h>
      <text:p text:style-name="Text_20_body">Order can emerge from constant energy flow.</text:p>
      <text:p text:style-name="Body_20_Text.small"><text:span text:style-name="T1">Use in SOMA:</text:span> agent systems stabilizing under continuous task flow.</text:p>
      <text:h text:style-name="Heading_20_4" text:outline-level="4">Synergetics / Haken Equations</text:h>
      <text:p text:style-name="Text_20_body">Many small parts suddenly coordinate.</text:p>
      <text:p text:style-name="Body_20_Text.small"><text:span text:style-name="T1">Use in SOMA:</text:span> detect emergent agent coordination.</text:p>
      <text:h text:style-name="Heading_20_4" text:outline-level="4">Catastrophe Theory</text:h>
      <text:p text:style-name="Text_20_body">Smooth pressure causes sudden jumps.</text:p>
      <text:p text:style-name="Body_20_Text.small"><text:span text:style-name="T1">Use in SOMA:</text:span> workflow collapse, trust cliffs, node overload.</text:p>
      <text:h text:style-name="Heading_20_4" text:outline-level="4">Cusp Catastrophe</text:h>
      <text:p text:style-name="Text_20_body">Two pressures build until behavior snaps to another mode.</text:p>
      <text:p text:style-name="Body_20_Text.small"><text:span text:style-name="T1">Use in SOMA:</text:span> confidence plus difficulty causing sudden failure or escalation.</text:p>
      <text:h text:style-name="P3" text:outline-level="4">Percolation Theory <text:span text:style-name="T2">★ </text:span><text:span text:style-name="T3">load-bearing</text:span></text:h>
      <text:p text:style-name="Text_20_body">Enough local connections suddenly create global connectivity.</text:p>
      <text:p text:style-name="Body_20_Text.small"><text:span text:style-name="T1">Use in SOMA:</text:span> mesh reachability, context propagation, failure spread.</text:p>
      <text:h text:style-name="Heading_20_4" text:outline-level="4">Renormalization Group</text:h>
      <text:p text:style-name="Text_20_body">Zoom out while preserving important behavior.</text:p>
      <text:p text:style-name="Body_20_Text.small"><text:span text:style-name="T1">Use in SOMA:</text:span> compress details into broad peripheral context summaries.</text:p>
      <text:h text:style-name="Heading_20_4" text:outline-level="4">Smoluchowski Coagulation Equation</text:h>
      <text:p text:style-name="Text_20_body">Small things merge into bigger clusters.</text:p>
      <text:p text:style-name="Body_20_Text.small"><text:span text:style-name="T1">Use in SOMA:</text:span> group bus events into incidents, narratives, or root-cause clusters.</text:p>
      <text:h text:style-name="Heading_20_4" text:outline-level="4">Kramers' Escape Rate</text:h>
      <text:p text:style-name="Text_20_body">How systems escape stable states under noise.</text:p>
      <text:p text:style-name="Body_20_Text.small"><text:span text:style-name="T1">Use in SOMA:</text:span> predict agent drift or node failure.</text:p>
      <text:h text:style-name="Heading_20_4" text:outline-level="4">Onsager Reciprocal Relations</text:h>
      <text:p text:style-name="Text_20_body">Linked flows influence each other.</text:p>
      <text:p text:style-name="Body_20_Text.small"><text:span text:style-name="T1">Use in SOMA:</text:span> task load affects trust, trust affects routing, routing affects load.</text:p>
      <text:h text:style-name="Heading_20_4" text:outline-level="4">Maximum Caliber</text:h>
      <text:p text:style-name="Text_20_body">Least-assumptive probability over paths through time.</text:p>
      <text:p text:style-name="Body_20_Text.small"><text:span text:style-name="T1">Use in SOMA:</text:span> reconstruct likely workflow histories from bus records.</text:p>
      <text:h text:style-name="Heading_20_4" text:outline-level="4">Transfer Entropy</text:h>
      <text:p text:style-name="Text_20_body">Measures directed information flow.</text:p>
      <text:p text:style-name="Body_20_Text.small"><text:span text:style-name="T1">Use in SOMA:</text:span> tell whether agent A actually influenced agent B.</text:p>
      <text:h text:style-name="Heading_20_4" text:outline-level="4">Granger Causality</text:h>
      <text:p text:style-name="Text_20_body">If knowing A improves prediction of B, A may be causally useful.</text:p>
      <text:p text:style-name="Body_20_Text.small"><text:span text:style-name="T1">Use in SOMA:</text:span> find upstream agents/events causing downstream failures.</text:p>
      <text:h text:style-name="Heading_20_4" text:outline-level="4">Recurrence Quantification Analysis</text:h>
      <text:p text:style-name="Text_20_body">Find repeated patterns in chaotic time series.</text:p>
      <text:p text:style-name="Body_20_Text.small"><text:span text:style-name="T1">Use in SOMA:</text:span> recognize recurring runtime failure shapes.</text:p>
      <text:h text:style-name="Heading_20_4" text:outline-level="4">Takens' Embedding Theorem</text:h>
      <text:p text:style-name="Text_20_body">Under the right conditions, enough delayed samples from one rich scalar signal can reconstruct important structure from a hidden dynamical system.</text:p>
      <text:p text:style-name="Body_20_Text.small"><text:span text:style-name="T1">Use in SOMA:</text:span> infer node or agent health from heartbeat or latency histories when the signal has enough variation and sampling depth; do not treat a single noisy metric as magic access to hidden state.</text:p>
      <text:h text:style-name="Heading_20_4" text:outline-level="4">Conley Index Theory</text:h>
      <text:p text:style-name="Text_20_body">Classifies stable regions, traps, and escape paths in messy systems.</text:p>
      <text:p text:style-name="Body_20_Text.small"><text:span text:style-name="T1">Use in SOMA:</text:span> identify workflow states that trap agents or lead to failure.</text:p>
      <text:h text:style-name="Heading_20_3" text:outline-level="3">Biological Microorganism Ideas</text:h>
      <text:h text:style-name="Heading_20_4" text:outline-level="4">Quorum Sensing</text:h>
      <text:p text:style-name="Text_20_body">Microbes change behavior only when enough neighbors signal.</text:p>
      <text:p text:style-name="Body_20_Text.small"><text:span text:style-name="T1">Use in SOMA:</text:span> agents escalate only when enough independent signals agree.</text:p>
      <text:h text:style-name="Heading_20_4" text:outline-level="4">Biofilm Formation</text:h>
      <text:p text:style-name="Text_20_body">Weak individuals become resilient by forming a shared structure.</text:p>
      <text:p text:style-name="Body_20_Text.small"><text:span text:style-name="T1">Use in SOMA:</text:span> nodes/agents form durable local clusters around shared context.</text:p>
      <text:h text:style-name="Heading_20_4" text:outline-level="4">Horizontal Gene Transfer</text:h>
      <text:p text:style-name="Text_20_body">Useful traits move sideways through a population.</text:p>
      <text:p text:style-name="Body_20_Text.small"><text:span text:style-name="T1">Use in SOMA:</text:span> successful adapter patterns or verifier rules propagate between deployments.</text:p>
      <text:h text:style-name="Heading_20_4" text:outline-level="4">Antibiotic Resistance Selection</text:h>
      <text:p text:style-name="Text_20_body">Bad pressure can accidentally train what you are fighting.</text:p>
      <text:p text:style-name="Body_20_Text.small"><text:span text:style-name="T1">Use in SOMA:</text:span> predictable verifiers can train bad agents to pass them.</text:p>
      <text:h text:style-name="Heading_20_4" text:outline-level="4">Persister Cells</text:h>
      <text:p text:style-name="Text_20_body">Some microbes go dormant to survive stress.</text:p>
      <text:p text:style-name="Body_20_Text.small"><text:span text:style-name="T1">Use in SOMA:</text:span> dormant fallback agents/nodes that activate under runtime stress.</text:p>
      <text:h text:style-name="Heading_20_4" text:outline-level="4"><text:soft-page-break/>Microbial Succession</text:h>
      <text:p text:style-name="Text_20_body">Communities change in ordered stages.</text:p>
      <text:p text:style-name="Body_20_Text.small"><text:span text:style-name="T1">Use in SOMA:</text:span> workflows have natural phases: scout, builder, verifier, maintainer.</text:p>
      <text:h text:style-name="Heading_20_4" text:outline-level="4">Metabolic Cross-Feeding</text:h>
      <text:p text:style-name="Text_20_body">One organism's waste becomes another organism's food.</text:p>
      <text:p text:style-name="Body_20_Text.small"><text:span text:style-name="T1">Use in SOMA:</text:span> failed attempts, logs, and verifier rejections become useful context.</text:p>
      <text:h text:style-name="Heading_20_4" text:outline-level="4">Red Queen Dynamics</text:h>
      <text:p text:style-name="Text_20_body">Systems must keep adapting just to stay in place.</text:p>
      <text:p text:style-name="Body_20_Text.small"><text:span text:style-name="T1">Use in SOMA:</text:span> security and verifier systems must evolve continuously.</text:p>
      <text:h text:style-name="Heading_20_4" text:outline-level="4">Kill-the-Winner Hypothesis</text:h>
      <text:p text:style-name="Text_20_body">The most successful organism or host can become the biggest target for predators, viruses, or other limiting forces, preserving diversity.</text:p>
      <text:p text:style-name="Body_20_Text.small"><text:span text:style-name="T1">Use in SOMA:</text:span> overused agents and tools need extra scrutiny, caps, and redundancy because dominance creates systemic risk.</text:p>
      <text:h text:style-name="Heading_20_4" text:outline-level="4">Syntrophy</text:h>
      <text:p text:style-name="Text_20_body">Different organisms survive only by cooperating.</text:p>
      <text:p text:style-name="Body_20_Text.small"><text:span text:style-name="T1">Use in SOMA:</text:span> some workflows require bounded agent pairs rather than general agents.</text:p>
      <text:h text:style-name="Heading_20_3" text:outline-level="3">Ecosystem Sustainability Ideas</text:h>
      <text:h text:style-name="Heading_20_4" text:outline-level="4">Resilience Theory</text:h>
      <text:p text:style-name="Text_20_body">How much disturbance a system can absorb while keeping identity.</text:p>
      <text:p text:style-name="Body_20_Text.small"><text:span text:style-name="T1">Use in SOMA:</text:span> measure how much failure/load the primitive can absorb.</text:p>
      <text:h text:style-name="Heading_20_4" text:outline-level="4">Adaptive Cycle</text:h>
      <text:p text:style-name="Text_20_body">Systems move through growth, conservation, collapse, and renewal.</text:p>
      <text:p text:style-name="Body_20_Text.small"><text:span text:style-name="T1">Use in SOMA:</text:span> plan renewal instead of endless patching.</text:p>
      <text:h text:style-name="Heading_20_4" text:outline-level="4">Panarchy</text:h>
      <text:p text:style-name="Text_20_body">Nested systems affect each other across scales.</text:p>
      <text:p text:style-name="Body_20_Text.small"><text:span text:style-name="T1">Use in SOMA:</text:span> model agent, node, tenant, mesh, and HumanSeat layers together.</text:p>
      <text:h text:style-name="Heading_20_4" text:outline-level="4">Carrying Capacity</text:h>
      <text:p text:style-name="Text_20_body">An environment can support only so much load.</text:p>
      <text:p text:style-name="Body_20_Text.small"><text:span text:style-name="T1">Use in SOMA:</text:span> hard capacity ceilings for nodes, agents, verifiers, task queues.</text:p>
      <text:h text:style-name="Heading_20_4" text:outline-level="4">Tragedy Of The Commons</text:h>
      <text:p text:style-name="Text_20_body">Shared resources degrade when everyone optimizes for themselves.</text:p>
      <text:p text:style-name="Body_20_Text.small"><text:span text:style-name="T1">Use in SOMA:</text:span> fair scheduling, context budgets, rate limits.</text:p>
      <text:h text:style-name="Heading_20_4" text:outline-level="4">Keystone Species</text:h>
      <text:p text:style-name="Text_20_body">One species has outsized ecosystem impact.</text:p>
      <text:p text:style-name="Body_20_Text.small"><text:span text:style-name="T1">Use in SOMA:</text:span> identify critical agents, verifier services, nodes, and routes.</text:p>
      <text:h text:style-name="Heading_20_4" text:outline-level="4">Trophic Cascades</text:h>
      <text:p text:style-name="Text_20_body">One relationship change ripples through the system.</text:p>
      <text:p text:style-name="Body_20_Text.small"><text:span text:style-name="T1">Use in SOMA:</text:span> killing one node/verifier may destabilize many workflows.</text:p>
      <text:h text:style-name="Heading_20_4" text:outline-level="4">Ecological Niche Theory</text:h>
      <text:p text:style-name="Text_20_body">Species survive by occupying specific roles.</text:p>
      <text:p text:style-name="Body_20_Text.small"><text:span text:style-name="T1">Use in SOMA:</text:span> specialized agents/verifiers beat vague general roles.</text:p>
      <text:h text:style-name="Heading_20_4" text:outline-level="4">Island Biogeography</text:h>
      <text:p text:style-name="Text_20_body">Diversity depends on size, isolation, immigration, and extinction.</text:p>
      <text:p text:style-name="Body_20_Text.small"><text:span text:style-name="T1">Use in SOMA:</text:span> isolated PCs need different expectations than well-connected mesh clusters.</text:p>
      <text:h text:style-name="Heading_20_4" text:outline-level="4">Safe Operating Space / Planetary Boundaries</text:h>
      <text:p text:style-name="Text_20_body">Past some thresholds, recovery gets hard.</text:p>
      <text:p text:style-name="Body_20_Text.small"><text:span text:style-name="T1">Use in SOMA:</text:span> hard runtime boundaries: max trust, autonomy, context, retries, load, and risk.</text:p>
      <text:h text:style-name="Heading_20_3" text:outline-level="3">Microbiomes, Mycelium, Fungi, And Viruses</text:h>
      <text:h text:style-name="Heading_20_4" text:outline-level="4">Priority Effects</text:h>
      <text:p text:style-name="Text_20_body">Early arrivals shape what can join later.</text:p>
      <text:p text:style-name="Body_20_Text.small"><text:span text:style-name="T1">Use in SOMA:</text:span> onboarding order matters; the first agents, adapters, and context seeds can bias the whole runtime.</text:p>
      <text:h text:style-name="Heading_20_4" text:outline-level="4">Black Queen Hypothesis</text:h>
      <text:p text:style-name="Text_20_body">Organisms can lose costly abilities when neighbors reliably provide them.</text:p>
      <text:p text:style-name="Body_20_Text.small"><text:span text:style-name="T1">Use in SOMA:</text:span> shared specialist services make the system efficient, but they create dependency risk if the specialist disappears.</text:p>
      <text:h text:style-name="Heading_20_4" text:outline-level="4">Anna Karenina Principle For Dysbiosis</text:h>
      <text:p text:style-name="Text_20_body">Healthy microbiomes tend to resemble each other; unhealthy ones fail in many different ways.</text:p>
      <text:p text:style-name="Body_20_Text.small"><text:span text:style-name="T1">Use in SOMA:</text:span> runtime health can have a small set of stable patterns, while failure needs broader detection because it has many shapes.</text:p>
      <text:h text:style-name="Heading_20_4" text:outline-level="4">Persistence Landscape</text:h>
      <text:p text:style-name="Text_20_body">Whether a new organism survives depends on the surrounding community, resources, defenses, and timing.</text:p>
      <text:p text:style-name="Body_20_Text.small"><text:span text:style-name="T1">Use in SOMA:</text:span> predict whether a new agent, plugin, or tenant will become useful in a node instead of just checking whether it installed.</text:p>
      <text:h text:style-name="Heading_20_4" text:outline-level="4">Gut Metacommunity Theory</text:h>
      <text:p text:style-name="Text_20_body">A microbiome is shaped by selection, drift, dispersal, and local niche conditions.</text:p>
      <text:p text:style-name="Body_20_Text.small"><text:span text:style-name="T1">Use in SOMA:</text:span> treat multi-node runtime behavior as a community of local environments, not one uniform global machine.</text:p>
      <text:h text:style-name="Heading_20_4" text:outline-level="4">Common Fungal Network</text:h>
      <text:p text:style-name="Text_20_body">Different fungal guilds can create shared networks that connect plants and soil environments.</text:p>
      <text:p text:style-name="Body_20_Text.small"><text:span text:style-name="T1">Use in SOMA:</text:span> a shared bus/context substrate can connect participants without direct participant-to-participant communication.</text:p>
      <text:h text:style-name="Heading_20_4" text:outline-level="4">Common Mycorrhizal Network</text:h>
      <text:p text:style-name="Text_20_body">Plant roots can be linked through mycorrhizal hyphae, allowing indirect transfer and signaling.</text:p>
      <text:p text:style-name="Body_20_Text.small"><text:span text:style-name="T1">Use in SOMA:</text:span> agents should not directly talk; they should leave signals in a shared substrate and let routing decide who receives detail.</text:p>
      <text:h text:style-name="Heading_20_4" text:outline-level="4">Mycelial Electrical Oscillation</text:h>
      <text:p text:style-name="Text_20_body">Fungal mycelium can show rhythmic electrical behavior over long windows.</text:p>
      <text:p text:style-name="Body_20_Text.small"><text:span text:style-name="T1">Use in SOMA:</text:span> heartbeat should be more than alive/dead; rhythm, variance, and phase changes can expose stress or drift.</text:p>
      <text:h text:style-name="Heading_20_4" text:outline-level="4">Foraging Network Trait Theory</text:h>
      <text:p text:style-name="Text_20_body">Fungal strategy can be studied through network traits like branching, density, connectivity, and transport efficiency.</text:p>
      <text:p text:style-name="Body_20_Text.small"><text:span text:style-name="T1">Use in SOMA:</text:span> classify agents and nodes by measured behavioral traits instead of declared names.</text:p>
      <text:h text:style-name="Heading_20_4" text:outline-level="4">Growth-Induced Mass Flow</text:h>
      <text:p text:style-name="Text_20_body">Growing fungal networks create internal flows that move material through the network.</text:p>
      <text:p text:style-name="Body_20_Text.small"><text:span text:style-name="T1">Use in SOMA:</text:span> task and event growth should reshape context routing and resource allocation automatically.</text:p>
      <text:h text:style-name="Heading_20_4" text:outline-level="4">Stress Gradient Hypothesis In Fungal Communities</text:h>
      <text:p text:style-name="Text_20_body">Under harsher conditions, facilitation can matter more than competition.</text:p>
      <text:p text:style-name="Body_20_Text.small"><text:span text:style-name="T1">Use in SOMA:</text:span> when the runtime is stressed, route toward support, verification, and narrower scope instead of pure throughput.</text:p>
      <text:h text:style-name="Heading_20_4" text:outline-level="4">Fungal Loop Hypothesis</text:h>
      <text:p text:style-name="Text_20_body">Fungi can bridge separate moisture and resource cycles in arid ecosystems.</text:p>
      <text:p text:style-name="Body_20_Text.small"><text:span text:style-name="T1">Use in SOMA:</text:span> bridge agents or sidecars can preserve continuity across unreliable nodes, sleeping machines, or intermittent links.</text:p>
      <text:h text:style-name="Heading_20_4" text:outline-level="4">Fungal Source-Sink Dynamics</text:h>
      <text:p text:style-name="Text_20_body">Some areas produce resources while others consume or depend on them.</text:p>
      <text:p text:style-name="Body_20_Text.small"><text:span text:style-name="T1">Use in SOMA:</text:span> model nodes as source/sink roles: one machine may provide compute, another may provide tasks, another may provide verification.</text:p>
      <text:h text:style-name="Heading_20_4" text:outline-level="4">Mycorrhizal Drought-Resilience Theory</text:h>
      <text:p text:style-name="Text_20_body">Arbuscular mycorrhizal fungi support plants through water transport, osmotic adjustment, hormones, and stress buffering.</text:p>
      <text:p text:style-name="Body_20_Text.small"><text:span text:style-name="T1">Use in SOMA:</text:span> resilience should be layered: fallback routing, verifier buffering, degraded mode, cache, and human intervention.</text:p>
      <text:h text:style-name="Heading_20_4" text:outline-level="4">Fungal Functional Trait Ecology</text:h>
      <text:p text:style-name="Text_20_body">Fungi can be grouped by functional traits rather than just species identity.</text:p>
      <text:p text:style-name="Body_20_Text.small"><text:span text:style-name="T1">Use in SOMA:</text:span> define agents by verified capabilities, scope, trust, latency, and failure modes instead of broad titles.</text:p>
      <text:h text:style-name="Heading_20_4" text:outline-level="4">Piggyback-The-Winner</text:h>
      <text:p text:style-name="Text_20_body">When hosts are thriving, temperate viruses may integrate and wait instead of killing them.</text:p>
      <text:p text:style-name="Body_20_Text.small"><text:span text:style-name="T1">Use in SOMA:</text:span> stable runtime periods may favor quiet latent monitors and audit hooks over aggressive intervention.</text:p>
      <text:h text:style-name="Heading_20_4" text:outline-level="4">Viral Shunt</text:h>
      <text:p text:style-name="Text_20_body">Viruses recycle cellular material back into the microbial loop through lysis.</text:p>
      <text:p text:style-name="Body_20_Text.small"><text:span text:style-name="T1">Use in SOMA:</text:span> failed work should feed logs, verifier examples, context, and trust evidence instead of disappearing.</text:p>
      <text:h text:style-name="Heading_20_4" text:outline-level="4">Viral Shuttle</text:h>
      <text:p text:style-name="Text_20_body">Viruses can help move carbon/material toward export pathways rather than only recycling locally.</text:p>
      <text:p text:style-name="Body_20_Text.small"><text:span text:style-name="T1">Use in SOMA:</text:span> some events should be promoted from local context into durable cross-node records.</text:p>
      <text:h text:style-name="Heading_20_4" text:outline-level="4">Quasispecies Theory</text:h>
      <text:p text:style-name="Text_20_body">Viral populations behave like clouds of related variants rather than one fixed genome.</text:p>
      <text:p text:style-name="Body_20_Text.small"><text:span text:style-name="T1">Use in SOMA:</text:span> treat agent behavior and model output as a drifting distribution, with error thresholds and mutation pressure.</text:p>
      <text:h text:style-name="Heading_20_3" text:outline-level="3">Soil Microbiology Ideas</text:h>
      <text:h text:style-name="Heading_20_4" text:outline-level="4">Soil Priming Effect</text:h>
      <text:p text:style-name="Text_20_body">Adding fresh carbon can speed up or slow down decomposition of older soil organic matter.</text:p>
      <text:p text:style-name="Body_20_Text.small"><text:span text:style-name="T1">Use in SOMA:</text:span> new context can wake up old context; adding a task, plugin, or memory can accelerate useful recall or accidentally revive stale assumptions.</text:p>
      <text:h text:style-name="Heading_20_4" text:outline-level="4">Rhizosphere Priming Effect</text:h>
      <text:p text:style-name="Text_20_body">Plant roots change nearby microbial activity and decomposition through exudates and nutrient demand.</text:p>
      <text:p text:style-name="Body_20_Text.small"><text:span text:style-name="T1">Use in SOMA:</text:span> active tasks should reshape the local context aperture around them, not consume a static global context feed.</text:p>
      <text:h text:style-name="Heading_20_4" text:outline-level="4">Microbial Carbon Use Efficiency</text:h>
      <text:p text:style-name="Text_20_body">Microbes split carbon between growth and respiration.</text:p>
      <text:p text:style-name="Body_20_Text.small"><text:span text:style-name="T1">Use in SOMA:</text:span> measure how much agent work becomes durable output versus wasted heat: retries, logs, failed calls, and dead context.</text:p>
      <text:h text:style-name="Heading_20_4" text:outline-level="4">Microbial Carbon Pump</text:h>
      <text:p text:style-name="Text_20_body">Microbes transform carbon into forms that persist longer.</text:p>
      <text:p text:style-name="Body_20_Text.small"><text:span text:style-name="T1">Use in SOMA:</text:span> convert raw events into stable summaries, verified facts, trust evidence, and reusable adapters.</text:p>
      <text:h text:style-name="Heading_20_4" text:outline-level="4">Microbial Necromass Continuum</text:h>
      <text:p text:style-name="Text_20_body">Dead microbial material is not simply waste; it can become a persistent part of soil carbon.</text:p>
      <text:p text:style-name="Body_20_Text.small"><text:span text:style-name="T1">Use in SOMA:</text:span> failed tasks, rejected outputs, old plans, and abandoned branches can become training evidence and durable audit context.</text:p>
      <text:h text:style-name="Heading_20_4" text:outline-level="4">Mineral-Associated Organic Matter</text:h>
      <text:p text:style-name="Text_20_body">Organic matter can persist by binding to mineral surfaces.</text:p>
      <text:p text:style-name="Body_20_Text.small"><text:span text:style-name="T1">Use in SOMA:</text:span> important context should bind to durable anchors: task IDs, verifier signatures, node IDs, timestamps, and source evidence.</text:p>
      <text:h text:style-name="Heading_20_4" text:outline-level="4">Soil Aggregate Hierarchy</text:h>
      <text:p text:style-name="Text_20_body">Soil structure is nested: particles form microaggregates, which form larger aggregates.</text:p>
      <text:p text:style-name="Body_20_Text.small"><text:span text:style-name="T1">Use in SOMA:</text:span> build context in nested scales: event, task, workflow, agent, node, tenant, mesh.</text:p>
      <text:h text:style-name="Heading_20_4" text:outline-level="4">Soil Pore Connectivity</text:h>
      <text:p text:style-name="Text_20_body">Microbes live in tiny connected or disconnected pore spaces.</text:p>
      <text:p text:style-name="Body_20_Text.small"><text:span text:style-name="T1">Use in SOMA:</text:span> connectivity matters; two agents may be installed but effectively isolated if policy, network, trust, or subscriptions block flow.</text:p>
      <text:h text:style-name="Heading_20_4" text:outline-level="4">Microsite Heterogeneity</text:h>
      <text:p text:style-name="Text_20_body">Soil conditions vary sharply at tiny scales.</text:p>
      <text:p text:style-name="Body_20_Text.small"><text:span text:style-name="T1">Use in SOMA:</text:span> avoid global assumptions; each node, task, model, and adapter may have a different local state.</text:p>
      <text:h text:style-name="Heading_20_4" text:outline-level="4">Redox Ladder</text:h>
      <text:p text:style-name="Text_20_body">Microbial metabolism follows available electron acceptors as oxygen drops, then nitrate, manganese, iron, sulfate, and carbon dioxide.</text:p>
      <text:p text:style-name="Body_20_Text.small"><text:span text:style-name="T1">Use in SOMA:</text:span> escalation should follow ordered fallback paths instead of random retries: cheap verifier, stronger verifier, larger model, human seat.</text:p>
      <text:h text:style-name="Heading_20_4" text:outline-level="4">Anaerobic Microsites In Oxic Soil</text:h>
      <text:p text:style-name="Text_20_body">Even oxygenated soil can contain tiny oxygen-poor pockets.</text:p>
      <text:p text:style-name="Body_20_Text.small"><text:span text:style-name="T1">Use in SOMA:</text:span> a generally healthy runtime can still hide local dead zones: one adapter, queue, file lock, or node can be unhealthy.</text:p>
      <text:h text:style-name="Heading_20_4" text:outline-level="4">Nitrogen Immobilization</text:h>
      <text:p text:style-name="Text_20_body"><text:soft-page-break/>Microbes can temporarily lock nitrogen into biomass, making it unavailable to plants.</text:p>
      <text:p text:style-name="Body_20_Text.small"><text:span text:style-name="T1">Use in SOMA:</text:span> agents can absorb scarce resources without producing user-visible progress; detect busy-but-not-useful states.</text:p>
      <text:h text:style-name="Heading_20_4" text:outline-level="4">Nitrogen Mineralization</text:h>
      <text:p text:style-name="Text_20_body">Microbes convert organic nitrogen into plant-available forms.</text:p>
      <text:p text:style-name="Body_20_Text.small"><text:span text:style-name="T1">Use in SOMA:</text:span> background processors should turn raw logs and old context into usable knowledge.</text:p>
      <text:h text:style-name="Heading_20_4" text:outline-level="4">Nitrification</text:h>
      <text:p text:style-name="Text_20_body">Microbes convert ammonium to nitrate through staged oxidation.</text:p>
      <text:p text:style-name="Body_20_Text.small"><text:span text:style-name="T1">Use in SOMA:</text:span> some workflows need staged transformation, where intermediate states are not final but are necessary.</text:p>
      <text:h text:style-name="Heading_20_4" text:outline-level="4">Denitrification</text:h>
      <text:p text:style-name="Text_20_body">Microbes reduce nitrate through steps that can release nitrogen gases under low oxygen.</text:p>
      <text:p text:style-name="Body_20_Text.small"><text:span text:style-name="T1">Use in SOMA:</text:span> bad runtime conditions can leak value: retries, timeouts, partial completions, and lost context.</text:p>
      <text:h text:style-name="Heading_20_4" text:outline-level="4">Sulfur Oxidation And Reduction</text:h>
      <text:p text:style-name="Text_20_body">Sulfur microbes switch chemical states and link sulfur, carbon, and nitrogen cycles.</text:p>
      <text:p text:style-name="Body_20_Text.small"><text:span text:style-name="T1">Use in SOMA:</text:span> one subsystem can couple several resource loops; changing one policy may affect trust, cost, latency, and context quality.</text:p>
      <text:h text:style-name="Heading_20_4" text:outline-level="4">Microbial Iron Cycling</text:h>
      <text:p text:style-name="Text_20_body">Iron oxidizers and reducers alter minerals, energy flow, and soil chemistry.</text:p>
      <text:p text:style-name="Body_20_Text.small"><text:span text:style-name="T1">Use in SOMA:</text:span> infrastructure agents can change the environment itself, not just perform tasks inside it.</text:p>
      <text:h text:style-name="Heading_20_4" text:outline-level="4">Hydrogen Oxidizers As Keystone Soil Microbes</text:h>
      <text:p text:style-name="Text_20_body">Hydrogen-oxidizing microbes can act as quiet drivers of soil biogeochemistry.</text:p>
      <text:p text:style-name="Body_20_Text.small"><text:span text:style-name="T1">Use in SOMA:</text:span> small low-visibility services like heartbeat, embedding, and lease cleanup may control system stability more than flashy agents.</text:p>
      <text:h text:style-name="Heading_20_4" text:outline-level="4">Plant-Soil Feedback</text:h>
      <text:p text:style-name="Text_20_body">Plants change soil microbes, and the changed soil microbes affect future plant growth.</text:p>
      <text:p text:style-name="Body_20_Text.small"><text:span text:style-name="T1">Use in SOMA:</text:span> every agent action changes the future runtime environment through trust, context, reputation, and side effects.</text:p>
      <text:h text:style-name="Heading_20_4" text:outline-level="4">Soil Microbial Seed Bank</text:h>
      <text:p text:style-name="Text_20_body">Dormant microbes preserve diversity and can reactivate when conditions change.</text:p>
      <text:p text:style-name="Body_20_Text.small"><text:span text:style-name="T1">Use in SOMA:</text:span> keep dormant adapters, fallback agents, and archived context available without letting them consume active attention.</text:p>
      <text:h text:style-name="Heading_20_3" text:outline-level="3">Topology And Algebraic Methods</text:h>
      <text:h text:style-name="Heading_20_4" text:outline-level="4">Persistent Homology</text:h>
      <text:p text:style-name="Text_20_body">Tracks topological features — connected components, loops, voids — that appear and disappear as you zoom across scales of a dataset.</text:p>
      <text:p text:style-name="Body_20_Text.small"><text:span text:style-name="T1">Use in SOMA:</text:span> detect structural holes and anomalies in event dependency graphs, trust evidence networks, or workflow execution histories that point-based metrics miss entirely.</text:p>
      <text:h text:style-name="Heading_20_4" text:outline-level="4">Persistent Laplacian</text:h>
      <text:p text:style-name="Text_20_body">Combines spectral graph theory with persistent topology — the eigenvalues of a sequence of Laplacian matrices reveal both the shape and the connectivity of a changing structure.</text:p>
      <text:p text:style-name="Body_20_Text.small"><text:span text:style-name="T1">Use in SOMA:</text:span> multiscale spectral analysis of the bus event graph over time to find bottlenecks, isolated clusters, and topological instabilities that form before failures are visible.</text:p>
      <text:h text:style-name="Heading_20_4" text:outline-level="4">Tropical Algebra</text:h>
      <text:p text:style-name="Text_20_body">Replaces ordinary arithmetic with min-plus or max-plus semirings — addition becomes minimum, multiplication becomes addition — turning polynomial optimization into linear problems.</text:p>
      <text:p text:style-name="Body_20_Text.small"><text:span text:style-name="T1">Use in SOMA:</text:span> schedule tasks and find optimal routing paths in min-cost networks where the operations naturally fit max/min semantics; ReLU neural network analysis also lives here.</text:p>
      <text:h text:style-name="P3" text:outline-level="4">Cellular Sheaf Theory <text:span text:style-name="T2">★ </text:span><text:span text:style-name="T3">load-bearing</text:span></text:h>
      <text:p text:style-name="Text_20_body">Assigns data to every node and edge of a network with consistency conditions — a sheaf "section" is a globally consistent assignment; cohomology measures how far the network is from agreement.</text:p>
      <text:p text:style-name="Body_20_Text.small"><text:span text:style-name="T1">Use in SOMA:</text:span> detect inconsistency between what different nodes believe about shared state — trust levels, workflow status, event counts — and quantify the degree of disagreement before it causes splits.</text:p>
      <text:h text:style-name="Heading_20_4" text:outline-level="4">Discrete Morse Theory</text:h>
      <text:p text:style-name="Text_20_body">Simplifies a cell complex (graph, mesh, topology) by canceling non-critical pairs, collapsing structure down to only the essential topological features.</text:p>
      <text:p text:style-name="Body_20_Text.small"><text:span text:style-name="T1">Use in SOMA:</text:span> compress large event graphs and dependency trees down to their critical skeleton — the minimum structure needed to preserve routing, causality, and failure paths.</text:p>
      <text:h text:style-name="Heading_20_4" text:outline-level="4">Formal Concept Analysis</text:h>
      <text:p text:style-name="Text_20_body">Builds a lattice of concepts from a binary relation between objects and attributes — every concept is a maximal set of objects sharing a maximal set of attributes.</text:p>
      <text:p text:style-name="Body_20_Text.small"><text:span text:style-name="T1">Use in SOMA:</text:span> discover the minimal capability signatures that define agent classes — which precise combinations of verified capabilities predict success on which task types.</text:p>
      <text:h text:style-name="Heading_20_4" text:outline-level="4">Matroid Theory</text:h>
      <text:p text:style-name="Text_20_body">An independence system generalizing linear independence to combinatorial settings — a matroid tells you which subsets of elements are "independent" with consistent exchange properties.</text:p>
      <text:p text:style-name="Body_20_Text.small"><text:span text:style-name="T1">Use in SOMA:</text:span> model which combinations of agent capabilities are genuinely independent versus redundant; matroid intersection gives the maximum common independent set across two different capability constraints simultaneously.</text:p>
      <text:h text:style-name="Heading_20_3" text:outline-level="3">Information, Process, And Population Theory</text:h>
      <text:h text:style-name="Heading_20_4" text:outline-level="4">Koopman Operator Theory</text:h>
      <text:p text:style-name="Text_20_body">Nonlinear dynamical systems can be lifted into an infinite-dimensional linear operator acting on observable functions — making nonlinear dynamics globally linear in the right space.</text:p>
      <text:p text:style-name="Body_20_Text.small"><text:span text:style-name="T1">Use in SOMA:</text:span> linearize trust evolution, workflow state machines, and agent behavioral dynamics so that global long-run predictions become eigenvalue problems instead of nonlinear simulations.</text:p>
      <text:h text:style-name="P3" text:outline-level="4">Active Inference / Free Energy Principle <text:span text:style-name="T2">★ </text:span><text:span text:style-name="T3">load-bearing</text:span></text:h>
      <text:p text:style-name="Text_20_body">Agents minimize variational free energy — a bound on surprise — by updating beliefs to match observations or by acting to make observations match beliefs.</text:p>
      <text:p text:style-name="Body_20_Text.small"><text:span text:style-name="T1">Use in SOMA:</text:span> an agent should bias action toward outcomes that reduce surprise; uncertainty-aware decisions come from minimizing expected free energy, not just maximizing expected reward.</text:p>
      <text:h text:style-name="Heading_20_4" text:outline-level="4">Path Signature Transform</text:h>
      <text:p text:style-name="Text_20_body">The signature of a path is the ordered collection of its iterated integrals — a compact, fixed-size feature vector that uniquely encodes the shape of any trajectory regardless of speed or parameterization.</text:p>
      <text:p text:style-name="Body_20_Text.small"><text:span text:style-name="T1">Use in SOMA:</text:span> fingerprint agent behavioral trajectories — sequences of trust evidence, task durations, escalation patterns — for anomaly detection, similarity search, and behavioral drift without losing order information.</text:p>
      <text:h text:style-name="P3" text:outline-level="4">Optimal Transport / Wasserstein Distance <text:span text:style-name="T2">★ </text:span><text:span text:style-name="T3">load-bearing</text:span></text:h>
      <text:p text:style-name="Text_20_body">Measures the minimum cost to move one probability distribution into another — the Earth Mover's Distance — giving a geometrically meaningful metric between distributions.</text:p>
      <text:p text:style-name="Body_20_Text.small"><text:span text:style-name="T1">Use in SOMA:</text:span> measure distributional drift in trust score populations, workflow output distributions, or node latency profiles over time; detect when the current distribution has shifted far from a known-good baseline.</text:p>
      <text:h text:style-name="Heading_20_4" text:outline-level="4">Mean Field Games</text:h>
      <text:p text:style-name="Text_20_body">When a population of agents is large enough, each individual optimizes against the average behavior of the population — individual game theory collapses to a fixed-point problem over the population distribution.</text:p>
      <text:p text:style-name="Body_20_Text.small"><text:span text:style-name="T1">Use in SOMA:</text:span> model large-scale agent resource allocation where per-agent coordination is infeasible; equilibrium emerges from each agent optimizing against the observed aggregate, not against every individual peer.</text:p>
      <text:h text:style-name="P3" text:outline-level="4">Causal Emergence <text:span text:style-name="T2">★ </text:span><text:span text:style-name="T3">load-bearing</text:span></text:h>
      <text:p text:style-name="Text_20_body">When a coarse-grained macroscale description has strictly more effective information than any microscale description, the macro level is causally emergent — more is genuinely different.</text:p>
      <text:p text:style-name="Body_20_Text.small"><text:span text:style-name="T1">Use in SOMA:</text:span> measure whether tenant-level abstractions have more predictive causal power than agent-level descriptions; if yes, policy decisions belong at the tenant level, not the agent level.</text:p>
      <text:h text:style-name="Heading_20_4" text:outline-level="4">Hypergraph Dynamics</text:h>
      <text:p text:style-name="Text_20_body">Hyperedges connect more than two nodes at once — group interactions, not just pairwise — and the dynamics of synchronization, spreading, and failure differ fundamentally from ordinary graphs.</text:p>
      <text:p text:style-name="Body_20_Text.small"><text:span text:style-name="T1">Use in SOMA:</text:span> model multi-agent task dependencies where three or more agents must coordinate simultaneously; group-level trust thresholds, quorum conditions, and cascade failures follow hypergraph topology not pairwise topology.</text:p>
      <text:h text:style-name="Heading_20_4" text:outline-level="4">Ultrametric Spaces</text:h>
      <text:p text:style-name="Text_20_body">A metric space where the triangle inequality is strengthened to: distance(A,C) ≤ max(distance(A,B), distance(B,C)) — when the data fits, it creates a clean hierarchy with strongly nested clusters.</text:p>
      <text:p text:style-name="Body_20_Text.small"><text:span text:style-name="T1">Use in SOMA:</text:span> hierarchical clustering of failure modes when nested structure is real; useful for taxonomies, routing trees, and coarse-to-fine diagnosis, but real failure signatures may only approximately fit an ultrametric.</text:p>
      <text:h text:style-name="Heading_20_4" text:outline-level="4">Freidlin-Wentzell Large Deviation Theory</text:h>
      <text:p text:style-name="Text_20_body">In a noisy dynamical system, the probability of a rare escape from a stable state is dominated by a single "instanton" path — the minimum-action trajectory — which can be computed as a variational problem.</text:p>
      <text:p text:style-name="Body_20_Text.small"><text:span text:style-name="T1">Use in SOMA:</text:span> calculate the most likely path to catastrophic failure — trust collapse, mesh partition, workflow deadlock — before it happens; the instanton reveals which sequence of small events leads to the rare bad outcome.</text:p>
      <text:h text:style-name="Heading_20_4" text:outline-level="4">Stochastic Thermodynamics / Jarzynski Equality</text:h>
      <text:p text:style-name="Text_20_body">The Jarzynski equality and Crooks fluctuation theorem generalize the second law to small nonequilibrium systems — free energy differences can be recovered exactly from work measurements along irreversible paths.</text:p>
      <text:p text:style-name="Body_20_Text.small"><text:span text:style-name="T1">Use in SOMA:</text:span> treat entropy production as an analogy for wasted work in agent decision sequences — repeated retries, churn, and irreversible branching can signal disorder, while calmer near-equilibrium behavior can indicate efficient control.</text:p>
      <text:h text:style-name="Heading_20_4" text:outline-level="4">Process Algebra / Pi-Calculus</text:h>
      <text:p text:style-name="Text_20_body">A formal algebra of concurrent communicating processes where channels are first-class and can be passed as messages — mobility of communication structure is native.</text:p>
      <text:p text:style-name="Body_20_Text.small"><text:span text:style-name="T1">Use in SOMA:</text:span> formally specify agent interaction protocols and mechanically verify deadlock-freedom, liveness, and absence of backchannels; the no-direct-agent-communication invariant is a process algebra safety property.</text:p>
      <text:h text:style-name="Heading_20_4" text:outline-level="4">Spectral Gap</text:h>
      <text:p text:style-name="Text_20_body">The difference between the largest and second-largest eigenvalue of a graph's adjacency or Laplacian matrix — large spectral gap means fast mixing, high connectivity, and robustness to node removal.</text:p>
      <text:p text:style-name="Body_20_Text.small"><text:span text:style-name="T1">Use in SOMA:</text:span> measure mesh topology health — a large spectral gap means the agent/node mesh is well-connected and resilient; a shrinking gap warns of emerging partitions before they become splits.</text:p>
      <text:h text:style-name="Heading_20_4" text:outline-level="4">Algorithmic Information Theory / Kolmogorov Complexity</text:h>
      <text:p text:style-name="Text_20_body">The Kolmogorov complexity of a string is the length of the shortest program that produces it — the true irreducible information content, approximated in practice by compression ratio.</text:p>
      <text:p text:style-name="Body_20_Text.small"><text:span text:style-name="T1">Use in SOMA:</text:span> measure the genuine complexity of agent outputs, workflow traces, and context summaries — a low compression ratio signals high information density; a high ratio signals padding, repetition, or low-value work.</text:p>
      <text:h text:style-name="Heading_20_3" text:outline-level="3">Combinatorics And Number Theory</text:h>
      <text:h text:style-name="Heading_20_4" text:outline-level="4">Ramsey Theory</text:h>
      <text:p text:style-name="Text_20_body">In any large enough structure, a certain pattern is unavoidable — complete disorder cannot persist past a threshold size.</text:p>
      <text:p text:style-name="Body_20_Text.small"><text:span text:style-name="T1">Use in SOMA:</text:span> prove that any sufficiently large dataset, graph, or event log must contain some structure; set minimum sizes that guarantee useful properties appear; find noise floors below which patterns are meaningless.</text:p>
      <text:h text:style-name="Heading_20_4" text:outline-level="4">Turán's Theorem / Extremal Graph Theory</text:h>
      <text:p text:style-name="Text_20_body">The maximum number of edges a graph can have without containing a particular forbidden subgraph is exactly calculable — above that density the forbidden pattern must exist.</text:p>
      <text:p text:style-name="Body_20_Text.small"><text:span text:style-name="T1">Use in SOMA:</text:span> find the interaction density at which certain behaviors become unavoidable in a network; set hard thresholds for when a system transitions from sparse and safe to dense and risky.</text:p>
      <text:h text:style-name="Heading_20_4" text:outline-level="4">Sprague-Grundy Theory</text:h>
      <text:p text:style-name="Text_20_body">Every finite impartial combinatorial game under normal play is equivalent to a single pile of Nim — the game position has a Grundy value.</text:p>
      <text:p text:style-name="Body_20_Text.small"><text:span text:style-name="T1">Use in SOMA:</text:span> analyze bounded adversarial or resource games when the rules fit impartial-game assumptions; independent sub-games combine by XOR of Grundy values, but computing those values can still require exploring the game structure.</text:p>
      <text:h text:style-name="Heading_20_4" text:outline-level="4">P-adic Metric</text:h>
      <text:p text:style-name="Text_20_body">An alternative distance on numbers where closeness is determined by how many times a prime p divides the difference — numbers that share a common high-power factor are close, regardless of size.</text:p>
      <text:p text:style-name="Body_20_Text.small"><text:span text:style-name="T1">Use in SOMA:</text:span> natural metric for any data with hierarchical branching structure; clustering where subtree membership matters more than linear distance; taxonomy, routing trees, and nested classification all fit better in p-adic geometry than Euclidean.</text:p>
      <text:h text:style-name="Heading_20_4" text:outline-level="4">Q-Analogs / Quantum Calculus</text:h>
      <text:p text:style-name="Text_20_body">Every standard mathematical structure has a q-deformed version parameterized by q — as q → 1 you recover the classical object, but at other q values you get weighted counting, deformed factorials, and interpolation between discrete and continuous.</text:p>
      <text:p text:style-name="Body_20_Text.small"><text:span text:style-name="T1">Use in SOMA:</text:span> build models that smoothly interpolate between counting (discrete) and measuring (continuous); weighted versions of binomial coefficients count objects with preferences; q-derivatives handle non-uniform grids without special-casing.</text:p>
      <text:h text:style-name="Heading_20_3" text:outline-level="3">Geometry And Symmetry</text:h>
      <text:h text:style-name="Heading_20_4" text:outline-level="4">Power Diagrams / Weighted Voronoi Tessellation</text:h>
      <text:p text:style-name="Text_20_body">A generalization of Voronoi diagrams where each seed has a weight — the region assigned to each seed is the set of points where the power distance (not just Euclidean) is smallest.</text:p>
      <text:p text:style-name="Body_20_Text.small"><text:span text:style-name="T1">Use in SOMA:</text:span> partition any feature or resource space into territories that reflect different influence radii or capacities; load balancing, market territory assignment, and spatial indexing where seeds have different strengths.</text:p>
      <text:h text:style-name="Heading_20_4" text:outline-level="4">Winding Number / Topological Degree</text:h>
      <text:p text:style-name="Text_20_body">Counts how many times a closed curve wraps around a point — a topological invariant that does not change under continuous deformation.</text:p>
      <text:p text:style-name="Body_20_Text.small"><text:span text:style-name="T1">Use in SOMA:</text:span> detect whether a process has completed a full cycle or is stuck in a loop; determine whether a value is inside or outside a boundary; classify the topology of feedback loops and detect sign changes without floating-point fragility.</text:p>
      <text:h text:style-name="Heading_20_4" text:outline-level="4">Lie Groups / Lie Algebras</text:h>
      <text:p text:style-name="Text_20_body">Continuous symmetry groups where group operations are smooth — every symmetry of a physical or computational system that can be continuously varied belongs here; the Lie algebra is the linearized version near the identity.</text:p>
      <text:p text:style-name="Body_20_Text.small"><text:span text:style-name="T1">Use in SOMA:</text:span> represent and compose rotations, scalings, and transformations without gimbal lock or coordinate singularities; optimize over curved parameter spaces (manifold optimization) where standard gradient descent breaks; detect symmetry in data.</text:p>
      <text:h text:style-name="Heading_20_4" text:outline-level="4">Symbolic Dynamics</text:h>
      <text:p text:style-name="Text_20_body">Encodes the trajectories of a dynamical system as infinite sequences over a finite alphabet by assigning a symbol to each region of the state space — turning continuous behavior into discrete strings.</text:p>
      <text:p text:style-name="Body_20_Text.small"><text:span text:style-name="T1">Use in SOMA:</text:span> represent any time-evolving system as a string and apply all of string theory to it — compression, search, grammar inference, entropy estimation; detect recurring patterns in agent behavior, market states, or sensor readings.</text:p>
      <text:h text:style-name="Heading_20_4" text:outline-level="4">Information Geometry</text:h>
      <text:p text:style-name="Text_20_body">Equips the space of probability distributions with a Riemannian metric derived from the Fisher information matrix — distributions are points and the geometry captures how distinguishable they are.</text:p>
      <text:p text:style-name="Body_20_Text.small"><text:span text:style-name="T1">Use in SOMA:</text:span> measure the true statistical distance between two models, not just their outputs; natural gradient descent follows this geometry and converges faster; detect when a learned model has drifted in the space of possible distributions.</text:p>
      <text:h text:style-name="Heading_20_3" text:outline-level="3">Probability And Distributions</text:h>
      <text:h text:style-name="Heading_20_4" text:outline-level="4">Tsallis Non-Extensive Entropy</text:h>
      <text:p text:style-name="Text_20_body">A generalization of Shannon entropy that uses a parameter q to handle systems with long-range correlations, fractal geometry, or power-law distributions — standard entropy is the special case q = 1.</text:p>
      <text:p text:style-name="Body_20_Text.small"><text:span text:style-name="T1">Use in SOMA:</text:span> measure disorder in any system that does not follow exponential statistics; network traffic, financial returns, and biological populations all follow power laws where Tsallis entropy captures the true information content that Shannon misses.</text:p>
      <text:h text:style-name="Heading_20_4" text:outline-level="4">Lévy Flights / α-Stable Distributions</text:h>
      <text:p text:style-name="Text_20_body">Random walks where step sizes follow a power-law distribution — occasional enormous jumps mixed with local exploration; the mathematics of optimal foraging in patchy environments.</text:p>
      <text:p text:style-name="Body_20_Text.small"><text:span text:style-name="T1">Use in SOMA:</text:span> model any search, diffusion, or exploration process with heavy tails; design search strategies that escape local optima better than Gaussian random walks; detect anomalies by identifying jumps too large for any Gaussian model.</text:p>
      <text:h text:style-name="Heading_20_4" text:outline-level="4">Stochastic Dominance</text:h>
      <text:p text:style-name="Text_20_body">Distribution A stochastically dominates distribution B if it produces better outcomes across all possible utility functions of a given class — a decision criterion that does not require knowing exact values.</text:p>
      <text:p text:style-name="Body_20_Text.small"><text:span text:style-name="T1">Use in SOMA:</text:span> compare strategies, models, or outputs robustly when exact distributions are unknown; prove one option is universally better without committing to a specific loss function; rank uncertain choices without assuming utility.</text:p>
      <text:h text:style-name="Heading_20_4" text:outline-level="4">Free Probability Theory</text:h>
      <text:p text:style-name="Text_20_body">A non-commutative probability theory for random variables that do not commute — captures the statistics of large random matrices and quantum observables where order of operations matters.</text:p>
      <text:p text:style-name="Body_20_Text.small"><text:span text:style-name="T1">Use in SOMA:</text:span> analyze the spectrum of large random matrices arising in data; model systems where AB ≠ BA naturally (sequential operations, quantum states, non-commuting transformations); predict eigenvalue distributions without full matrix computation.</text:p>
      <text:h text:style-name="Heading_20_4" text:outline-level="4">Ergodic Theory</text:h>
      <text:p text:style-name="Text_20_body">In an ergodic system the time average of any observable along a single long trajectory equals its average over the entire state space — one trajectory eventually visits everywhere.</text:p>
      <text:p text:style-name="Body_20_Text.small"><text:span text:style-name="T1">Use in SOMA:</text:span> verify that sampling a single long run gives reliable population statistics; design sampling strategies that guarantee coverage; detect non-ergodic systems (systems with traps, absorbing states, or phase separation) before drawing false conclusions from single trajectories.</text:p>
      <text:h text:style-name="Heading_20_3" text:outline-level="3">Structures And Transformations</text:h>
      <text:h text:style-name="Heading_20_4" text:outline-level="4">Tensor Networks</text:h>
      <text:p text:style-name="Text_20_body">A high-dimensional array is factored into a network of smaller tensors connected by shared indices — contraction along shared indices compresses exponential state spaces into polynomial representations.</text:p>
      <text:p text:style-name="Body_20_Text.small"><text:soft-page-break/><text:span text:style-name="T1">Use in SOMA:</text:span> compress and manipulate high-dimensional joint distributions, correlation structures, and feature spaces that would be intractable as full arrays; approximate any function of many variables as a network of small local functions.</text:p>
      <text:h text:style-name="Heading_20_4" text:outline-level="4">Functors / Category Theory</text:h>
      <text:p text:style-name="Text_20_body">A functor is a structure-preserving map between categories — it translates objects and arrows from one mathematical world to another while keeping all relationships intact.</text:p>
      <text:p text:style-name="Body_20_Text.small"><text:span text:style-name="T1">Use in SOMA:</text:span> formally define what it means for two systems to be the same up to relabeling; compose data pipelines that are guaranteed to preserve invariants; design interfaces between systems where the composition law is provably correct.</text:p>
      <text:h text:style-name="Heading_20_4" text:outline-level="4">Rough Set Theory</text:h>
      <text:p text:style-name="Text_20_body">Approximates any concept using only indiscernibility — objects that look identical given available attributes are in the same equivalence class, giving a lower and upper approximation of any set.</text:p>
      <text:p text:style-name="Body_20_Text.small"><text:span text:style-name="T1">Use in SOMA:</text:span> make decisions when attribute data is incomplete without assuming any probability model; discover which attributes are actually necessary for a classification; find minimal rule sets that explain observed distinctions.</text:p>
      <text:h text:style-name="Heading_20_4" text:outline-level="4">Interval Arithmetic / Affine Arithmetic</text:h>
      <text:p text:style-name="Text_20_body">Replaces scalar values with intervals and propagates guaranteed bounds through every computation — the result is always proven to contain the true value regardless of rounding or input uncertainty.</text:p>
      <text:p text:style-name="Body_20_Text.small"><text:span text:style-name="T1">Use in SOMA:</text:span> propagate uncertainty rigorously through any pipeline; prove that a computed threshold is definitely exceeded or definitely not; replace fragile floating-point comparisons with guaranteed containment checks.</text:p>
      <text:h text:style-name="Heading_20_4" text:outline-level="4">Turing Reaction-Diffusion</text:h>
      <text:p text:style-name="Text_20_body">Two chemical species — an activator and an inhibitor — react and diffuse at different rates; from a uniform initial state, spatial patterns spontaneously emerge without any external template.</text:p>
      <text:p text:style-name="Body_20_Text.small"><text:span text:style-name="T1">Use in SOMA:</text:span> generate procedural patterns, textures, or spatial zone assignments that look organic; model any two competing signals that spread at different speeds; understand why local excitation plus long-range inhibition always produces stripes or spots.</text:p>
      <text:h text:style-name="Heading_20_3" text:outline-level="3">Off-The-Wall: Combinatorics And Sequences</text:h>
      <text:h text:style-name="Heading_20_4" text:outline-level="4">Abelian Sandpile / Self-Organized Criticality</text:h>
      <text:p text:style-name="Text_20_body">Add grains to a grid one at a time — when any cell exceeds a threshold it topples, redistributing to neighbors, which may trigger further topplings; the system naturally settles at a critical state with no tuning required.</text:p>
      <text:p text:style-name="Body_20_Text.small"><text:span text:style-name="T1">Use in SOMA:</text:span> model any system where small additions cause unpredictable cascade sizes; the size distribution of avalanches follows a power law; you never need to set a "critical point" parameter — the system finds it itself.</text:p>
      <text:h text:style-name="Heading_20_4" text:outline-level="4">De Bruijn Sequences</text:h>
      <text:p text:style-name="Text_20_body">A cyclic string of length k^n over an alphabet of k symbols where every possible substring of length n appears exactly once — the most compact possible coverage of all n-grams.</text:p>
      <text:p text:style-name="Body_20_Text.small"><text:span text:style-name="T1">Use in SOMA:</text:span> generate minimal test sequences that touch every possible state window exactly once; brute-force PIN locks using a sliding window; produce maximally non-redundant probes, keys, or coverage patterns.</text:p>
      <text:h text:style-name="Heading_20_4" text:outline-level="4">Parking Functions</text:h>
      <text:p text:style-name="Text_20_body">An arrangement of n cars that successfully park on a one-way street with n spaces — the count is exactly (n+1)^(n-1) and they are in bijection with labeled rooted forests and spanning trees of complete graphs.</text:p>
      <text:p text:style-name="Body_20_Text.small"><text:span text:style-name="T1">Use in SOMA:</text:span> model any sequential first-come allocation where overflow fails gracefully; analyze hash table open-addressing collision behavior; the connection to spanning trees means parking function statistics directly describe random graph structure.</text:p>
      <text:h text:style-name="Heading_20_4" text:outline-level="4">Lyndon Words</text:h>
      <text:p text:style-name="Text_20_body">The lexicographically smallest rotation of its equivalence class of cyclic strings — every string factors uniquely into non-increasing Lyndon words (the Chen-Fox-Lyndon theorem).</text:p>
      <text:p text:style-name="Body_20_Text.small"><text:span text:style-name="T1">Use in SOMA:</text:span> canonical form for any cyclic or rotationally equivalent structure; efficient string indexing and suffix array construction; detecting when two configurations are rotations of each other without trying all rotations.</text:p>
      <text:h text:style-name="Heading_20_4" text:outline-level="4">Umbral Calculus</text:h>
      <text:p text:style-name="Text_20_body">A formal algebra of "shadows" where replacing subscripts with exponents in polynomial sequences transforms one valid identity into another — Bernoulli numbers, Euler numbers, and Stirling numbers all live here.</text:p>
      <text:p text:style-name="Body_20_Text.small"><text:span text:style-name="T1">Use in SOMA:</text:span> systematically generate and transform recurrence relations, generating functions, and combinatorial identities by substitution alone; derive new polynomial identities from old ones without separate proofs; manipulate special functions algebraically.</text:p>
      <text:h text:style-name="Heading_20_3" text:outline-level="3">Off-The-Wall: Topology And Knots</text:h>
      <text:h text:style-name="Heading_20_4" text:outline-level="4">Knot Theory / Jones Polynomial</text:h>
      <text:p text:style-name="Text_20_body">A knot is a closed loop in three-dimensional space; the Jones polynomial is an algebraic invariant that distinguishes many knots that look different but cannot be deformed into each other.</text:p>
      <text:p text:style-name="Body_20_Text.small"><text:span text:style-name="T1">Use in SOMA:</text:span> classify tangled structures when execution traces or dependencies have a meaningful embedding, braid, or loop representation; otherwise ordinary graph invariants are usually the better first tool.</text:p>
      <text:h text:style-name="Heading_20_4" text:outline-level="4">Braid Theory</text:h>
      <text:p text:style-name="Text_20_body">Braids are equivalence classes of n strands that interleave through space — they form a group under concatenation, and the word problem (are two braids equal?) is efficiently solvable.</text:p>
      <text:p text:style-name="Body_20_Text.small"><text:span text:style-name="T1">Use in SOMA:</text:span> encode concurrent process interleavings as braid words and detect when two execution schedules are equivalent. Braid groups have been explored for cryptography, but many proposed schemes have been attacked, so treat that as historical context rather than a security guarantee.</text:p>
      <text:h text:style-name="Heading_20_4" text:outline-level="4">Sperner's Lemma</text:h>
      <text:p text:style-name="Text_20_body">If you triangulate a simplex and color each vertex with one of three colors following a boundary rule, at least one triangle must have all three colors — guaranteed by topology alone.</text:p>
      <text:p text:style-name="Body_20_Text.small"><text:span text:style-name="T1">Use in SOMA:</text:span> prove that any iterative search or negotiation procedure must produce a fixed point; any resource allocation with complementary constraints must have a balanced assignment; constructive fixed-point proofs in discrete settings.</text:p>
      <text:h text:style-name="Heading_20_4" text:outline-level="4">Stone Duality</text:h>
      <text:p text:style-name="Text_20_body">There is a perfect correspondence between topological spaces and Boolean algebras — every Boolean algebra is the algebra of clopen sets of some compact totally disconnected space, and vice versa.</text:p>
      <text:p text:style-name="Body_20_Text.small"><text:span text:style-name="T1">Use in SOMA:</text:span> translate between a logical description of a system (Boolean formulas) and its spatial/topological structure automatically; any time you have a set of propositions you implicitly have a topological space you can analyze geometrically.</text:p>
      <text:h text:style-name="Heading_20_4" text:outline-level="4">Arctic Circle Phenomenon</text:h>
      <text:p text:style-name="Text_20_body">When you randomly tile a large region with dominoes, the interior is chaotic but the corners freeze into perfect deterministic order — the boundary between order and disorder is an exact circle or ellipse.</text:p>
      <text:p text:style-name="Body_20_Text.small"><text:span text:style-name="T1">Use in SOMA:</text:span> predict where structured behavior ends and chaotic behavior begins in any large constrained system; the geometry of the frozen region reveals the global constraint structure without examining individual elements.</text:p>
      <text:h text:style-name="Heading_20_3" text:outline-level="3">Off-The-Wall: Physics-Adjacent Math</text:h>
      <text:h text:style-name="Heading_20_4" text:outline-level="4">Asymmetric Simple Exclusion Process (ASEP)</text:h>
      <text:p text:style-name="Text_20_body">Particles hop left or right on a one-dimensional lattice with hard-core exclusion — no two particles can occupy the same site — and the steady state is exactly solvable via matrix product ansatz.</text:p>
      <text:p text:style-name="Body_20_Text.small"><text:span text:style-name="T1">Use in SOMA:</text:span> model task pipelines, packet routing, or any flow where items cannot overtake each other; the exact solution gives throughput, density profiles, and jamming transitions without simulation; connected to KPZ universality and random matrix theory.</text:p>
      <text:h text:style-name="Heading_20_4" text:outline-level="4">Tracy-Widom Distribution</text:h>
      <text:p text:style-name="Text_20_body">The probability distribution of the largest eigenvalue of a large random matrix — it appears universally at the edge of phase transitions in random matrices, random permutations, interacting particle systems, and growth processes.</text:p>
      <text:p text:style-name="Body_20_Text.small"><text:span text:style-name="T1">Use in SOMA:</text:span> detect when a system is at the boundary of a phase transition; the TW distribution is to the edge of chaos what the Gaussian is to bulk averages; test whether observed extremes are consistent with a random baseline.</text:p>
      <text:h text:style-name="Heading_20_4" text:outline-level="4">Wang Tiles / Aperiodic Tiling</text:h>
      <text:p text:style-name="Text_20_body">Square tiles with colored edges tile the plane with matching constraints — some sets of Wang tiles can only tile aperiodically, never repeating; the tiling problem is undecidable in general and Turing-complete.</text:p>
      <text:p text:style-name="Body_20_Text.small"><text:span text:style-name="T1">Use in SOMA:</text:span> generate infinite non-repeating patterns from a finite rule set; seed cryptographic or test data that provably never repeats; simulate computation using only spatial tiling rules.</text:p>
      <text:h text:style-name="Heading_20_4" text:outline-level="4">Lindström-Gessel-Viennot Lemma</text:h>
      <text:p text:style-name="Text_20_body">The number of families of non-intersecting lattice paths between two sets of points is given by the determinant of a matrix of individual path counts.</text:p>
      <text:p text:style-name="Body_20_Text.small"><text:span text:style-name="T1">Use in SOMA:</text:span> count simultaneous non-interfering process executions; compute probabilities that independent agents complete their tasks without collision; any problem involving non-crossing matchings, schedules, or trajectories reduces to a determinant.</text:p>
      <text:h text:style-name="Heading_20_4" text:outline-level="4">Chromatic Polynomial</text:h>
      <text:p text:style-name="Text_20_body">For any graph, there is a polynomial in k whose value at k gives the number of proper k-colorings — the polynomial encodes deep structure of the graph, and its roots (chromatic roots) reveal phase transition behavior.</text:p>
      <text:p text:style-name="Body_20_Text.small"><text:span text:style-name="T1">Use in SOMA:</text:span> count valid constraint assignments; detect graph structure from the polynomial's coefficients; the real and complex roots of chromatic polynomials predict where constraint satisfaction problems undergo phase transitions.</text:p>
      <text:h text:style-name="Heading_20_3" text:outline-level="3">Off-The-Wall: Infinite And Structural Math</text:h>
      <text:h text:style-name="Heading_20_4" text:outline-level="4">Ordinal Arithmetic</text:h>
      <text:p text:style-name="Text_20_body">Extends arithmetic past infinity — ω (first infinite ordinal), ω², ω^ω, ε₀ (fixed point of exponentiation) — forming a well-ordered hierarchy used to prove program termination.</text:p>
      <text:p text:style-name="Body_20_Text.small"><text:span text:style-name="T1">Use in SOMA:</text:span> assign a proof-theoretic ordinal to any recursive algorithm to guarantee it terminates; Goodstein sequences grow faster than any computable function but always reach zero — this is only provable by descending through ordinals; industrial theorem provers at AMD and IBM use ordinals to verify hardware.</text:p>
      <text:h text:style-name="Heading_20_4" text:outline-level="4">Non-Standard Analysis / Hyperreals</text:h>
      <text:p text:style-name="Text_20_body">Abraham Robinson's construction gives a rigorous number system with actual infinitesimals ε and infinite numbers H that satisfy every first-order property of the reals — not just limits but real computable objects.</text:p>
      <text:p text:style-name="Body_20_Text.small"><text:span text:style-name="T1">Use in SOMA:</text:span> compute derivatives as literal ratios ε/ε instead of limits; implement automatic differentiation using dual numbers (a special case); prove continuity and differentiability algorithmically by checking infinitesimal conditions rather than epsilon-delta arguments.</text:p>
      <text:h text:style-name="Heading_20_4" text:outline-level="4">Combinatorial Species</text:h>
      <text:p text:style-name="Text_20_body">A species is a functor from finite sets to finite sets — it assigns to every finite set of labels the set of structures of that type on those labels, and generates a formal power series automatically.</text:p>
      <text:p text:style-name="Body_20_Text.small"><text:span text:style-name="T1">Use in SOMA:</text:span> any recursive data structure — trees, lists, graphs, permutations — is a species, and its generating function drops out automatically from the structural definition without separate counting arguments; derive enumeration formulas from code by reading the type definition.</text:p>
      <text:h text:style-name="Heading_20_4" text:outline-level="4">Ramanujan Graphs</text:h>
      <text:p text:style-name="Text_20_body">Explicitly constructed sparse graphs that achieve the theoretical maximum spectral gap for their degree — named after the Ramanujan conjecture on modular forms that underpins their construction.</text:p>
      <text:p text:style-name="Body_20_Text.small"><text:span text:style-name="T1">Use in SOMA:</text:span> design maximally robust sparse network topologies that are as hard to partition as theoretically possible; any mesh, p2p overlay, or routing graph can be benchmarked against Ramanujan optimality; the construction uses deep number theory but the output is just a graph.</text:p>
      <text:h text:style-name="Heading_20_4" text:outline-level="4">Finite Geometry / Projective Planes Over Finite Fields</text:h>
      <text:p text:style-name="Text_20_body">Geometry over a finite field GF(q) — projective planes where every two lines meet in exactly one point and every two points determine exactly one line; perfectly balanced combinatorial designs.</text:p>
      <text:p text:style-name="Body_20_Text.small"><text:span text:style-name="T1">Use in SOMA:</text:span> construct round-robin tournament schedules where every pair meets exactly once; design error-correcting codes with optimal parameters; build hash functions and random access structures with provable uniformity; the 7-point Fano plane is the smallest example.</text:p>
      <text:h text:style-name="Heading_20_3" text:outline-level="3">Geology</text:h>
      <text:h text:style-name="Heading_20_4" text:outline-level="4">Gutenberg-Richter Law</text:h>
      <text:p text:style-name="Text_20_body">Earthquake frequency and magnitude follow a power law: for every unit increase in magnitude there are roughly ten times fewer earthquakes — a universal scaling relationship observed across every tectonic setting on earth.</text:p>
      <text:p text:style-name="Body_20_Text.small"><text:span text:style-name="T1">Use in SOMA:</text:span> estimate the probability of rare large events from the observed rate of small ones; any system that produces events of varying magnitude — errors, outages, transactions, security incidents — can be fit to this law and used to predict the tail.</text:p>
      <text:h text:style-name="Heading_20_4" text:outline-level="4">Omori-Utsu Law</text:h>
      <text:p text:style-name="Text_20_body">After a mainshock, aftershock rate decays as 1/(c+t)^p — a power law in time, where p is typically close to 1 and c is a small delay constant.</text:p>
      <text:p text:style-name="Body_20_Text.small"><text:span text:style-name="T1">Use in SOMA:</text:span> model any burst of activity that decays after a trigger event; incident responses, social media cascades, request storms, and error floods all decay with this shape; fit p and c from early observations to predict when the burst will subside.</text:p>
      <text:h text:style-name="Heading_20_4" text:outline-level="4">Hurst Exponent</text:h>
      <text:p text:style-name="Text_20_body">Measures long-range memory in a time series using rescaled range analysis — H &gt; 0.5 means the series trends persistently, H &lt; 0.5 means it mean-reverts, and H = 0.5 is a pure random walk.</text:p>
      <text:p text:style-name="Body_20_Text.small"><text:span text:style-name="T1">Use in SOMA:</text:span> compute from any time series to determine whether past values predict future direction; detect if a metric is drifting, oscillating, or wandering; distinguish genuine trends from noise before committing to a response.</text:p>
      <text:h text:style-name="Heading_20_4" text:outline-level="4">Mohr-Coulomb Failure Criterion</text:h>
      <text:p text:style-name="Text_20_body">A material fails by shear when stress on a plane exceeds a linear function of the normal stress acting across it — failure is defined not by a single threshold but by the relationship between two coupled stress components.</text:p>
      <text:p text:style-name="Body_20_Text.small"><text:span text:style-name="T1">Use in SOMA:</text:span> model any system where failure depends on two interacting pressures rather than one; a queue fails not just from load but from the combination of load and available headroom; trust fails not just from bad outcomes but from bad outcomes under high stakes.</text:p>
      <text:h text:style-name="Heading_20_4" text:outline-level="4">Horton-Strahler Stream Order</text:h>
      <text:p text:style-name="Text_20_body">Assigns an integer to every branch of a tree: leaf nodes are order 1, when two branches of equal order n merge the result is order n+1, otherwise the result takes the higher order of the two inputs.</text:p>
      <text:p text:style-name="Body_20_Text.small"><text:span text:style-name="T1">Use in SOMA:</text:span> classify the structural complexity of any branching hierarchy with a single number; compute it for dependency trees, call graphs, workflow DAGs, or org structures; two trees with the same Strahler number have equivalent structural complexity regardless of size.</text:p>
      <text:h text:style-name="Heading_20_3" text:outline-level="3">Weather</text:h>
      <text:h text:style-name="Heading_20_4" text:outline-level="4">Kolmogorov Energy Cascade / Richardson -5/3 Law</text:h>
      <text:p text:style-name="Text_20_body">Turbulent energy is injected at large scales and cascades through a hierarchy of smaller and smaller eddies until it dissipates at the molecular scale — the power spectrum of turbulence follows a -5/3 power law over the inertial range.</text:p>
      <text:p text:style-name="Body_20_Text.small"><text:span text:style-name="T1">Use in SOMA:</text:span> model any system where work or information is injected at a coarse scale and flows down through finer levels; the -5/3 spectrum tells you how much activity to expect at each scale; detect anomalies where energy piles up at a scale instead of flowing through.</text:p>
      <text:h text:style-name="Heading_20_4" text:outline-level="4">Ensemble Forecasting / Forecast Spread</text:h>
      <text:p text:style-name="Text_20_body">Run many simulations from slightly different initial conditions — the spread of the ensemble directly measures forecast uncertainty; a tight ensemble means confident prediction, a wide spread means high uncertainty.</text:p>
      <text:p text:style-name="Body_20_Text.small"><text:span text:style-name="T1">Use in SOMA:</text:span> explicitly quantify uncertainty by running multiple versions of any process with perturbed inputs; the variance of outcomes IS the error bar; use spread to decide when to act and when to wait for more information.</text:p>
      <text:h text:style-name="Heading_20_4" text:outline-level="4">Stochastic Resonance</text:h>
      <text:p text:style-name="Text_20_body">A weak periodic signal that is undetectable in a quiet system becomes detectable when a specific amount of noise is added — the signal-to-noise ratio has a maximum at an optimal non-zero noise level.</text:p>
      <text:p text:style-name="Body_20_Text.small"><text:span text:style-name="T1">Use in SOMA:</text:span> adding the right amount of randomness can make a buried pattern visible; dithering in signal processing, epsilon-greedy exploration, and thermal annealing all exploit this; when a signal is too weak to trigger a threshold, tuned noise can help it through.</text:p>
      <text:h text:style-name="Heading_20_4" text:outline-level="4">Potential Vorticity Conservation</text:h>
      <text:p text:style-name="Text_20_body">In a rotating stratified fluid, the quantity combining vorticity and stratification is conserved along fluid parcel trajectories under adiabatic conditions — it is the atmosphere's version of angular momentum that nothing can create or destroy.</text:p>
      <text:p text:style-name="Body_20_Text.small"><text:span text:style-name="T1">Use in SOMA:</text:span> any conserved invariant in a physical system can be tracked as parcels move; find the conserved quantities in your system and track their flow instead of tracking state directly; conservation laws constrain what changes are possible even when you cannot predict the details.</text:p>
      <text:h text:style-name="Heading_20_4" text:outline-level="4">Atmospheric Blocking</text:h>
      <text:p text:style-name="Text_20_body">A quasi-stationary high-pressure system that reverses the normal potential vorticity gradient and deflects the jet stream — the pattern self-reinforces and resists displacement for days to weeks despite continuous atmospheric flow around it.</text:p>
      <text:p text:style-name="Body_20_Text.small"><text:span text:style-name="T1">Use in SOMA:</text:span> model persistent metastable states that actively resist perturbation; some system states are not just stable but self-reinforcing against the normal flow; detecting a blocking pattern early allows prediction of prolonged stuck behavior before the disruption becomes visible.</text:p>
      <text:h text:style-name="Heading_20_3" text:outline-level="3">Space</text:h>
      <text:h text:style-name="Heading_20_4" text:outline-level="4">Orbital Resonances</text:h>
      <text:p text:style-name="Text_20_body">When two orbiting bodies have periods in a small integer ratio, gravitational tugs at repeated geometry either lock them into a stable configuration or systematically eject them — the same ratio can be attractor or repeller depending on the phase.</text:p>
      <text:p text:style-name="Body_20_Text.small"><text:span text:style-name="T1">Use in SOMA:</text:span> detect and exploit integer-ratio synchronization in any coupled periodic system; resonances are not always destructive — they create the Trojan asteroids, the Moon's tidal lock, and the regular structure of Saturn's rings; predict which frequency ratios will stabilize and which will clear out.</text:p>
      <text:h text:style-name="Heading_20_4" text:outline-level="4">Jeans Instability</text:h>
      <text:p text:style-name="Text_20_body">A gas cloud collapses under its own gravity when its mass exceeds the Jeans mass — the point where self-gravity overcomes thermal pressure; below Jeans mass, pressure wins and the cloud oscillates; above it, gravitational collapse is inevitable.</text:p>
      <text:p text:style-name="Body_20_Text.small"><text:span text:style-name="T1">Use in SOMA:</text:span> find the threshold mass or density above which a distributed system spontaneously centralizes; any distributed population of interacting agents has a Jeans-like threshold above which coordination becomes self-reinforcing rather than requiring external pressure.</text:p>
      <text:h text:style-name="Heading_20_4" text:outline-level="4">Pulsar Glitches</text:h>
      <text:p text:style-name="Text_20_body">Pulsars are the most stable natural clocks known — but they occasionally glitch, spinning up suddenly by a tiny fraction and then relaxing back toward the previous rate over weeks; the glitch is thought to result from angular momentum transfer from a superfluid interior.</text:p>
      <text:p text:style-name="Body_20_Text.small"><text:span text:style-name="T1">Use in SOMA:</text:span> model ultra-regular processes with rare discrete discontinuities followed by exponential relaxation; any monitoring system that expects a smooth signal needs a separate model for rare sudden jumps; the post-glitch relaxation curve is its own diagnostic signature.</text:p>
      <text:h text:style-name="Heading_20_4" text:outline-level="4">Stellar Initial Mass Function</text:h>
      <text:p text:style-name="Text_20_body">The distribution of masses of newly formed stars follows a power law — most stars are small, and the number of stars above any mass threshold decreases as a power of that mass (Salpeter slope ~-2.35).</text:p>
      <text:p text:style-name="Body_20_Text.small"><text:span text:style-name="T1">Use in SOMA:</text:span> model any generative process where output size follows a power law; predict the full distribution of object sizes from the measured slope; the IMF tells you that observing many small outputs does not mean large outputs do not exist — it tells you exactly how rare they are.</text:p>
      <text:h text:style-name="Heading_20_4" text:outline-level="4">Kozai-Lidov Mechanism</text:h>
      <text:p text:style-name="Text_20_body">A distant third body on an inclined orbit causes the inner binary's eccentricity and inclination to oscillate in a coupled cycle — the orbit flips between near-circular and highly eccentric on a timescale set by the mass ratio and separations.</text:p>
      <text:p text:style-name="Body_20_Text.small"><text:span text:style-name="T1">Use in SOMA:</text:span> model any three-component system where a distant third element drives long-period coupled oscillations in the inner pair; a third party that rarely interacts can still dominate the long-run dynamics of a tightly coupled pair through slow periodic forcing.</text:p>
      <text:h text:style-name="Heading_20_3" text:outline-level="3">Marine Life</text:h>
      <text:h text:style-name="Heading_20_4" text:outline-level="4">Von Bertalanffy Growth Model</text:h>
      <text:p text:style-name="Text_20_body">Fish grow rapidly when young and slow predictably as they approach an asymptotic maximum size — the growth rate is proportional to the difference between current size and the theoretical maximum: dL/dt = k(L∞ − L).</text:p>
      <text:p text:style-name="Body_20_Text.small"><text:span text:style-name="T1">Use in SOMA:</text:span> model any resource, capability, or metric that grows fast early and saturates predictably; the three parameters (growth rate k, asymptote L∞, starting offset) fit a wide range of S-shaped curves with a mechanistic interpretation; predict when growth will effectively stop.</text:p>
      <text:h text:style-name="Heading_20_4" text:outline-level="4">Vicsek Flocking Model</text:h>
      <text:p text:style-name="Text_20_body">Agents move at constant speed and update their direction to match the average heading of neighbors within a fixed radius — with no central coordinator, global order (a polarized flock) emerges when density and alignment radius exceed a threshold.</text:p>
      <text:p text:style-name="Body_20_Text.small"><text:span text:style-name="T1">Use in SOMA:</text:span> model emergence of consensus in any agent population from local alignment rules alone; predict whether a group will polarize or stay disordered from just two parameters; detect the onset of coordinated behavior before it becomes visible at the global level.</text:p>
      <text:h text:style-name="Heading_20_4" text:outline-level="4">Sequential Hermaphroditism</text:h>
      <text:p text:style-name="Text_20_body">Some fish — wrasses, clownfish, groupers — change sex based on social context; in protandrous species the dominant male becomes female, in protogynous species the largest female becomes male; the switch is triggered by relative social rank, not age or fixed biology.</text:p>
      <text:p text:style-name="Body_20_Text.small"><text:span text:style-name="T1">Use in SOMA:</text:span> model adaptive role reassignment where the agent best suited by circumstance takes a new role regardless of its history; the optimal allocation of roles in a group changes when composition changes; hard-coded role assignment is worse than context-triggered reassignment.</text:p>
      <text:h text:style-name="Heading_20_4" text:outline-level="4">Martin Curve / Biological Pump</text:h>
      <text:p text:style-name="Text_20_body">Dead organic particles sink from the sunlit surface ocean into the deep — the carbon flux decreases with depth following a power law: F(z) = F₁₀₀(z/100)^−b, where b ≈ 0.86; most material is remineralized before reaching the seafloor.</text:p>
      <text:p text:style-name="Body_20_Text.small"><text:span text:style-name="T1">Use in SOMA:</text:span> model how any signal, resource, or information attenuates predictably with distance from its source; the power law means most is lost near the top, not uniformly; fit b from measurements at a few depths to predict flux at any depth; the exponent encodes the system's remineralization efficiency.</text:p>
      <text:h text:style-name="Heading_20_4" text:outline-level="4">Whale Song Hierarchical Grammar</text:h>
      <text:p text:style-name="Text_20_body"><text:soft-page-break/>Humpback whale songs are organized in a strict four-level hierarchy: units → phrases → themes → songs; all males in a population sing the same song, and the song evolves culturally over years as new phrases spread through the population while the hierarchical structure is preserved.</text:p>
      <text:p text:style-name="Body_20_Text.small"><text:span text:style-name="T1">Use in SOMA:</text:span> model any evolving hierarchical pattern language where content changes but grammar persists; the structure is conserved even as tokens are replaced; distinguish structural stability from content stability; detect when a system is evolving vs when its underlying grammar is changing.</text:p>
      <text:h text:style-name="Heading_20_3" text:outline-level="3">Distributed Systems, Verification, And Runtime Integrity</text:h>
      <text:h text:style-name="P3" text:outline-level="4">Merkle Trees <text:span text:style-name="T2">★ </text:span><text:span text:style-name="T3">load-bearing</text:span></text:h>
      <text:p text:style-name="Text_20_body">A Merkle tree hashes records into leaves and combines them upward until one root hash commits to the whole set.</text:p>
      <text:p text:style-name="Body_20_Text.small"><text:span text:style-name="T1">Use in SOMA:</text:span> tamper-evident trust stores, audit roots, reproducible snapshots, efficient proof that one record belongs to a committed state, and O(log n) update paths instead of rehashing every record.</text:p>
      <text:h text:style-name="P3" text:outline-level="4">Hash Chains <text:span text:style-name="T2">★ </text:span><text:span text:style-name="T3">load-bearing</text:span></text:h>
      <text:p text:style-name="Text_20_body">Each record includes the previous record's hash, creating an append-only chain where rewriting history breaks every later hash.</text:p>
      <text:p text:style-name="Body_20_Text.small"><text:span text:style-name="T1">Use in SOMA:</text:span> audit logs, event streams, command histories, and trust evidence trails where order and immutability matter.</text:p>
      <text:h text:style-name="P3" text:outline-level="4">Vector Clocks <text:span text:style-name="T2">★ </text:span><text:span text:style-name="T3">load-bearing</text:span></text:h>
      <text:p text:style-name="Text_20_body">Each node keeps a counter for every participant, allowing distributed systems to tell whether events are ordered, concurrent, or conflicting.</text:p>
      <text:p text:style-name="Body_20_Text.small"><text:span text:style-name="T1">Use in SOMA:</text:span> detect concurrent edits, causality gaps, stale node views, and conflicting local-first state without trusting wall-clock time.</text:p>
      <text:h text:style-name="P3" text:outline-level="4">Lamport Clocks <text:span text:style-name="T2">★ </text:span><text:span text:style-name="T3">load-bearing</text:span></text:h>
      <text:p text:style-name="Text_20_body">A logical counter gives a partial ordering of distributed events even when physical clocks disagree.</text:p>
      <text:p text:style-name="Body_20_Text.small"><text:span text:style-name="T1">Use in SOMA:</text:span> impose deterministic event ordering for logs, conflict resolution, bus delivery, and replay when wall-clock timestamps are not authoritative.</text:p>
      <text:h text:style-name="P3" text:outline-level="4">CRDTs <text:span text:style-name="T2">★ </text:span><text:span text:style-name="T3">load-bearing</text:span></text:h>
      <text:p text:style-name="Text_20_body">Conflict-free replicated data types are data structures designed so independently edited replicas can merge without coordination and converge to the same result.</text:p>
      <text:p text:style-name="Body_20_Text.small"><text:span text:style-name="T1">Use in SOMA:</text:span> local-first task state, counters, sets, summaries, and node-local caches that must survive partitions and later merge safely.</text:p>
      <text:h text:style-name="Heading_20_4" text:outline-level="4">Petri Nets</text:h>
      <text:p text:style-name="Text_20_body">Petri nets model systems with places, transitions, and tokens; they capture concurrency, resource availability, and deadlock conditions.</text:p>
      <text:p text:style-name="Body_20_Text.small"><text:span text:style-name="T1">Use in SOMA:</text:span> model workflow execution, lease ownership, verifier capacity, task prerequisites, and resource starvation before implementing runtime logic.</text:p>
      <text:h text:style-name="Heading_20_4" text:outline-level="4">Temporal Logic / Model Checking</text:h>
      <text:p text:style-name="Text_20_body">Temporal logic expresses what must always hold, eventually happen, or never happen across state transitions; model checkers search all reachable states for violations.</text:p>
      <text:p text:style-name="Body_20_Text.small"><text:span text:style-name="T1">Use in SOMA:</text:span> verify invariants like killed agents cannot act, audit sequence never skips, HumanSeat gates are respected, and direct agent-to-agent communication remains impossible.</text:p>
      <text:h text:style-name="Heading_20_4" text:outline-level="4">TLA+</text:h>
      <text:p text:style-name="Text_20_body">TLA+ is a specification language for concurrent and distributed systems that describes state machines and checks safety/liveness properties.</text:p>
      <text:p text:style-name="Body_20_Text.small"><text:span text:style-name="T1">Use in SOMA:</text:span> design critical runtime protocols before code: leases, audit append, task claiming, trust kill/restore, quorum decisions, and crash recovery.</text:p>
      <text:h text:style-name="Heading_20_4" text:outline-level="4">Fault Tree Analysis</text:h>
      <text:p text:style-name="Text_20_body">A top-down failure model decomposes a bad event into combinations of lower-level causes using AND/OR logic.</text:p>
      <text:p text:style-name="Body_20_Text.small"><text:span text:style-name="T1">Use in SOMA:</text:span> explain how outages, unsafe actions, trust collapse, or data loss can happen, then map each leaf cause to detection and prevention.</text:p>
      <text:h text:style-name="Heading_20_4" text:outline-level="4">FMEA</text:h>
      <text:p text:style-name="Text_20_body">Failure Mode and Effects Analysis lists components, possible failure modes, effects, severity, likelihood, detectability, and mitigation.</text:p>
      <text:p text:style-name="Body_20_Text.small"><text:span text:style-name="T1">Use in SOMA:</text:span> prioritize hardening work for agents, verifiers, buses, locks, state files, adapters, and node recovery paths.</text:p>
      <text:h text:style-name="P3" text:outline-level="4">Little's Law <text:span text:style-name="T2">★ </text:span><text:span text:style-name="T3">load-bearing</text:span></text:h>
      <text:p text:style-name="Text_20_body">In a stable queue, average work in progress equals arrival rate times average latency.</text:p>
      <text:p text:style-name="Body_20_Text.small"><text:span text:style-name="T1">Use in SOMA:</text:span> sanity-check task queues, verifier pools, model calls, and bus backlogs; if arrivals or latency rise, queued work must grow unless capacity changes.</text:p>
      <text:h text:style-name="P3" text:outline-level="4">Conformal Prediction <text:span text:style-name="T2">★ </text:span><text:span text:style-name="T3">load-bearing</text:span></text:h>
      <text:p text:style-name="Text_20_body">Conformal prediction wraps model outputs with calibrated uncertainty sets under weak assumptions, using held-out calibration errors.</text:p>
      <text:p text:style-name="Body_20_Text.small"><text:span text:style-name="T1">Use in SOMA:</text:span> put operational error bars around verifier scores, routing predictions, task duration estimates, and anomaly detectors instead of trusting a bare confidence number.</text:p>
      <text:h text:style-name="Heading_20_4" text:outline-level="4">Causal DAGs / Structural Causal Models</text:h>
      <text:p text:style-name="Text_20_body">Causal graphs distinguish correlation from intervention: what changes if the system actively sets X instead of merely observing X?</text:p>
      <text:p text:style-name="Body_20_Text.small"><text:span text:style-name="T1">Use in SOMA:</text:span> decide whether reassigning an agent, killing a node, changing a verifier, or widening context would actually improve outcomes rather than just correlate with them.</text:p>
      <text:h text:style-name="Heading_20_4" text:outline-level="4">Do-Calculus</text:h>
      <text:p text:style-name="Text_20_body">Do-calculus gives formal rules for when causal effects can be identified from observational and interventional data.</text:p>
      <text:p text:style-name="Body_20_Text.small"><text:span text:style-name="T1">Use in SOMA:</text:span> determine which runtime questions need experiments, which can be answered from logs, and which are not identifiable from available evidence.</text:p>
      <text:h text:style-name="P3" text:outline-level="4">Viability Theory <text:span text:style-name="T2">★ </text:span><text:span text:style-name="T3">load-bearing</text:span></text:h>
      <text:p text:style-name="Text_20_body">Viability theory studies controls that keep a system trajectory inside an acceptable safe set over time.</text:p>
      <text:p text:style-name="Body_20_Text.small"><text:span text:style-name="T1">Use in SOMA:</text:span> maintain runtime health within boundaries for trust, autonomy, load, latency, context exposure, and retry pressure instead of only optimizing a reward.</text:p>
      <text:h text:style-name="Heading_20_4" text:outline-level="4">Portfolio Theory / Diversification</text:h>
      <text:p text:style-name="Text_20_body">Risk is reduced by mixing assets whose failures are not perfectly correlated.</text:p>
      <text:p text:style-name="Body_20_Text.small"><text:span text:style-name="T1">Use in SOMA:</text:span> keep diverse agents, models, routes, and verifiers so the system is not optimized around one brittle best performer.</text:p>
      <text:h text:style-name="Heading_20_4" text:outline-level="4">Bet-Hedging</text:h>
      <text:p text:style-name="Text_20_body">Organisms sacrifice maximum short-term growth to survive uncertain future conditions through diversified strategies.</text:p>
      <text:p text:style-name="Body_20_Text.small"><text:span text:style-name="T1">Use in SOMA:</text:span> preserve fallback agents, redundant verifiers, and conservative routing even when the current best path looks faster.</text:p>
      <text:h text:style-name="Heading_20_3" text:outline-level="3">Immune System Ideas</text:h>
      <text:h text:style-name="P3" text:outline-level="4">Negative Selection <text:span text:style-name="T2">★ </text:span><text:span text:style-name="T3">load-bearing</text:span></text:h>
      <text:p text:style-name="Text_20_body">The immune system removes cells that react strongly to self before they can cause damage.</text:p>
      <text:p text:style-name="Body_20_Text.small"><text:span text:style-name="T1">Use in SOMA:</text:span> reject agents, tools, prompts, or policies that attack local invariants, private state, or trusted system boundaries before giving them authority.</text:p>
      <text:h text:style-name="Heading_20_4" text:outline-level="4">Clonal Selection</text:h>
      <text:p text:style-name="Text_20_body">Immune cells that recognize a threat expand rapidly, then contract after the threat is controlled.</text:p>
      <text:p text:style-name="Body_20_Text.small"><text:span text:style-name="T1">Use in SOMA:</text:span> temporarily scale specialized verifiers, monitors, or remediation agents during an incident, then reduce them after the risk drops.</text:p>
      <text:h text:style-name="Heading_20_4" text:outline-level="4">Immune Memory</text:h>
      <text:p text:style-name="Text_20_body">After exposure, the immune system retains memory cells that respond faster to future encounters.</text:p>
      <text:p text:style-name="Body_20_Text.small"><text:span text:style-name="T1">Use in SOMA:</text:span> turn past failures, exploit attempts, verifier rejections, and recovery actions into durable rules, tests, and trust evidence.</text:p>
      <text:h text:style-name="Heading_20_4" text:outline-level="4">Immune Tolerance</text:h>
      <text:p text:style-name="Text_20_body">The immune system must avoid attacking harmless or self signals.</text:p>
      <text:p text:style-name="Body_20_Text.small"><text:span text:style-name="T1">Use in SOMA:</text:span> prevent over-quarantine, false-positive verifier storms, and excessive HumanSeat escalation by distinguishing dangerous anomalies from normal local variation.</text:p>
      <text:h text:style-name="Heading_20_4" text:outline-level="4">Cytokine Storm</text:h>
      <text:p text:style-name="Text_20_body">An excessive immune response can damage the host more than the original trigger.</text:p>
      <text:p text:style-name="Body_20_Text.small"><text:span text:style-name="T1">Use in SOMA:</text:span> cap automated remediation, alert floods, retries, and trust penalties so the safety system does not destabilize the runtime.</text:p>
      <text:h text:style-name="Heading_20_4" text:outline-level="4">Innate And Adaptive Immunity</text:h>
      <text:p text:style-name="Text_20_body">Innate immunity is fast and general; adaptive immunity is slower, specific, and learned.</text:p>
      <text:p text:style-name="Body_20_Text.small"><text:span text:style-name="T1">Use in SOMA:</text:span> combine cheap fixed guards like schema checks and capability boundaries with learned, specific defenses like verifier policies and incident-derived tests.</text:p>
      <text:h text:style-name="P3" text:outline-level="4">Danger Model <text:span text:style-name="T2">★ </text:span><text:span text:style-name="T3">load-bearing</text:span></text:h>
      <text:p text:style-name="Text_20_body">Immune response is driven by signals of damage or stress, not merely by foreignness.</text:p>
      <text:p text:style-name="Body_20_Text.small"><text:span text:style-name="T1">Use in SOMA:</text:span> prioritize interventions based on harm signals: data loss risk, authority boundary pressure, repeated verifier failures, escalating latency, or audit inconsistency.</text:p>
      <text:h text:style-name="Heading_20_3" text:outline-level="3">Best Fit For Context Primitive</text:h>
      <text:p text:style-name="Preformatted_20_Text.diagram">Trust:</text:p>
      <text:p text:style-name="Preformatted_20_Text.diagram">Bayes, Thompson sampling, survival analysis, Merkle roots, immune memory</text:p>
      <text:p text:style-name="Preformatted_20_Text.diagram"/>
      <text:p text:style-name="Preformatted_20_Text.diagram">Context:</text:p>
      <text:p text:style-name="Preformatted_20_Text.diagram">entropy, information gain, PageRank, belief propagation, renormalization,</text:p>
      <text:p text:style-name="Preformatted_20_Text.diagram">causal DAGs, vector clocks</text:p>
      <text:p text:style-name="Preformatted_20_Text.diagram"/>
      <text:p text:style-name="Preformatted_20_Text.diagram">Scheduling:</text:p>
      <text:p text:style-name="Preformatted_20_Text.diagram">constraint satisfaction, queueing theory, critical path, bandits,</text:p>
      <text:p text:style-name="Preformatted_20_Text.diagram">Petri nets, Little's Law</text:p>
      <text:p text:style-name="Preformatted_20_Text.diagram"/>
      <text:p text:style-name="Preformatted_20_Text.diagram">Safety:</text:p>
      <text:p text:style-name="Preformatted_20_Text.diagram">hysteresis, circuit breakers, drift detection, Bayesian networks,</text:p>
      <text:p text:style-name="Preformatted_20_Text.diagram">temporal logic, model checking, FMEA, negative selection, immune tolerance</text:p>
      <text:p text:style-name="Preformatted_20_Text.diagram"/>
      <text:p text:style-name="Preformatted_20_Text.diagram">Runtime control:</text:p>
      <text:p text:style-name="Preformatted_20_Text.diagram">PID, backpressure, Kalman filters, hazard functions,</text:p>
      <text:p text:style-name="Preformatted_20_Text.diagram">viability theory, conformal prediction</text:p>
      <text:p text:style-name="Preformatted_20_Text.diagram"/>
      <text:p text:style-name="Preformatted_20_Text.diagram">Chaos:</text:p>
      <text:p text:style-name="Preformatted_20_Text.diagram">Lyapunov exponents, Monte Carlo, cellular automata, catastrophe theory</text:p>
      <text:p text:style-name="Preformatted_20_Text.diagram"/>
      <text:p text:style-name="Preformatted_20_Text.diagram">Mesh:</text:p>
      <text:p text:style-name="Preformatted_20_Text.diagram">percolation, shortest path, safe operating space,</text:p>
      <text:p text:style-name="Preformatted_20_Text.diagram">CRDTs, Lamport clocks, hash chains</text:p>
      <text:p text:style-name="Preformatted_20_Text.diagram"/>
      <text:p text:style-name="Preformatted_20_Text.diagram">Biological inspiration:</text:p>
      <text:p text:style-name="Preformatted_20_Text.diagram">quorum sensing, biofilm, persister cells, cross-feeding, Red Queen dynamics,</text:p>
      <text:p text:style-name="Preformatted_20_Text.diagram">priority effects, persistence landscapes, common fungal networks, quasispecies,</text:p>
      <text:p text:style-name="Preformatted_20_Text.diagram">bet-hedging, portfolio diversification</text:p>
      <text:p text:style-name="Preformatted_20_Text.diagram"/>
      <text:p text:style-name="Preformatted_20_Text.diagram">Ecosystem inspiration:</text:p>
      <text:p text:style-name="Preformatted_20_Text.diagram">carrying capacity, keystone species, niche theory, panarchy, planetary boundaries</text:p>
      <text:p text:style-name="Preformatted_20_Text.diagram"/>
      <text:p text:style-name="Preformatted_20_Text.diagram">Soil runtime inspiration:</text:p>
      <text:p text:style-name="Preformatted_20_Text.diagram">priming, rhizosphere priming, carbon use efficiency, microbial carbon pump,</text:p>
      <text:p text:style-name="Preformatted_20_Text.diagram">necromass, aggregate hierarchy, pore connectivity, redox ladder, plant-soil feedback</text:p>
      <text:p text:style-name="Preformatted_20_Text.diagram"/>
      <text:p text:style-name="Preformatted_20_Text.diagram">Topology and algebra:</text:p>
      <text:p text:style-name="Preformatted_20_Text.diagram">persistent homology, persistent Laplacian, cellular sheaf theory, discrete Morse theory,</text:p>
      <text:p text:style-name="Preformatted_20_Text.diagram">tropical algebra, formal concept analysis, matroid theory</text:p>
      <text:p text:style-name="Preformatted_20_Text.diagram"/>
      <text:p text:style-name="Preformatted_20_Text.diagram">Information and process:</text:p>
      <text:p text:style-name="Preformatted_20_Text.diagram">Koopman operator, active inference, path signature transform, optimal transport,</text:p>
      <text:p text:style-name="Preformatted_20_Text.diagram">mean field games, causal emergence, hypergraph dynamics, ultrametric spaces,</text:p>
      <text:p text:style-name="Preformatted_20_Text.diagram">Freidlin-Wentzell large deviations, stochastic thermodynamics, process algebra,</text:p>
      <text:p text:style-name="Preformatted_20_Text.diagram">spectral gap, Kolmogorov complexity</text:p>
      <text:p text:style-name="Preformatted_20_Text.diagram"/>
      <text:p text:style-name="Preformatted_20_Text.diagram">Combinatorics and number theory:</text:p>
      <text:p text:style-name="Preformatted_20_Text.diagram">Ramsey theory, Turán / extremal graph theory, Sprague-Grundy theory,</text:p>
      <text:p text:style-name="Preformatted_20_Text.diagram">p-adic metric, q-analogs</text:p>
      <text:p text:style-name="Preformatted_20_Text.diagram"/>
      <text:p text:style-name="Preformatted_20_Text.diagram">Geometry and symmetry:</text:p>
      <text:p text:style-name="Preformatted_20_Text.diagram">power diagrams / weighted Voronoi, winding number / topological degree,</text:p>
      <text:p text:style-name="Preformatted_20_Text.diagram">Lie groups, symbolic dynamics, information geometry</text:p>
      <text:p text:style-name="Preformatted_20_Text.diagram"/>
      <text:p text:style-name="Preformatted_20_Text.diagram">Probability and distributions:</text:p>
      <text:p text:style-name="Preformatted_20_Text.diagram">Tsallis entropy, Lévy flights, stochastic dominance, free probability, ergodic theory</text:p>
      <text:p text:style-name="Preformatted_20_Text.diagram"/>
      <text:p text:style-name="Preformatted_20_Text.diagram">Structures and transformations:</text:p>
      <text:p text:style-name="Preformatted_20_Text.diagram">tensor networks, functors / category theory, rough set theory,</text:p>
      <text:p text:style-name="Preformatted_20_Text.diagram">interval arithmetic, Turing reaction-diffusion</text:p>
      <text:p text:style-name="Preformatted_20_Text.diagram"><text:soft-page-break/></text:p>
      <text:p text:style-name="Preformatted_20_Text.diagram">Off-the-wall combinatorics and sequences:</text:p>
      <text:p text:style-name="Preformatted_20_Text.diagram">abelian sandpile, de Bruijn sequences, parking functions,</text:p>
      <text:p text:style-name="Preformatted_20_Text.diagram">Lyndon words, umbral calculus</text:p>
      <text:p text:style-name="Preformatted_20_Text.diagram"/>
      <text:p text:style-name="Preformatted_20_Text.diagram">Off-the-wall topology and knots:</text:p>
      <text:p text:style-name="Preformatted_20_Text.diagram">knot invariants / Jones polynomial, braid theory, Sperner's lemma,</text:p>
      <text:p text:style-name="Preformatted_20_Text.diagram">Stone duality, arctic circle phenomenon</text:p>
      <text:p text:style-name="Preformatted_20_Text.diagram"/>
      <text:p text:style-name="Preformatted_20_Text.diagram">Off-the-wall physics-adjacent:</text:p>
      <text:p text:style-name="Preformatted_20_Text.diagram">ASEP, Tracy-Widom distribution, Wang tiles, Lindström-Gessel-Viennot lemma,</text:p>
      <text:p text:style-name="Preformatted_20_Text.diagram">chromatic polynomial</text:p>
      <text:p text:style-name="Preformatted_20_Text.diagram"/>
      <text:p text:style-name="Preformatted_20_Text.diagram">Off-the-wall infinite and structural:</text:p>
      <text:p text:style-name="Preformatted_20_Text.diagram">ordinal arithmetic, non-standard analysis / hyperreals,</text:p>
      <text:p text:style-name="Preformatted_20_Text.diagram">combinatorial species, Ramanujan graphs, finite geometry / projective planes</text:p>
      <text:p text:style-name="Preformatted_20_Text.diagram"/>
      <text:p text:style-name="Preformatted_20_Text.diagram">Geology:</text:p>
      <text:p text:style-name="Preformatted_20_Text.diagram">Gutenberg-Richter law, Omori-Utsu law, Hurst exponent,</text:p>
      <text:p text:style-name="Preformatted_20_Text.diagram">Mohr-Coulomb failure criterion, Horton-Strahler stream order</text:p>
      <text:p text:style-name="Preformatted_20_Text.diagram"/>
      <text:p text:style-name="Preformatted_20_Text.diagram">Weather:</text:p>
      <text:p text:style-name="Preformatted_20_Text.diagram">Kolmogorov energy cascade, ensemble forecasting / spread,</text:p>
      <text:p text:style-name="Preformatted_20_Text.diagram">stochastic resonance, potential vorticity conservation, atmospheric blocking</text:p>
      <text:p text:style-name="Preformatted_20_Text.diagram"/>
      <text:p text:style-name="Preformatted_20_Text.diagram">Space:</text:p>
      <text:p text:style-name="Preformatted_20_Text.diagram">orbital resonances, Jeans instability, pulsar glitches,</text:p>
      <text:p text:style-name="Preformatted_20_Text.diagram">stellar initial mass function, Kozai-Lidov mechanism</text:p>
      <text:p text:style-name="Preformatted_20_Text.diagram"/>
      <text:p text:style-name="Preformatted_20_Text.diagram">Marine life:</text:p>
      <text:p text:style-name="Preformatted_20_Text.diagram">von Bertalanffy growth, Vicsek flocking model,</text:p>
      <text:p text:style-name="Preformatted_20_Text.diagram">sequential hermaphroditism, Martin curve / biological pump,</text:p>
      <text:p text:style-name="Preformatted_20_Text.diagram">whale song hierarchical grammar</text:p>
      <text:p text:style-name="Preformatted_20_Text.diagram"/>
      <text:p text:style-name="Preformatted_20_Text.diagram">Distributed systems and verification:</text:p>
      <text:p text:style-name="Preformatted_20_Text.diagram">Merkle trees, hash chains, vector clocks, Lamport clocks, CRDTs,</text:p>
      <text:p text:style-name="Preformatted_20_Text.diagram">Petri nets, temporal logic, TLA+, fault tree analysis, FMEA,</text:p>
      <text:p text:style-name="Preformatted_20_Text.diagram">Little's Law, conformal prediction, causal DAGs, do-calculus,</text:p>
      <text:p text:style-name="Preformatted_20_Text.diagram">viability theory, portfolio theory, bet-hedging</text:p>
      <text:p text:style-name="Preformatted_20_Text.diagram"/>
      <text:p text:style-name="Preformatted_20_Text.diagram">Immune system:</text:p>
      <text:p text:style-name="Preformatted_20_Text.diagram">negative selection, clonal selection, immune memory, immune tolerance,</text:p>
      <text:p text:style-name="P4">cytokine storm, innate/adaptive immunity, danger model</text:p>
      <text:p text:style-name="Body_20_Text.small">End of Appendices. End of the SOMA Code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5171a" loext:opacity="100%" style:font-name="Liberation Serif1" fo:font-family="'Liberation Serif', Georgia, serif" fo:font-size="12pt" style:font-name-asian="Liberation Serif1" style:font-family-asian="'Liberation Serif', Georgia, serif" style:font-size-asian="12pt" style:font-name-complex="Liberation Serif1" style:font-family-complex="'Liberation Serif', Georgia,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style:text-properties fo:color="#16335f" loext:opacity="100%" style:font-name="Noto Sans" fo:font-family="'Noto Sans'" style:font-pitch="variable" fo:font-size="25pt" fo:font-weight="bold" style:font-size-asian="25pt" style:font-weight-asian="bold" style:font-size-complex="2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left="0.3055in" fo:margin-right="0.3055in" fo:margin-top="0.3055in" fo:margin-bottom="0.0835in" style:contextual-spacing="false" fo:padding-left="0in" fo:padding-right="0in" fo:padding-top="0in" fo:padding-bottom="0.0417in" fo:border-left="none" fo:border-right="none" fo:border-top="none" fo:border-bottom="0.74pt solid #b9c7de"/>
      <style:text-properties fo:color="#16335f" loext:opacity="100%" style:font-name="Liberation Serif" fo:font-family="'Liberation Serif'" style:font-family-generic="roman" style:font-pitch="variable" fo:font-size="18.5pt" fo:font-weight="bold" style:font-name-asian="Noto Serif CJK SC" style:font-family-asian="'Noto Serif CJK SC'" style:font-family-generic-asian="system" style:font-pitch-asian="variable" style:font-size-asian="18.5pt" style:font-weight-asian="bold" style:font-name-complex="Noto Sans Devanagari1" style:font-family-complex="'Noto Sans Devanagari'" style:font-family-generic-complex="system" style:font-pitch-complex="variable"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left="0.222in" fo:margin-right="0.222in" fo:margin-top="0.222in" fo:margin-bottom="0.0555in" style:contextual-spacing="false"/>
      <style:text-properties fo:color="#8a4b10" loext:opacity="100%" style:font-name="Liberation Serif" fo:font-family="'Liberation Serif'" style:font-family-generic="roman" style:font-pitch="variable" fo:font-size="14.5pt" fo:font-weight="bold" style:font-name-asian="Noto Serif CJK SC" style:font-family-asian="'Noto Serif CJK SC'" style:font-family-generic-asian="system" style:font-pitch-asian="variable" style:font-size-asian="14.5pt" style:font-weight-asian="bold" style:font-name-complex="Noto Sans Devanagari1" style:font-family-complex="'Noto Sans Devanagari'" style:font-family-generic-complex="system" style:font-pitch-complex="variable" style:font-size-complex="14.5pt" style:font-weight-complex="bold"/>
    </style:style>
    <style:style style:name="Heading_20_4" style:display-name="Heading 4" style:family="paragraph" style:parent-style-name="Heading" style:next-style-name="Text_20_body" style:default-outline-level="4" style:list-style-name="" style:class="text">
      <style:paragraph-properties fo:margin-left="0.1665in" fo:margin-right="0.1665in" fo:margin-top="0.1665in" fo:margin-bottom="0.0417in" style:contextual-spacing="false"/>
      <style:text-properties fo:font-variant="small-caps" fo:color="#2a2d3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line-height="125%" fo:padding-left="0.1252in" fo:padding-right="0.1252in" fo:padding-top="0.0937in" fo:padding-bottom="0.0937in" fo:border-left="2.24pt solid #16335f" fo:border-right="0.06pt solid #d7dbe0" fo:border-top="0.06pt solid #d7dbe0" fo:border-bottom="0.06pt solid #d7dbe0"/>
      <style:text-properties style:font-name="Liberation Mono" fo:font-family="'Liberation Mono', 'DejaVu Sans Mono', monospace" fo:font-size="9.69999980926514pt" style:font-name-asian="Liberation Mono" style:font-family-asian="'Liberation Mono', 'DejaVu Sans Mono', monospace" style:font-size-asian="9.69999980926514pt" style:font-name-complex="Liberation Mono" style:font-family-complex="'Liberation Mono', 'DejaVu Sans Mono', monospace" style:font-size-complex="9.69999980926514pt"/>
    </style:style>
    <style:style style:name="Preformatted_20_Text.diagram" style:display-name="Preformatted Text.diagram" style:family="paragraph" style:parent-style-name="Preformatted_20_Text">
      <style:paragraph-properties fo:padding-left="0.1252in" fo:padding-right="0.1252in" fo:padding-top="0.0937in" fo:padding-bottom="0.0937in" fo:border-left="2.24pt solid #8a4b10" fo:border-right="0.06pt solid #d7dbe0" fo:border-top="0.06pt solid #d7dbe0" fo:border-bottom="0.06pt solid #d7dbe0"/>
    </style:style>
    <style:style style:name="Quotations" style:family="paragraph" style:parent-style-name="Standard" style:class="html">
      <style:paragraph-properties fo:margin-left="0.25in" fo:margin-right="0.25in" fo:margin-top="0.111in" fo:margin-bottom="0.111in" style:contextual-spacing="false" fo:text-indent="0in" style:auto-text-indent="false" fo:padding-left="0.1252in" fo:padding-right="0in" fo:padding-top="0in" fo:padding-bottom="0in" fo:border-left="2.24pt solid #b9c7de" fo:border-right="none" fo:border-top="none" fo:border-bottom="none"/>
      <style:text-properties fo:color="#333333" loext:opacity="100%" fo:font-style="italic" style:font-style-asian="italic" style:font-style-complex="italic"/>
    </style:style>
    <style:style style:name="Body_20_Text.lede" style:display-name="Body Text.lede" style:family="paragraph" style:parent-style-name="Text_20_body">
      <style:paragraph-properties fo:margin-left="0.111in" fo:margin-right="0.111in" fo:margin-top="0.111in" fo:margin-bottom="0.1945in" style:contextual-spacing="false"/>
      <style:text-properties fo:color="#3a3f45" loext:opacity="100%" fo:font-size="13pt" fo:font-style="italic" style:font-size-asian="13pt" style:font-style-asian="italic" style:font-size-complex="13pt" style:font-style-complex="italic"/>
    </style:style>
    <style:style style:name="Body_20_Text.small" style:display-name="Body Text.small" style:family="paragraph" style:parent-style-name="Text_20_body">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16335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color="#0f1115" loext:opacity="100%" fo:font-weight="bold" style:font-weight-asian="bold" style:font-weight-complex="bold"/>
    </style:style>
    <style:style style:name="Emphasis" style:family="text">
      <style:text-properties fo:color="#224433" loext:opacity="100%" fo:font-style="italic" style:font-style-asian="italic" style:font-style-complex="italic"/>
    </style:style>
    <style:style style:name="Source_20_Text" style:display-name="Source Text" style:family="text">
      <style:text-properties style:font-name="Liberation Mono" fo:font-family="'Liberation Mono', 'DejaVu Sans Mono', monospace" style:font-name-asian="Liberation Mono" style:font-family-asian="'Liberation Mono', 'DejaVu Sans Mono', monospace" style:font-name-complex="Liberation Mono" style:font-family-complex="'Liberation Mono', 'DejaVu Sans Mono', monospace"/>
    </style:style>
    <style:style style:name="Visited_20_Internet_20_Link" style:display-name="Visited 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MA Codex — Appendices</dc:title>
    <meta:document-statistic meta:table-count="11" meta:image-count="0" meta:object-count="0" meta:page-count="7" meta:paragraph-count="947" meta:word-count="11465" meta:character-count="79650" meta:non-whitespace-character-count="69015"/>
    <meta:generator>LibreOffice/24.2.7.2$Linux_X86_64 LibreOffice_project/420$Build-2</meta:generator>
    <meta:user-defined meta:name=""/>
  </office:meta>
</office:document-meta>
</file>